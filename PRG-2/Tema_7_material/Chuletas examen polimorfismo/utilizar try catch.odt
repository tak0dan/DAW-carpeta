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ar una excepción propia en Java</text:h>
      <text:h text:style-name="Heading_20_2" text:outline-level="2">1. Crear la clase de la excepción</text:h>
      <text:p text:style-name="Text_20_body">Solo tienes que crear una clase que <text:span text:style-name="Strong_20_Emphasis">extienda </text:span><text:span text:style-name="Strong_20_Emphasis"><text:span text:style-name="Source_20_Text">Exception</text:span></text:span>:</text:p>
      <text:p text:style-name="Preformatted_20_Text"><text:span text:style-name="Source_20_Text">public class HoraIncorrectaException extends Exception {</text:span></text:p>
      <text:p text:style-name="Preformatted_20_Text"><text:span text:style-name="Source_20_Text"><text:s text:c="4"/>public HoraIncorrecta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Eso es todo. El <text:span text:style-name="Source_20_Text">super(mensaje)</text:span> le pasa el mensaje a la clase <text:span text:style-name="Source_20_Text">Exception</text:span> para que luego lo puedas mostrar con <text:span text:style-name="Source_20_Text">e.getMessage()</text:span>.</text:p>
      <text:p text:style-name="Horizontal_20_Line"/>
      <text:h text:style-name="Heading_20_2" text:outline-level="2">2. Lanzarla con <text:span text:style-name="Source_20_Text">throw</text:span></text:h>
      <text:p text:style-name="Text_20_body">En el método donde quieras que salte la excepción, usas <text:span text:style-name="Source_20_Text">throw</text:span> y añades <text:span text:style-name="Source_20_Text">throws</text:span> en la cabecera del método:</text:p>
      <text:p text:style-name="Preformatted_20_Text"><text:span text:style-name="Source_20_Text">public void setHora(int hora) throws HoraIncorrectaException {</text:span></text:p>
      <text:p text:style-name="Preformatted_20_Text"><text:span text:style-name="Source_20_Text"><text:s text:c="4"/>if (hora &lt; 0 || hora &gt; 23) {</text:span></text:p>
      <text:p text:style-name="Preformatted_20_Text"><text:span text:style-name="Source_20_Text"><text:s text:c="8"/>throw new HoraIncorrectaException("La hora " + hora + " no es válida"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this.hora = hora;</text:span></text:p>
      <text:p text:style-name="P1"><text:span text:style-name="Source_20_Text">}</text:span></text:p>
      <text:list text:style-name="L1">
        <text:list-item>
          <text:p text:style-name="P2"><text:span text:style-name="Strong_20_Emphasis"><text:span text:style-name="Source_20_Text">throws</text:span></text:span> en la cabecera → avisa de que este método puede lanzar esa excepción </text:p>
        </text:list-item>
        <text:list-item>
          <text:p text:style-name="P3"><text:span text:style-name="Strong_20_Emphasis"><text:span text:style-name="Source_20_Text">throw</text:span></text:span> dentro → es el momento exacto en que se lanza </text:p>
        </text:list-item>
      </text:list>
      <text:p text:style-name="Horizontal_20_Line"/>
      <text:h text:style-name="Heading_20_2" text:outline-level="2">3. Capturarla con <text:span text:style-name="Source_20_Text">try catch</text:span></text:h>
      <text:p text:style-name="Text_20_body">Donde llames al método, lo envuelves en un <text:span text:style-name="Source_20_Text">try catch</text:span>:</text:p>
      <text:p text:style-name="Preformatted_20_Text"><text:span text:style-name="Source_20_Text">try {</text:span></text:p>
      <text:p text:style-name="Preformatted_20_Text"><text:span text:style-name="Source_20_Text"><text:s text:c="4"/>Evento e = new Evento("Reunión", 25, 60); // hora 25 → salta la excepción</text:span></text:p>
      <text:p text:style-name="Preformatted_20_Text"><text:span text:style-name="Source_20_Text">} catch (HoraIncorrectaException e) {</text:span></text:p>
      <text:p text:style-name="Preformatted_20_Text"><text:span text:style-name="Source_20_Text"><text:s text:c="4"/>System.out.println("Error: " + e.getMessage());</text:span></text:p>
      <text:p text:style-name="Preformatted_20_Text"><text:span text:style-name="Source_20_Text"><text:s text:c="4"/>// el programa NO se para, continúa desde aquí</text:span></text:p>
      <text:p text:style-name="P1"><text:span text:style-name="Source_20_Text">}</text:span></text:p>
      <text:p text:style-name="Horizontal_20_Line"/>
      <text:h text:style-name="Heading_20_2" text:outline-level="2">Resumen del flujo</text:h>
      <text:p text:style-name="Preformatted_20_Text"><text:span text:style-name="Source_20_Text">setHora(25)</text:span></text:p>
      <text:p text:style-name="Preformatted_20_Text"><text:span text:style-name="Source_20_Text"><text:s text:c="4"/>→ hora &gt; 23</text:span></text:p>
      <text:p text:style-name="Preformatted_20_Text"><text:span text:style-name="Source_20_Text"><text:s text:c="4"/>→ throw new HoraIncorrectaException(...)</text:span></text:p>
      <text:p text:style-name="Preformatted_20_Text"><text:span text:style-name="Source_20_Text"><text:s text:c="4"/>→ salta al catch</text:span></text:p>
      <text:p text:style-name="Preformatted_20_Text"><text:span text:style-name="Source_20_Text"><text:s text:c="4"/>→ se muestra el mensaje</text:span></text:p>
      <text:p text:style-name="P1"><text:soft-page-break/><text:span text:style-name="Source_20_Text"><text:s text:c="4"/>→ el programa continúa con normalidad</text:span></text:p>
      <text:p text:style-name="Text_20_body">La clave es: <text:span text:style-name="Strong_20_Emphasis"><text:span text:style-name="Source_20_Text">throw</text:span></text:span> lanza, <text:span text:style-name="Strong_20_Emphasis"><text:span text:style-name="Source_20_Text">throws</text:span></text:span> avisa, <text:span text:style-name="Strong_20_Emphasis"><text:span text:style-name="Source_20_Text">catch</text:span></text:span> recog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13:02:31.080388300</meta:creation-date>
    <dc:date>2026-04-19T13:02:35.554944400</dc:date>
    <meta:editing-duration>PT4S</meta:editing-duration>
    <meta:editing-cycles>1</meta:editing-cycles>
    <meta:document-statistic meta:table-count="0" meta:image-count="0" meta:object-count="0" meta:page-count="2" meta:paragraph-count="35" meta:word-count="225" meta:character-count="1366" meta:non-whitespace-character-count="1108"/>
    <meta:generator>LibreOffice/25.8.5.2$Windows_X86_64 LibreOffice_project/9c8b85f387cc00a89945a79c9e6239f32e450ac2</meta:generator>
  </office:meta>
</office:document-meta>
</file>
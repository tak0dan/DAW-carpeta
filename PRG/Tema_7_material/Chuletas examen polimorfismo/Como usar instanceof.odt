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a1" style:family="table">
      <style:table-properties style:width="16.256cm" table:align="left"/>
    </style:style>
    <style:style style:name="Tabla1.A" style:family="table-column">
      <style:table-column-properties style:column-width="4.279cm"/>
    </style:style>
    <style:style style:name="Tabla1.B" style:family="table-column">
      <style:table-column-properties style:column-width="11.977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able_20_Heading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ource_20_Text">instanceof</text:span> en Java</text:h>
      <text:h text:style-name="Heading_20_2" text:outline-level="2">¿Para qué sirve?</text:h>
      <text:p text:style-name="Text_20_body">Sirve para <text:span text:style-name="Strong_20_Emphasis">preguntarle a un objeto de qué tipo es</text:span> en tiempo de ejecución. Te devuelve <text:span text:style-name="Source_20_Text">true</text:span> o <text:span text:style-name="Source_20_Text">false</text:span>.</text:p>
      <text:p text:style-name="Text_20_body">Imagínate que tienes una lista mezclada con Libros y Revistas, pero todos guardados como <text:span text:style-name="Source_20_Text">Publicacion</text:span>. Java no sabe en cada momento si el elemento que estás mirando es un Libro o una Revista — con <text:span text:style-name="Source_20_Text">instanceof</text:span> se lo preguntas.</text:p>
      <text:p text:style-name="Horizontal_20_Line"/>
      <text:h text:style-name="Heading_20_2" text:outline-level="2">¿Cuándo usarlo?</text:h>
      <text:p text:style-name="Text_20_body">Cuando tienes una <text:span text:style-name="Strong_20_Emphasis">lista de objetos del tipo padre</text:span> (o interfaz) pero necesitas tratar cada subclase de forma diferente. Por ejemplo:</text:p>
      <text:p text:style-name="Preformatted_20_Text"><text:span text:style-name="Source_20_Text">ArrayList&lt;Publicacion&gt; lista = new ArrayList&lt;&gt;();</text:span></text:p>
      <text:p text:style-name="Preformatted_20_Text"><text:span text:style-name="Source_20_Text">lista.add(new Libro(...));</text:span></text:p>
      <text:p text:style-name="Preformatted_20_Text"><text:span text:style-name="Source_20_Text">lista.add(new Revista(...));</text:span></text:p>
      <text:p text:style-name="P1"><text:span text:style-name="Source_20_Text">lista.add(new Libro(...));</text:span></text:p>
      <text:p text:style-name="Text_20_body">Aquí todos son <text:span text:style-name="Source_20_Text">Publicacion</text:span>, pero si quieres saber cuáles son libros y cuáles revistas, necesitas <text:span text:style-name="Source_20_Text">instanceof</text:span>.</text:p>
      <text:p text:style-name="Horizontal_20_Line"/>
      <text:h text:style-name="Heading_20_2" text:outline-level="2">¿Cómo se usa?</text:h>
      <text:p text:style-name="Text_20_body">La sintaxis es:</text:p>
      <text:p text:style-name="P1"><text:span text:style-name="Source_20_Text">objeto instanceof NombreDeLaClase</text:span></text:p>
      <text:p text:style-name="Text_20_body">Ejemplo paso a paso:</text:p>
      <text:p text:style-name="Preformatted_20_Text"><text:span text:style-name="Source_20_Text">for (int i = 0; i &lt; lista.size(); i++) {</text:span></text:p>
      <text:p text:style-name="Preformatted_20_Text"><text:span text:style-name="Source_20_Text"><text:s text:c="4"/>Publicacion p = lista.get(i);</text:span></text:p>
      <text:p text:style-name="Preformatted_20_Text"/>
      <text:p text:style-name="Preformatted_20_Text"><text:span text:style-name="Source_20_Text"><text:s text:c="4"/>if (p instanceof Libro) {</text:span></text:p>
      <text:p text:style-name="Preformatted_20_Text"><text:span text:style-name="Source_20_Text"><text:s text:c="8"/>// Aquí Java sabe que p ES un Libro</text:span></text:p>
      <text:p text:style-name="Preformatted_20_Text"><text:span text:style-name="Source_20_Text"><text:s text:c="8"/>// Pero aún lo tiene guardado como Publicacion</text:span></text:p>
      <text:p text:style-name="Preformatted_20_Text"><text:span text:style-name="Source_20_Text"><text:s text:c="8"/>// Así que hacemos un CAST para poder usar los métodos de Libro</text:span></text:p>
      <text:p text:style-name="Preformatted_20_Text"><text:span text:style-name="Source_20_Text"><text:s text:c="8"/>Libro l = (Libro) p;</text:span></text:p>
      <text:p text:style-name="Preformatted_20_Text"><text:span text:style-name="Source_20_Text"><text:s text:c="8"/>System.out.println(l.getAutor()); // ahora sí podemos llamar a getAutor()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if (p instanceof Revista) {</text:span></text:p>
      <text:p text:style-name="Preformatted_20_Text"><text:span text:style-name="Source_20_Text"><text:s text:c="8"/>Revista r = (Revista) p;</text:span></text:p>
      <text:p text:style-name="Preformatted_20_Text"><text:span text:style-name="Source_20_Text"><text:s text:c="8"/>System.out.println(r.getPeriodicidad())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2" text:outline-level="2"><text:soft-page-break/>¿Por qué necesitamos el cast después?</text:h>
      <text:p text:style-name="Text_20_body">Porque aunque <text:span text:style-name="Source_20_Text">instanceof</text:span> confirma que el objeto ES un Libro, Java lo sigue viendo como <text:span text:style-name="Source_20_Text">Publicacion</text:span>. El cast <text:span text:style-name="Source_20_Text">(Libro) p</text:span> le dice a Java <text:span text:style-name="Emphasis">"confía en mí, trátalo como Libro"</text:span> para poder usar sus métodos específicos.</text:p>
      <text:p text:style-name="Preformatted_20_Text"><text:span text:style-name="Source_20_Text">Publicacion p = new Libro(...);</text:span></text:p>
      <text:p text:style-name="Preformatted_20_Text"/>
      <text:p text:style-name="Preformatted_20_Text"><text:span text:style-name="Source_20_Text">p.getTitulo(); <text:s text:c="5"/>// ✅ esto sí, getTitulo() está en Publicacion</text:span></text:p>
      <text:p text:style-name="Preformatted_20_Text"><text:span text:style-name="Source_20_Text">p.getAutor(); <text:s text:c="6"/>// ❌ error, Java no sabe que es un Libro</text:span></text:p>
      <text:p text:style-name="Preformatted_20_Text"><text:span text:style-name="Source_20_Text"><text:s text:c="20"/></text:span></text:p>
      <text:p text:style-name="Preformatted_20_Text"><text:span text:style-name="Source_20_Text">if (p instanceof Libro) {</text:span></text:p>
      <text:p text:style-name="Preformatted_20_Text"><text:span text:style-name="Source_20_Text"><text:s text:c="4"/>Libro l = (Libro) p;</text:span></text:p>
      <text:p text:style-name="Preformatted_20_Text"><text:span text:style-name="Source_20_Text"><text:s text:c="4"/>l.getAutor(); <text:s text:c="2"/>// ✅ ahora sí, hemos hecho el cast</text:span></text:p>
      <text:p text:style-name="P1"><text:span text:style-name="Source_20_Text">}</text:span></text:p>
      <text:p text:style-name="Horizontal_20_Line"/>
      <text:h text:style-name="Heading_20_2" text:outline-level="2">Resumen rápido</text:h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2"/>
            </table:table-cell>
            <table:table-cell table:style-name="Tabla1.A1" office:value-type="string">
              <text:p text:style-name="P2"/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Qué hace</text:span></text:p>
          </table:table-cell>
          <table:table-cell table:style-name="Tabla1.A1" office:value-type="string">
            <text:p text:style-name="Table_20_Contents">Pregunta si un objeto es de un tipo concreto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Devuelve</text:span></text:p>
          </table:table-cell>
          <table:table-cell table:style-name="Tabla1.A1" office:value-type="string">
            <text:p text:style-name="Table_20_Contents"><text:span text:style-name="Source_20_Text">true</text:span> o <text:span text:style-name="Source_20_Text">false</text:span>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Cuándo usarlo</text:span></text:p>
          </table:table-cell>
          <table:table-cell table:style-name="Tabla1.A1" office:value-type="string">
            <text:p text:style-name="Table_20_Contents">Cuando tienes objetos mezclados de distintas subclases en una lista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Después del instanceof</text:span></text:p>
          </table:table-cell>
          <table:table-cell table:style-name="Tabla1.A1" office:value-type="string">
            <text:p text:style-name="Table_20_Contents">Casi siempre hay que hacer un cast para usar los métodos específico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9T12:20:31.560953500</meta:creation-date>
    <dc:date>2026-04-19T12:20:43.947212300</dc:date>
    <meta:editing-duration>PT12S</meta:editing-duration>
    <meta:editing-cycles>1</meta:editing-cycles>
    <meta:document-statistic meta:table-count="1" meta:image-count="0" meta:object-count="0" meta:page-count="2" meta:paragraph-count="48" meta:word-count="333" meta:character-count="2102" meta:non-whitespace-character-count="1698"/>
    <meta:generator>LibreOffice/25.8.5.2$Windows_X86_64 LibreOffice_project/9c8b85f387cc00a89945a79c9e6239f32e450ac2</meta:generator>
  </office:meta>
</office:document-meta>
</file>
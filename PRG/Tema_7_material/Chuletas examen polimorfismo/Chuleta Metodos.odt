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f0d5" officeooo:paragraph-rsid="0014f0d5"/>
    </style:style>
    <style:style style:name="P2" style:family="paragraph" style:parent-style-name="Heading_20_3">
      <style:text-properties officeooo:rsid="0014f0d5"/>
    </style:style>
    <style:style style:name="P3" style:family="paragraph" style:parent-style-name="Text_20_body">
      <style:text-properties officeooo:rsid="0014f0d5"/>
    </style:style>
    <style:style style:name="P4" style:family="paragraph" style:parent-style-name="Preformatted_20_Text">
      <style:text-properties officeooo:rsid="0014f0d5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14f0d5"/>
    </style:style>
    <style:style style:name="P6" style:family="paragraph" style:parent-style-name="Text_20_body" style:list-style-name="L1">
      <style:text-properties officeooo:rsid="0014f0d5"/>
    </style:style>
    <style:style style:name="P7" style:family="paragraph" style:parent-style-name="Text_20_body" style:list-style-name="L2">
      <style:text-properties officeooo:rsid="0014f0d5"/>
    </style:style>
    <style:style style:name="P8" style:family="paragraph" style:parent-style-name="Preformatted_20_Text">
      <style:paragraph-properties fo:margin-top="0cm" fo:margin-bottom="0.499cm" style:contextual-spacing="false"/>
      <style:text-properties style:font-name="Liberation Mono" fo:font-size="10pt" officeooo:rsid="0014f0d5" style:font-name-asian="NSimSun" style:font-size-asian="10pt" style:font-name-complex="Liberation Mono" style:font-size-complex="10pt"/>
    </style:style>
    <style:style style:name="P9" style:family="paragraph" style:parent-style-name="Heading_20_2">
      <style:paragraph-properties fo:margin-top="0cm" fo:margin-bottom="0.499cm" style:contextual-spacing="false"/>
      <style:text-properties style:font-name="Liberation Mono" fo:font-size="10pt" officeooo:rsid="0014f0d5" style:font-name-asian="NSimSun" style:font-size-asian="10pt" style:font-name-complex="Liberation Mono" style:font-size-complex="10pt"/>
    </style:style>
    <style:style style:name="P10" style:family="paragraph" style:parent-style-name="Text_20_body">
      <style:paragraph-properties fo:margin-top="0cm" fo:margin-bottom="0.499cm" style:contextual-spacing="false"/>
      <style:text-properties style:font-name="Liberation Mono" fo:font-size="10pt" officeooo:rsid="0014f0d5" style:font-name-asian="NSimSun" style:font-size-asian="10pt" style:font-name-complex="Liberation Mono" style:font-size-complex="10pt"/>
    </style:style>
    <style:style style:name="P11" style:family="paragraph" style:parent-style-name="Text_20_body" style:list-style-name="L3">
      <style:paragraph-properties fo:margin-top="0cm" fo:margin-bottom="0.499cm" style:contextual-spacing="false"/>
      <style:text-properties style:font-name="Liberation Mono" fo:font-size="10pt" officeooo:rsid="0014f0d5" style:font-name-asian="NSimSun" style:font-size-asian="10pt" style:font-name-complex="Liberation Mono" style:font-size-complex="10pt"/>
    </style:style>
    <style:style style:name="P12" style:family="paragraph" style:parent-style-name="Heading_20_3">
      <style:paragraph-properties fo:margin-top="0cm" fo:margin-bottom="0.499cm" style:contextual-spacing="false"/>
      <style:text-properties style:font-name="Liberation Mono" fo:font-size="10pt" officeooo:rsid="0014f0d5" style:font-name-asian="NSimSun" style:font-size-asian="10pt" style:font-name-complex="Liberation Mono" style:font-size-complex="10pt"/>
    </style:style>
    <style:style style:name="P13" style:family="paragraph" style:parent-style-name="Text_20_body" style:list-style-name="L4">
      <style:paragraph-properties fo:margin-top="0cm" fo:margin-bottom="0.499cm" style:contextual-spacing="false"/>
      <style:text-properties style:font-name="Liberation Mono" fo:font-size="10pt" officeooo:rsid="0014f0d5" style:font-name-asian="NSimSun" style:font-size-asian="10pt" style:font-name-complex="Liberation Mono" style:font-size-complex="10pt"/>
    </style:style>
    <style:style style:name="P14" style:family="paragraph" style:parent-style-name="Text_20_body" style:list-style-name="L5">
      <style:paragraph-properties fo:margin-top="0cm" fo:margin-bottom="0.499cm" style:contextual-spacing="false"/>
      <style:text-properties style:font-name="Liberation Mono" fo:font-size="10pt" officeooo:rsid="0014f0d5" style:font-name-asian="NSimSun" style:font-size-asian="10pt" style:font-name-complex="Liberation Mono" style:font-size-complex="10pt"/>
    </style:style>
    <style:style style:name="P15" style:family="paragraph" style:parent-style-name="Text_20_body" style:list-style-name="L6">
      <style:paragraph-properties fo:margin-top="0cm" fo:margin-bottom="0.499cm" style:contextual-spacing="false"/>
      <style:text-properties style:font-name="Liberation Mono" fo:font-size="10pt" officeooo:rsid="0014f0d5" style:font-name-asian="NSimSun" style:font-size-asian="10pt" style:font-name-complex="Liberation Mono" style:font-size-complex="10pt"/>
    </style:style>
    <style:style style:name="P16" style:family="paragraph" style:parent-style-name="Text_20_body" style:list-style-name="L7">
      <style:paragraph-properties fo:margin-top="0cm" fo:margin-bottom="0.499cm" style:contextual-spacing="false"/>
      <style:text-properties style:font-name="Liberation Mono" fo:font-size="10pt" officeooo:rsid="0014f0d5" style:font-name-asian="NSimSun" style:font-size-asian="10pt" style:font-name-complex="Liberation Mono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tilla metodos (por si acaso)</text:p>
      <text:p text:style-name="P1"/>
      <text:h text:style-name="P2" text:outline-level="3">Piensa en esta “plantilla mental”</text:h>
      <text:p text:style-name="P3">Todo método en Java sigue esta estructura básica:</text:p>
      <text:p text:style-name="P4"><text:span text:style-name="Source_20_Text">[modificador] tipoDeRetorno nombreMetodo(parámetros) {</text:span></text:p>
      <text:p text:style-name="P4"><text:span text:style-name="Source_20_Text"><text:s text:c="4"/>// código</text:span></text:p>
      <text:p text:style-name="P4"><text:span text:style-name="Source_20_Text"><text:s text:c="4"/>return valor;</text:span></text:p>
      <text:p text:style-name="P5"><text:span text:style-name="Source_20_Text">}</text:span></text:p>
      <text:h text:style-name="P2" text:outline-level="3"><text:s/>Truco fácil: “<text:span text:style-name="Strong_20_Emphasis">Qué hace + qué recibe + qué devuelve</text:span>”</text:h>
      <text:p text:style-name="P3">Antes de escribir el método, responde mentalmente:</text:p>
      <text:list text:style-name="L1">
        <text:list-item>
          <text:p text:style-name="P6"><text:span text:style-name="Strong_20_Emphasis">¿Qué hace?</text:span> → nombre claro del método</text:p>
        </text:list-item>
        <text:list-item>
          <text:p text:style-name="P6"><text:span text:style-name="Strong_20_Emphasis">¿Qué recibe?</text:span> → parámetros</text:p>
        </text:list-item>
        <text:list-item>
          <text:p text:style-name="P6"><text:span text:style-name="Strong_20_Emphasis">¿Qué devuelve?</text:span> → tipo de retorno</text:p>
        </text:list-item>
      </text:list>
      <text:h text:style-name="P2" text:outline-level="3"/>
      <text:h text:style-name="P2" text:outline-level="3"><text:s/>Ejemplo práctico</text:h>
      <text:p text:style-name="P3"><text:s/>Quieres un método que sume dos números:</text:p>
      <text:list text:style-name="L2">
        <text:list-item>
          <text:p text:style-name="P7">Qué hace → sumar → <text:span text:style-name="Source_20_Text">sumar</text:span></text:p>
        </text:list-item>
        <text:list-item>
          <text:p text:style-name="P7">Qué recibe → dos números → <text:span text:style-name="Source_20_Text">(int a, int b)</text:span></text:p>
        </text:list-item>
        <text:list-item>
          <text:p text:style-name="P7">Qué devuelve → un número → <text:span text:style-name="Source_20_Text">int</text:span></text:p>
        </text:list-item>
      </text:list>
      <text:p text:style-name="P3">Entonces:</text:p>
      <text:p text:style-name="P4"><text:span text:style-name="Source_20_Text">public int sumar(int a, int b) {</text:span></text:p>
      <text:p text:style-name="P4"><text:span text:style-name="Source_20_Text"><text:s text:c="4"/>return a + b;</text:span></text:p>
      <text:p text:style-name="P5"><text:span text:style-name="Source_20_Text">}</text:span></text:p>
      <text:h text:style-name="P2" text:outline-level="3">Otro truco: usa nombres descriptivos</text:h>
      <text:p text:style-name="P3">Evita cosas como:</text:p>
      <text:p text:style-name="P5"><text:span text:style-name="Source_20_Text">int x(int a, int b)</text:span></text:p>
      <text:p text:style-name="P3">Mejor:</text:p>
      <text:p text:style-name="P5"><text:span text:style-name="Source_20_Text">int calcularSuma(int a, int b)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8"/>
      <text:h text:style-name="P9" text:outline-level="2"><text:soft-page-break/><text:s/>Método con <text:span text:style-name="Source_20_Text">void</text:span></text:h>
      <text:p text:style-name="P10"><text:s/>Quieres un método que <text:span text:style-name="Strong_20_Emphasis">muestre un mensaje por pantalla</text:span></text:p>
      <text:list text:style-name="L3">
        <text:list-item>
          <text:p text:style-name="P11">Qué hace → mostrar saludo → <text:span text:style-name="Source_20_Text">saludar</text:span></text:p>
        </text:list-item>
        <text:list-item>
          <text:p text:style-name="P11">Qué recibe → un nombre → <text:span text:style-name="Source_20_Text">(String nombre)</text:span></text:p>
        </text:list-item>
        <text:list-item>
          <text:p text:style-name="P11">Qué devuelve → <text:span text:style-name="Strong_20_Emphasis">nada</text:span> → <text:span text:style-name="Source_20_Text">void</text:span></text:p>
        </text:list-item>
      </text:list>
      <text:p text:style-name="P10">Entonces:</text:p>
      <text:p text:style-name="P5"><text:span text:style-name="Source_20_Text">public void saludar(String nombre) {</text:span></text:p>
      <text:p text:style-name="P5"><text:span text:style-name="Source_20_Text"><text:s text:c="4"/>System.out.println("Hola " + nombre);</text:span></text:p>
      <text:p text:style-name="P5"><text:span text:style-name="Source_20_Text">}</text:span></text:p>
      <text:h text:style-name="P12" text:outline-level="3"/>
      <text:h text:style-name="P12" text:outline-level="3"><text:s/>Idea clave</text:h>
      <text:list text:style-name="L4">
        <text:list-item>
          <text:p text:style-name="P13"><text:span text:style-name="Source_20_Text">void</text:span> = <text:span text:style-name="Strong_20_Emphasis">no devuelve nada</text:span></text:p>
        </text:list-item>
        <text:list-item>
          <text:p text:style-name="P13">Hace algo (imprime, modifica datos, etc.), pero no usa <text:span text:style-name="Source_20_Text">return</text:span> con valor</text:p>
        </text:list-item>
      </text:list>
      <text:h text:style-name="P9" text:outline-level="2"/>
      <text:h text:style-name="P9" text:outline-level="2"><text:s/>Método <text:span text:style-name="Source_20_Text">static</text:span></text:h>
      <text:p text:style-name="P10"><text:s/>Quieres un método que sume dos números <text:span text:style-name="Strong_20_Emphasis">sin crear un objeto</text:span></text:p>
      <text:list text:style-name="L5">
        <text:list-item>
          <text:p text:style-name="P14">Qué hace → sumar → <text:span text:style-name="Source_20_Text">sumar</text:span></text:p>
        </text:list-item>
        <text:list-item>
          <text:p text:style-name="P14">Qué recibe → dos números → <text:span text:style-name="Source_20_Text">(int a, int b)</text:span></text:p>
        </text:list-item>
        <text:list-item>
          <text:p text:style-name="P14">Qué devuelve → un número → <text:span text:style-name="Source_20_Text">int</text:span></text:p>
        </text:list-item>
        <text:list-item>
          <text:p text:style-name="P14">Extra → es <text:span text:style-name="Source_20_Text">static</text:span> porque no depende de un objeto</text:p>
        </text:list-item>
      </text:list>
      <text:p text:style-name="P10">Entonces:</text:p>
      <text:p text:style-name="P5"><text:span text:style-name="Source_20_Text">public static int sumar(int a, int b) {</text:span></text:p>
      <text:p text:style-name="P5"><text:span text:style-name="Source_20_Text"><text:s text:c="4"/>return a + b;</text:span></text:p>
      <text:p text:style-name="P5"><text:span text:style-name="Source_20_Text">}</text:span></text:p>
      <text:h text:style-name="P12" text:outline-level="3"/>
      <text:p text:style-name="P10"/>
      <text:p text:style-name="P10"/>
      <text:h text:style-name="P12" text:outline-level="3"><text:soft-page-break/><text:s/>Idea clave</text:h>
      <text:list text:style-name="L6">
        <text:list-item>
          <text:p text:style-name="P15"><text:span text:style-name="Source_20_Text">static</text:span> = pertenece a la clase, no al objeto</text:p>
        </text:list-item>
        <text:list-item>
          <text:p text:style-name="P15">Se puede usar directamente así:</text:p>
        </text:list-item>
      </text:list>
      <text:p text:style-name="P5"><text:span text:style-name="Source_20_Text">int resultado = MiClase.sumar(3, 5);</text:span></text:p>
      <text:p text:style-name="P10">(Sin hacer <text:span text:style-name="Source_20_Text">new MiClase()</text:span>)</text:p>
      <text:h text:style-name="P9" text:outline-level="2"/>
      <text:h text:style-name="P9" text:outline-level="2"><text:s/>Truco mental final</text:h>
      <text:list text:style-name="L7">
        <text:list-item>
          <text:p text:style-name="P16"><text:span text:style-name="Source_20_Text">void</text:span> → “hace pero no devuelve”</text:p>
        </text:list-item>
        <text:list-item>
          <text:p text:style-name="P16"><text:span text:style-name="Source_20_Text">static</text:span> → “lo puedo usar sin crear objeto”</text:p>
        </text:list-item>
      </text:list>
      <text:p text:style-name="P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11:35:56.153021000</meta:creation-date>
    <dc:date>2026-04-19T11:38:26.691601100</dc:date>
    <meta:editing-duration>PT2M30S</meta:editing-duration>
    <meta:editing-cycles>1</meta:editing-cycles>
    <meta:document-statistic meta:table-count="0" meta:image-count="0" meta:object-count="0" meta:page-count="3" meta:paragraph-count="56" meta:word-count="309" meta:character-count="1616" meta:non-whitespace-character-count="1352"/>
    <meta:generator>LibreOffice/25.8.5.2$Windows_X86_64 LibreOffice_project/9c8b85f387cc00a89945a79c9e6239f32e450ac2</meta:generator>
  </office:meta>
</office:document-meta>
</file>
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fo:margin-top="0cm" fo:margin-bottom="0.499cm" style:contextual-spacing="false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>
      <style:paragraph-properties fo:break-before="page"/>
    </style:style>
    <style:style style:name="P5" style:family="paragraph" style:parent-style-name="Text_20_body" style:list-style-name="L3"/>
    <style:style style:name="P6" style:family="paragraph" style:parent-style-name="Text_20_body" style:list-style-name="L4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Aquí tienes un <text:span text:style-name="Strong_20_Emphasis">ejemplo completo y claro de una interfaz en Java</text:span> 👇</text:p>
      <text:p text:style-name="Horizontal_20_Line"/>
      <text:h text:style-name="Heading_20_1" text:outline-level="1">🧠 Ejemplo sencillo de interfaz</text:h>
      <text:h text:style-name="Heading_20_2" text:outline-level="2">🔹 1. Crear la interfaz</text:h>
      <text:p text:style-name="Preformatted_20_Text"><text:span text:style-name="Source_20_Text">interface Animal {</text:span></text:p>
      <text:p text:style-name="Preformatted_20_Text"><text:span text:style-name="Source_20_Text"><text:s text:c="4"/>void hacerSonido();</text:span></text:p>
      <text:p text:style-name="P1"><text:span text:style-name="Source_20_Text">}</text:span></text:p>
      <text:p text:style-name="Text_20_body">👉 Esto solo define una regla:<text:line-break/>“Cualquier animal debe poder hacer sonido”</text:p>
      <text:p text:style-name="Horizontal_20_Line"/>
      <text:h text:style-name="Heading_20_2" text:outline-level="2">🔹 2. Clase que implementa la interfaz</text:h>
      <text:p text:style-name="Preformatted_20_Text"><text:span text:style-name="Source_20_Text">class Perro implements Animal {</text:span></text:p>
      <text:p text:style-name="Preformatted_20_Text"/>
      <text:p text:style-name="Preformatted_20_Text"><text:span text:style-name="Source_20_Text"><text:s text:c="4"/>public void hacerSonido() {</text:span></text:p>
      <text:p text:style-name="Preformatted_20_Text"><text:span text:style-name="Source_20_Text"><text:s text:c="8"/>System.out.println("Guau");</text:span></text:p>
      <text:p text:style-name="Preformatted_20_Text"><text:span text:style-name="Source_20_Text"><text:s text:c="4"/>}</text:span></text:p>
      <text:p text:style-name="P1"><text:span text:style-name="Source_20_Text">}</text:span></text:p>
      <text:p text:style-name="Preformatted_20_Text"><text:span text:style-name="Source_20_Text">class Gato implements Animal {</text:span></text:p>
      <text:p text:style-name="Preformatted_20_Text"/>
      <text:p text:style-name="Preformatted_20_Text"><text:span text:style-name="Source_20_Text"><text:s text:c="4"/>public void hacerSonido() {</text:span></text:p>
      <text:p text:style-name="Preformatted_20_Text"><text:span text:style-name="Source_20_Text"><text:s text:c="8"/>System.out.println("Miau");</text:span></text:p>
      <text:p text:style-name="Preformatted_20_Text"><text:span text:style-name="Source_20_Text"><text:s text:c="4"/>}</text:span></text:p>
      <text:p text:style-name="P1"><text:span text:style-name="Source_20_Text">}</text:span></text:p>
      <text:p text:style-name="Horizontal_20_Line"/>
      <text:h text:style-name="Heading_20_2" text:outline-level="2">🔹 3. Programa principal</text:h>
      <text:p text:style-name="Preformatted_20_Text"><text:span text:style-name="Source_20_Text">public class Main {</text:span></text:p>
      <text:p text:style-name="Preformatted_20_Text"><text:span text:style-name="Source_20_Text"><text:s text:c="4"/>public static void main(String[] args) {</text:span></text:p>
      <text:p text:style-name="Preformatted_20_Text"/>
      <text:p text:style-name="Preformatted_20_Text"><text:span text:style-name="Source_20_Text"><text:s text:c="8"/>Animal a1 = new Perro();</text:span></text:p>
      <text:p text:style-name="Preformatted_20_Text"><text:span text:style-name="Source_20_Text"><text:s text:c="8"/>Animal a2 = new Gato();</text:span></text:p>
      <text:p text:style-name="Preformatted_20_Text"/>
      <text:p text:style-name="Preformatted_20_Text"><text:span text:style-name="Source_20_Text"><text:s text:c="8"/>a1.hacerSonido();</text:span></text:p>
      <text:p text:style-name="Preformatted_20_Text"><text:span text:style-name="Source_20_Text"><text:s text:c="8"/>a2.hacerSonido();</text:span></text:p>
      <text:p text:style-name="Preformatted_20_Text"><text:span text:style-name="Source_20_Text"><text:s text:c="4"/>}</text:span></text:p>
      <text:p text:style-name="P1"><text:span text:style-name="Source_20_Text">}</text:span></text:p>
      <text:p text:style-name="Horizontal_20_Line"/>
      <text:h text:style-name="Heading_20_1" text:outline-level="1">🔍 ¿Qué pasa aquí?</text:h>
      <text:list text:style-name="L1">
        <text:list-item>
          <text:p text:style-name="P2"><text:span text:style-name="Source_20_Text">Animal</text:span> es la interfaz (la regla)</text:p>
        </text:list-item>
        <text:list-item>
          <text:p text:style-name="P2"><text:span text:style-name="Source_20_Text">Perro</text:span> y <text:span text:style-name="Source_20_Text">Gato</text:span> la cumplen</text:p>
        </text:list-item>
        <text:list-item>
          <text:p text:style-name="P2"><text:soft-page-break/>Cada uno hace el sonido a su manera</text:p>
        </text:list-item>
      </text:list>
      <text:p text:style-name="Horizontal_20_Line"/>
      <text:h text:style-name="Heading_20_1" text:outline-level="1">🎯 Salida del programa</text:h>
      <text:p text:style-name="Preformatted_20_Text"><text:span text:style-name="Source_20_Text">Guau</text:span></text:p>
      <text:p text:style-name="P1"><text:span text:style-name="Source_20_Text">Miau</text:span></text:p>
      <text:p text:style-name="Horizontal_20_Line"/>
      <text:h text:style-name="Heading_20_1" text:outline-level="1">🧠 Idea fácil</text:h>
      <text:list text:style-name="L2">
        <text:list-item>
          <text:p text:style-name="P3">🧾 Interfaz = lo que hay que hacer</text:p>
        </text:list-item>
        <text:list-item>
          <text:p text:style-name="P3">🏗️ Clase = cómo se hace</text:p>
        </text:list-item>
        <text:list-item>
          <text:p text:style-name="P3">🔁 Java decide cuál usar en tiempo de ejecución (polimorfismo)</text:p>
        </text:list-item>
      </text:list>
      <text:p text:style-name="Horizontal_20_Line"/>
      <text:h text:style-name="Heading_20_1" text:outline-level="1">💡 Frase de examen</text:h>
      <text:p text:style-name="Quotations">Una interfaz en Java define métodos que deben ser implementados por las clases que la usan.</text:p>
      <text:p text:style-name="Horizontal_20_Line"/>
      <text:p text:style-name="Text_20_body">Si quieres, te puedo hacer un ejercicio tipo examen donde tengas que crear tú la interfaz paso a paso 👍</text:p>
      <text:p text:style-name="Standard"/>
      <text:p text:style-name="P4">Vas bastante bien con la idea, pero hay un matiz importante: <text:span text:style-name="Strong_20_Emphasis">una interfaz no “guarda métodos” ni es un bloc de notas</text:span>. Te lo aclaro de forma simple 👇</text:p>
      <text:p text:style-name="Horizontal_20_Line"/>
      <text:h text:style-name="Heading_20_1" text:outline-level="1">🧠 Qué es realmente una interfaz</text:h>
      <text:p text:style-name="Text_20_body">Una <text:span text:style-name="Strong_20_Emphasis">interfaz</text:span> es como un <text:span text:style-name="Strong_20_Emphasis">contrato o lista de obligaciones</text:span>.</text:p>
      <text:p text:style-name="Text_20_body">👉 No tiene la implementación (no dice cómo se hacen las cosas)<text:line-break/>👉 Solo dice <text:span text:style-name="Strong_20_Emphasis">qué métodos deben existir</text:span></text:p>
      <text:p text:style-name="Horizontal_20_Line"/>
      <text:h text:style-name="Heading_20_1" text:outline-level="1">❌ Corrección de tu idea</text:h>
      <text:p text:style-name="Quotations">“una notepad que crea métodos y los guarda…”</text:p>
      <text:p text:style-name="Text_20_body">❌ No guarda métodos<text:line-break/>❌ No tiene lógica dentro (normalmente)</text:p>
      <text:p text:style-name="Horizontal_20_Line"/>
      <text:h text:style-name="Heading_20_1" text:outline-level="1">✅ La idea correcta</text:h>
      <text:p text:style-name="Text_20_body">👉 Es como decir:</text:p>
      <text:p text:style-name="Quotations">“Si quieres ser una clase que implementa esta interfaz, tienes que tener estos métodos”</text:p>
      <text:p text:style-name="Horizontal_20_Line"/>
      <text:h text:style-name="Heading_20_1" text:outline-level="1">🧪 Ejemplo claro</text:h>
      <text:h text:style-name="Heading_20_2" text:outline-level="2">🔹 Interfaz (solo reglas)</text:h>
      <text:p text:style-name="Preformatted_20_Text"><text:span text:style-name="Source_20_Text">interface Vehiculo {</text:span></text:p>
      <text:p text:style-name="Preformatted_20_Text"><text:span text:style-name="Source_20_Text"><text:s text:c="4"/>void acelerar();</text:span></text:p>
      <text:p text:style-name="Preformatted_20_Text"><text:span text:style-name="Source_20_Text"><text:s text:c="4"/>void frenar();</text:span></text:p>
      <text:p text:style-name="P1"><text:span text:style-name="Source_20_Text">}</text:span></text:p>
      <text:p text:style-name="Text_20_body">👉 Aquí NO hay código real, solo “obligaciones”</text:p>
      <text:p text:style-name="Horizontal_20_Line"/>
      <text:h text:style-name="Heading_20_2" text:outline-level="2">🔹 Clase hija (implementa la interfaz)</text:h>
      <text:p text:style-name="Preformatted_20_Text"><text:span text:style-name="Source_20_Text">class Coche implements Vehiculo {</text:span></text:p>
      <text:p text:style-name="Preformatted_20_Text"/>
      <text:p text:style-name="Preformatted_20_Text"><text:span text:style-name="Source_20_Text"><text:s text:c="4"/>public void acelerar() {</text:span></text:p>
      <text:p text:style-name="Preformatted_20_Text"><text:span text:style-name="Source_20_Text"><text:s text:c="8"/>System.out.println("El coche acelera");</text:span></text:p>
      <text:p text:style-name="Preformatted_20_Text"><text:span text:style-name="Source_20_Text"><text:s text:c="4"/>}</text:span></text:p>
      <text:p text:style-name="Preformatted_20_Text"><text:soft-page-break/></text:p>
      <text:p text:style-name="Preformatted_20_Text"><text:span text:style-name="Source_20_Text"><text:s text:c="4"/>public void frenar() {</text:span></text:p>
      <text:p text:style-name="Preformatted_20_Text"><text:span text:style-name="Source_20_Text"><text:s text:c="8"/>System.out.println("El coche frena");</text:span></text:p>
      <text:p text:style-name="Preformatted_20_Text"><text:span text:style-name="Source_20_Text"><text:s text:c="4"/>}</text:span></text:p>
      <text:p text:style-name="P1"><text:span text:style-name="Source_20_Text">}</text:span></text:p>
      <text:p text:style-name="Horizontal_20_Line"/>
      <text:h text:style-name="Heading_20_2" text:outline-level="2">🔹 Uso</text:h>
      <text:p text:style-name="Preformatted_20_Text"><text:span text:style-name="Source_20_Text">public class Main {</text:span></text:p>
      <text:p text:style-name="Preformatted_20_Text"><text:span text:style-name="Source_20_Text"><text:s text:c="4"/>public static void main(String[] args) {</text:span></text:p>
      <text:p text:style-name="Preformatted_20_Text"><text:span text:style-name="Source_20_Text"><text:s text:c="8"/>Vehiculo v = new Coche();</text:span></text:p>
      <text:p text:style-name="Preformatted_20_Text"/>
      <text:p text:style-name="Preformatted_20_Text"><text:span text:style-name="Source_20_Text"><text:s text:c="8"/>v.acelerar();</text:span></text:p>
      <text:p text:style-name="Preformatted_20_Text"><text:span text:style-name="Source_20_Text"><text:s text:c="8"/>v.frenar();</text:span></text:p>
      <text:p text:style-name="Preformatted_20_Text"><text:span text:style-name="Source_20_Text"><text:s text:c="4"/>}</text:span></text:p>
      <text:p text:style-name="P1"><text:span text:style-name="Source_20_Text">}</text:span></text:p>
      <text:p text:style-name="Horizontal_20_Line"/>
      <text:h text:style-name="Heading_20_1" text:outline-level="1">🧠 Forma fácil de entenderlo</text:h>
      <text:h text:style-name="Heading_20_3" text:outline-level="3">📄 Interfaz = contrato</text:h>
      <text:p text:style-name="Quotations">“Tienes que hacer esto sí o sí”</text:p>
      <text:h text:style-name="Heading_20_3" text:outline-level="3">🏗️ Clase = ejecución real</text:h>
      <text:p text:style-name="Quotations">“Así es como lo hago yo”</text:p>
      <text:p text:style-name="Horizontal_20_Line"/>
      <text:h text:style-name="Heading_20_1" text:outline-level="1">🔑 Importante (esto es clave)</text:h>
      <text:list text:style-name="L3">
        <text:list-item>
          <text:p text:style-name="P5">La interfaz <text:span text:style-name="Strong_20_Emphasis">NO se usa directamente</text:span></text:p>
        </text:list-item>
        <text:list-item>
          <text:p text:style-name="P5">Las clases son las que la “cumplen”</text:p>
        </text:list-item>
        <text:list-item>
          <text:p text:style-name="P5">Sirve para <text:span text:style-name="Strong_20_Emphasis">polimorfismo y organización del código</text:span></text:p>
        </text:list-item>
      </text:list>
      <text:p text:style-name="Horizontal_20_Line"/>
      <text:h text:style-name="Heading_20_1" text:outline-level="1">🎯 Resumen simple</text:h>
      <text:p text:style-name="Text_20_body">👉 Una interfaz:</text:p>
      <text:list text:style-name="L4">
        <text:list-item>
          <text:p text:style-name="P6">No guarda métodos</text:p>
        </text:list-item>
        <text:list-item>
          <text:p text:style-name="P6">No ejecuta código (en general)</text:p>
        </text:list-item>
        <text:list-item>
          <text:p text:style-name="P6">Obliga a las clases a implementarlos</text:p>
        </text:list-item>
      </text:list>
      <text:p text:style-name="Horizontal_20_Line"/>
      <text:p text:style-name="Text_20_body"><text:soft-page-break/>Si quieres, puedo explicarte la diferencia entre <text:span text:style-name="Strong_20_Emphasis">interfaz vs clase abstracta</text:span>, que es la típica pregunta de examen donde la gente se lía 👍</text:p>
      <text:p text:style-name="Standard"/>
      <text:p text:style-name="Standard"/>
      <text:p text:style-name="Standard"/>
      <text:p text:style-name="Text_20_body">Si lo quieres expresar <text:span text:style-name="Strong_20_Emphasis">con tu misma idea pero bien dicho y correcto</text:span>, lo podrías decir así:</text:p>
      <text:p text:style-name="Quotations">“Una interfaz es como una plantilla o lista de métodos que no tiene el código hecho, y las clases que la usan están obligadas a crear esos métodos y darles funcionalidad.”</text:p>
      <text:p text:style-name="Horizontal_20_Line"/>
      <text:p text:style-name="Text_20_body">O aún más parecido a lo que tú dijiste:</text:p>
      <text:p text:style-name="Quotations">“Una interfaz es como una especie de plantilla donde se definen métodos sin implementarlos, y luego las clases hijas los utilizan y los programan a su manera.”</text:p>
      <text:p text:style-name="Horizontal_20_Line"/>
      <text:p text:style-name="Text_20_body">Y en versión muy simple:</text:p>
      <text:p text:style-name="Quotations">“Es como una lista de métodos que las clases tienen que hacer sí o sí, pero cada una los hace a su manera.”</text:p>
      <text:p text:style-name="Horizontal_20_Line"/>
      <text:p text:style-name="Text_20_body">Tu idea iba bien encaminada 👍, solo faltaba ajustar que <text:span text:style-name="Strong_20_Emphasis">no guarda métodos con código</text:span>, sino que <text:span text:style-name="Strong_20_Emphasis">los obliga a existir</text:span>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4-20T22:33:04.588779900</meta:creation-date>
    <dc:date>2026-04-20T22:33:34.393315700</dc:date>
    <meta:editing-duration>PT30S</meta:editing-duration>
    <meta:editing-cycles>1</meta:editing-cycles>
    <meta:document-statistic meta:table-count="0" meta:image-count="0" meta:object-count="0" meta:page-count="5" meta:paragraph-count="97" meta:word-count="618" meta:character-count="3495" meta:non-whitespace-character-count="2838"/>
    <meta:generator>LibreOffice/25.8.5.2$Windows_X86_64 LibreOffice_project/9c8b85f387cc00a89945a79c9e6239f32e450ac2</meta:generator>
  </office:meta>
</office:document-meta>
</file>
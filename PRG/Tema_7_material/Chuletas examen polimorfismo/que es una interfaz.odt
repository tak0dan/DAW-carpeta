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796cm" table:align="left"/>
    </style:style>
    <style:style style:name="Tabla1.A" style:family="table-column">
      <style:table-column-properties style:column-width="3.69cm"/>
    </style:style>
    <style:style style:name="Tabla1.B" style:family="table-column">
      <style:table-column-properties style:column-width="4.10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na <text:span text:style-name="Strong_20_Emphasis">interfaz en Java</text:span> es como un <text:span text:style-name="Strong_20_Emphasis">contrato</text:span> que dice qué cosas debe hacer una clase, pero <text:span text:style-name="Strong_20_Emphasis">sin decir cómo se hacen</text:span>.</text:p>
      <text:p text:style-name="Horizontal_20_Line"/>
      <text:h text:style-name="Heading_20_1" text:outline-level="1">🧠 Explicación muy simple</text:h>
      <text:p text:style-name="Text_20_body">👉 Una interfaz es como una lista de reglas:</text:p>
      <text:p text:style-name="Quotations">“Si quieres usarme, tienes que tener estos métodos”</text:p>
      <text:p text:style-name="Horizontal_20_Line"/>
      <text:h text:style-name="Heading_20_1" text:outline-level="1">📦 Ejemplo fácil</text:h>
      <text:h text:style-name="Heading_20_2" text:outline-level="2">🔹 Interfaz</text:h>
      <text:p text:style-name="Preformatted_20_Text"><text:span text:style-name="Source_20_Text">interface Animal {</text:span></text:p>
      <text:p text:style-name="Preformatted_20_Text"><text:span text:style-name="Source_20_Text"><text:s text:c="4"/>void hacerSonido();</text:span></text:p>
      <text:p text:style-name="P1"><text:span text:style-name="Source_20_Text">}</text:span></text:p>
      <text:p text:style-name="Text_20_body">👉 Esto NO tiene código dentro, solo la “regla”.</text:p>
      <text:p text:style-name="Horizontal_20_Line"/>
      <text:h text:style-name="Heading_20_2" text:outline-level="2">🔹 Clase que la usa</text:h>
      <text:p text:style-name="Preformatted_20_Text"><text:span text:style-name="Source_20_Text">class Perro implements Animal {</text:span></text:p>
      <text:p text:style-name="Preformatted_20_Text"/>
      <text:p text:style-name="Preformatted_20_Text"><text:span text:style-name="Source_20_Text"><text:s text:c="4"/>public void hacerSonido() {</text:span></text:p>
      <text:p text:style-name="Preformatted_20_Text"><text:span text:style-name="Source_20_Text"><text:s text:c="8"/>System.out.println("Guau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🔹 Programa principal</text:h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nimal a = new Perro();</text:span></text:p>
      <text:p text:style-name="Preformatted_20_Text"><text:span text:style-name="Source_20_Text"><text:s text:c="8"/>a.hacerSonid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1" text:outline-level="1">🔍 ¿Qué está pasando?</text:h>
      <text:list text:style-name="L1">
        <text:list-item>
          <text:p text:style-name="P2">La interfaz dice: “tienes que tener <text:span text:style-name="Source_20_Text">hacerSonido()</text:span>”</text:p>
        </text:list-item>
        <text:list-item>
          <text:p text:style-name="P2">La clase <text:span text:style-name="Source_20_Text">Perro</text:span> <text:span text:style-name="Strong_20_Emphasis">obliga a implementar ese método</text:span></text:p>
        </text:list-item>
        <text:list-item>
          <text:p text:style-name="P2"><text:soft-page-break/>Java permite usar <text:span text:style-name="Source_20_Text">Animal</text:span> como tipo general (polimorfismo)</text:p>
        </text:list-item>
      </text:list>
      <text:p text:style-name="Horizontal_20_Line"/>
      <text:h text:style-name="Heading_20_1" text:outline-level="1">🧠 Forma fácil de entenderlo</text:h>
      <text:h text:style-name="Heading_20_3" text:outline-level="3">🧾 Interfaz = contrato</text:h>
      <text:list text:style-name="L2">
        <text:list-item>
          <text:p text:style-name="P3">“Si quieres ser esto, tienes que hacer esto”</text:p>
        </text:list-item>
      </text:list>
      <text:h text:style-name="Heading_20_3" text:outline-level="3">🏗️ Clase = la construcción real</text:h>
      <text:list text:style-name="L3">
        <text:list-item>
          <text:p text:style-name="P4">“Yo hago cómo se hace”</text:p>
        </text:list-item>
      </text:list>
      <text:p text:style-name="Horizontal_20_Line"/>
      <text:h text:style-name="Heading_20_1" text:outline-level="1">⚖️ Diferencia con clase normal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lase</text:p>
            </table:table-cell>
            <table:table-cell table:style-name="Tabla1.A1" office:value-type="string">
              <text:p text:style-name="Table_20_Heading">Interfaz</text:p>
            </table:table-cell>
          </table:table-row>
        </table:table-header-rows>
        <table:table-row>
          <table:table-cell table:style-name="Tabla1.A1" office:value-type="string">
            <text:p text:style-name="Table_20_Contents">Tiene código</text:p>
          </table:table-cell>
          <table:table-cell table:style-name="Tabla1.A1" office:value-type="string">
            <text:p text:style-name="Table_20_Contents">Solo define métodos</text:p>
          </table:table-cell>
        </table:table-row>
        <table:table-row>
          <table:table-cell table:style-name="Tabla1.A1" office:value-type="string">
            <text:p text:style-name="Table_20_Contents">Puedes crear objetos</text:p>
          </table:table-cell>
          <table:table-cell table:style-name="Tabla1.A1" office:value-type="string">
            <text:p text:style-name="Table_20_Contents">No se puede instanciar</text:p>
          </table:table-cell>
        </table:table-row>
        <table:table-row>
          <table:table-cell table:style-name="Tabla1.A1" office:value-type="string">
            <text:p text:style-name="Table_20_Contents">Implementa lógica</text:p>
          </table:table-cell>
          <table:table-cell table:style-name="Tabla1.A1" office:value-type="string">
            <text:p text:style-name="Table_20_Contents">Solo obliga a cumplir</text:p>
          </table:table-cell>
        </table:table-row>
      </table:table>
      <text:p text:style-name="Horizontal_20_Line"/>
      <text:h text:style-name="Heading_20_1" text:outline-level="1">🎯 Ejemplo de la vida real</text:h>
      <text:p text:style-name="Text_20_body">Imagina una interfaz:</text:p>
      <text:p text:style-name="Text_20_body">👉 “Vehículo”</text:p>
      <text:p text:style-name="Text_20_body">Reglas:</text:p>
      <text:list text:style-name="L4">
        <text:list-item>
          <text:p text:style-name="P5">tiene que acelerar</text:p>
        </text:list-item>
        <text:list-item>
          <text:p text:style-name="P5">tiene que frenar</text:p>
        </text:list-item>
      </text:list>
      <text:p text:style-name="Text_20_body">Da igual si es coche o moto:</text:p>
      <text:list text:style-name="L5">
        <text:list-item>
          <text:p text:style-name="P6">cada uno lo hace a su manera</text:p>
        </text:list-item>
      </text:list>
      <text:p text:style-name="Horizontal_20_Line"/>
      <text:h text:style-name="Heading_20_1" text:outline-level="1">💡 Frase de examen</text:h>
      <text:p text:style-name="Quotations">Una interfaz define un conjunto de métodos que una clase debe implementar, sin especificar su implementación.</text:p>
      <text:p text:style-name="Horizontal_20_Line"/>
      <text:p text:style-name="Text_20_body">Si quieres, te puedo enseñar:</text:p>
      <text:list text:style-name="L6">
        <text:list-item>
          <text:p text:style-name="P7">interfaces con varios métodos</text:p>
        </text:list-item>
        <text:list-item>
          <text:p text:style-name="P7"><text:soft-page-break/>diferencias con clases abstractas (muy típico de examen)</text:p>
        </text:list-item>
        <text:list-item>
          <text:p text:style-name="P7">o ejercicios tipo test para practicar 👍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53:05.117454800</meta:creation-date>
    <dc:date>2026-04-20T20:53:10.642570100</dc:date>
    <meta:editing-duration>PT5S</meta:editing-duration>
    <meta:editing-cycles>1</meta:editing-cycles>
    <meta:document-statistic meta:table-count="1" meta:image-count="0" meta:object-count="0" meta:page-count="3" meta:paragraph-count="55" meta:word-count="268" meta:character-count="1523" meta:non-whitespace-character-count="1277"/>
    <meta:generator>LibreOffice/25.8.5.2$Windows_X86_64 LibreOffice_project/9c8b85f387cc00a89945a79c9e6239f32e450ac2</meta:generator>
  </office:meta>
</office:document-meta>
</file>
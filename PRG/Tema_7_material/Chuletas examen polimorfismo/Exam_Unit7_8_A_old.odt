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2000000900007D5E000048996112B63E.svm" manifest:media-type="image/x-svm"/>
  <manifest:file-entry manifest:full-path="Pictures/100000000000008100000040568B7EB6.png" manifest:media-type="image/png"/>
  <manifest:file-entry manifest:full-path="Pictures/10000001000004BE000002BF232421F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ヒラギノ角ゴ Pro W3" svg:font-family="'ヒラギノ角ゴ Pro W3'" style:font-family-generic="roman"/>
  </office:font-face-decls>
  <office:automatic-styles>
    <style:style style:name="P1" style:family="paragraph" style:parent-style-name="Header" style:list-style-name="L1">
      <style:paragraph-properties fo:text-align="justify" style:justify-single-word="false"/>
      <style:text-properties style:font-name="Times New Roman" fo:font-weight="normal" officeooo:rsid="003d49ba" officeooo:paragraph-rsid="003d49ba" style:font-weight-asian="normal" style:font-weight-complex="normal"/>
    </style:style>
    <style:style style:name="P2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3d49ba" officeooo:paragraph-rsid="003d49ba" style:font-size-asian="12pt" style:font-weight-asian="normal" style:font-weight-complex="normal"/>
    </style:style>
    <style:style style:name="P3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3f170a" officeooo:paragraph-rsid="003f170a" style:font-size-asian="12pt" style:font-weight-asian="normal" style:font-weight-complex="normal"/>
    </style:style>
    <style:style style:name="P4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5aa400" officeooo:paragraph-rsid="003f170a" style:font-size-asian="12pt" style:font-weight-asian="normal" style:font-weight-complex="normal"/>
    </style:style>
    <style:style style:name="P5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aa400" officeooo:paragraph-rsid="005aa400" style:font-size-asian="12pt" style:font-weight-asian="normal" style:font-weight-complex="normal"/>
    </style:style>
    <style:style style:name="P6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b2ae2" officeooo:paragraph-rsid="0060b61a" style:font-size-asian="12pt" style:font-weight-asian="normal" style:font-size-complex="12pt" style:font-weight-complex="normal"/>
    </style:style>
    <style:style style:name="P7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 text:number-lines="false" text:line-number="0">
        <style:tab-stops>
          <style:tab-stop style:position="0.968cm"/>
          <style:tab-stop style:position="1.981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b2ae2" officeooo:paragraph-rsid="00537280" style:font-size-asian="12pt" style:font-weight-asian="normal" style:font-size-complex="12pt" style:font-weight-complex="normal"/>
    </style:style>
    <style:style style:name="P8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b2ae2" officeooo:paragraph-rsid="00537280" style:font-size-asian="12pt" style:font-weight-asian="normal" style:font-size-complex="12pt" style:font-weight-complex="normal"/>
    </style:style>
    <style:style style:name="P9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 text:number-lines="false" text:line-number="0">
        <style:tab-stops>
          <style:tab-stop style:position="0.968cm"/>
          <style:tab-stop style:position="1.981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3083a" officeooo:paragraph-rsid="00537280" style:font-size-asian="10.5pt" style:font-weight-asian="normal" style:font-size-complex="12pt" style:font-weight-complex="normal"/>
    </style:style>
    <style:style style:name="P10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3083a" officeooo:paragraph-rsid="0053083a" style:font-size-asian="10.5pt" style:font-weight-asian="normal" style:font-size-complex="12pt" style:font-weight-complex="normal"/>
    </style:style>
    <style:style style:name="P11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12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13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aa400" officeooo:paragraph-rsid="005aa400" style:font-size-asian="10.5pt" style:font-weight-asian="normal" style:font-size-complex="12pt" style:font-weight-complex="normal"/>
    </style:style>
    <style:style style:name="P14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3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30ab4" officeooo:paragraph-rsid="005aa400" style:font-size-asian="10.5pt" style:font-weight-asian="normal" style:font-size-complex="12pt" style:font-weight-complex="normal"/>
    </style:style>
    <style:style style:name="P15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3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16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3.99cm"/>
          <style:tab-stop style:position="8.5cm" style:type="center"/>
          <style:tab-stop style:position="17cm" style:type="right"/>
        </style:tab-stops>
      </style:paragraph-properties>
      <style:text-properties officeooo:paragraph-rsid="005aa400"/>
    </style:style>
    <style:style style:name="P17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3.992cm"/>
          <style:tab-stop style:position="5.006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18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09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19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38cm"/>
          <style:tab-stop style:position="4.946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aa400" style:font-size-asian="10.5pt" style:font-weight-asian="normal" style:font-size-complex="12pt" style:font-weight-complex="normal"/>
    </style:style>
    <style:style style:name="P20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21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1d4c6" officeooo:paragraph-rsid="0053083a" style:font-size-asian="10.5pt" style:font-weight-asian="normal" style:font-size-complex="12pt" style:font-weight-complex="normal"/>
    </style:style>
    <style:style style:name="P22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3083a" officeooo:paragraph-rsid="0053083a" style:font-size-asian="10.5pt" style:font-weight-asian="normal" style:font-size-complex="12pt" style:font-weight-complex="normal"/>
    </style:style>
    <style:style style:name="P23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aa400" officeooo:paragraph-rsid="005aa400" style:font-size-asian="12pt" style:font-weight-asian="normal" style:font-size-complex="12pt" style:font-weight-complex="normal"/>
    </style:style>
    <style:style style:name="P24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30ab4" officeooo:paragraph-rsid="00530ab4" style:font-size-asian="12pt" style:font-weight-asian="normal" style:font-size-complex="12pt" style:font-weight-complex="normal"/>
    </style:style>
    <style:style style:name="P25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officeooo:rsid="00537280" officeooo:paragraph-rsid="00537280"/>
    </style:style>
    <style:style style:name="P26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37280" officeooo:paragraph-rsid="00537280" style:font-size-asian="12pt" style:font-weight-asian="normal" style:font-size-complex="12pt" style:font-weight-complex="normal"/>
    </style:style>
    <style:style style:name="P27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monospace" fo:font-size="8.39999961853027pt" fo:language="es" fo:country="ES" fo:font-weight="normal" officeooo:rsid="00530ab4" officeooo:paragraph-rsid="00537280" style:font-size-asian="12pt" style:font-weight-asian="normal" style:font-size-complex="12pt" style:font-weight-complex="normal"/>
    </style:style>
    <style:style style:name="P28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officeooo:rsid="00537280" officeooo:paragraph-rsid="00537280"/>
    </style:style>
    <style:style style:name="P29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officeooo:rsid="00537280" officeooo:paragraph-rsid="00537280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Head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968cm"/>
          <style:tab-stop style:position="1.981cm"/>
          <style:tab-stop style:position="2.979cm"/>
          <style:tab-stop style:position="4.068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30ab4" officeooo:paragraph-rsid="00537280" style:font-size-asian="12pt" style:font-weight-asian="normal" style:font-size-complex="12pt" style:font-weight-complex="normal"/>
    </style:style>
    <style:style style:name="T1" style:family="text">
      <style:text-properties fo:font-size="12pt" fo:language="es" fo:country="ES" officeooo:rsid="00537280" style:font-size-asian="12pt"/>
    </style:style>
    <style:style style:name="T2" style:family="text">
      <style:text-properties fo:font-size="12pt" fo:language="es" fo:country="ES" officeooo:rsid="005b2ae2" style:font-size-asian="12pt"/>
    </style:style>
    <style:style style:name="T3" style:family="text">
      <style:text-properties fo:font-size="12pt" fo:language="es" fo:country="ES" officeooo:rsid="00316aa7" style:font-size-asian="12pt"/>
    </style:style>
    <style:style style:name="T4" style:family="text">
      <style:text-properties fo:font-size="12pt" fo:language="es" fo:country="ES" style:font-size-asian="12pt"/>
    </style:style>
    <style:style style:name="T5" style:family="text">
      <style:text-properties officeooo:rsid="0060b61a"/>
    </style:style>
    <style:style style:name="T6" style:family="text">
      <style:text-properties officeooo:rsid="005b2ae2" style:font-size-asian="12pt"/>
    </style:style>
    <style:style style:name="T7" style:family="text">
      <style:text-properties officeooo:rsid="0051d4c6" style:font-size-asian="12pt"/>
    </style:style>
    <style:style style:name="T8" style:family="text">
      <style:text-properties officeooo:rsid="00537280" style:font-size-asian="12pt"/>
    </style:style>
    <style:style style:name="T9" style:family="text">
      <style:text-properties style:font-size-asian="12pt"/>
    </style:style>
    <style:style style:name="T10" style:family="text">
      <style:text-properties officeooo:rsid="00563a0f"/>
    </style:style>
    <style:style style:name="T11" style:family="text">
      <style:text-properties officeooo:rsid="005aa400"/>
    </style:style>
    <style:style style:name="T12" style:family="text">
      <style:text-properties officeooo:rsid="005b2ae2"/>
    </style:style>
    <style:style style:name="T13" style:family="text">
      <style:text-properties style:font-name="monospace" fo:font-size="8.39999961853027pt" fo:language="es" fo:country="ES" fo:font-weight="normal" officeooo:rsid="0051d4c6" style:font-size-asian="10.5pt" style:font-weight-asian="normal" style:font-size-complex="12pt" style:font-weight-complex="normal"/>
    </style:style>
    <style:style style:name="T14" style:family="text">
      <style:text-properties style:font-name="monospace" fo:font-size="8.39999961853027pt" fo:language="es" fo:country="ES" fo:font-weight="normal" officeooo:rsid="00530ab4" style:font-size-asian="10.5pt" style:font-weight-asian="normal" style:font-size-complex="12pt" style:font-weight-complex="normal"/>
    </style:style>
    <style:style style:name="T15" style:family="text">
      <style:text-properties style:font-name="monospace" fo:font-size="8.39999961853027pt" fo:language="es" fo:country="ES" fo:font-weight="normal" officeooo:rsid="005aa400" style:font-size-asian="10.5pt" style:font-weight-asian="normal" style:font-size-complex="12pt" style:font-weight-complex="normal"/>
    </style:style>
    <style:style style:name="T16" style:family="text">
      <style:text-properties style:font-name="monospace" fo:font-size="8.39999961853027pt"/>
    </style:style>
    <style:style style:name="T17" style:family="text">
      <style:text-properties style:font-name="monospace" fo:font-size="8.39999961853027pt" officeooo:rsid="0053083a"/>
    </style:style>
    <style:style style:name="T18" style:family="text">
      <style:text-properties officeooo:rsid="00530ab4"/>
    </style:style>
    <style:style style:name="T19" style:family="text">
      <style:text-properties style:font-name="monospace" fo:font-size="8.39999961853027pt" officeooo:rsid="005b2ae2" style:font-size-asian="10.5pt"/>
    </style:style>
    <style:style style:name="T20" style:family="text">
      <style:text-properties style:font-name="Times New Roman" fo:font-size="12pt" fo:language="es" fo:country="ES" fo:font-weight="normal" officeooo:rsid="00530ab4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language="es" fo:country="ES" fo:font-weight="normal" style:font-size-asian="12pt" style:font-weight-asian="normal" style:font-size-complex="12pt" style:font-weight-complex="normal"/>
    </style:style>
    <style:style style:name="T22" style:family="text">
      <style:text-properties style:font-name="monospace" fo:font-size="8.39999961853027pt" fo:language="es" fo:country="ES" fo:font-weight="normal" officeooo:rsid="00530ab4" style:font-size-asian="12pt" style:font-weight-asian="normal" style:font-size-complex="12pt" style:font-weight-complex="normal"/>
    </style:style>
    <style:style style:name="T23" style:family="text">
      <style:text-properties style:font-name="monospace" fo:font-size="8.39999961853027pt" fo:language="es" fo:country="ES" fo:font-weight="normal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language="es" fo:country="ES" officeooo:rsid="00530ab4" style:font-size-asian="12pt" style:font-size-complex="12pt"/>
    </style:style>
    <style:style style:name="T25" style:family="text">
      <style:text-properties fo:font-size="12pt" fo:language="es" fo:country="ES" officeooo:rsid="00530ab4" style:font-size-asian="12pt" style:font-size-complex="12pt"/>
    </style:style>
    <style:style style:name="T26" style:family="text">
      <style:text-properties fo:font-size="12pt" fo:language="es" fo:country="ES" fo:font-weight="normal" officeooo:rsid="00530ab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( </text:span><text:span text:style-name="T2">8.75 </text:span><text:span text:style-name="T1">points) </text:span><text:span text:style-name="T3">G</text:span><text:span text:style-name="T4">iven the following UML Diagram:</text:span></text:p>
        </text:list-item>
      </text:list>
      <text:p text:style-name="P2"/>
      <text:p text:style-name="P3"><draw:frame draw:style-name="fr1" draw:name="Imagen2" text:anchor-type="char" svg:x="-0.333cm" svg:y="0cm" svg:width="17cm" svg:height="9.056cm" draw:z-index="8"><draw:image xlink:href="Pictures/2000000900007D5E000048996112B63E.svm" xlink:type="simple" xlink:show="embed" xlink:actuate="onLoad" draw:mime-type="image/x-svm"/><draw:image xlink:href="Pictures/10000001000004BE000002BF232421FA.png" xlink:type="simple" xlink:show="embed" xlink:actuate="onLoad" draw:mime-type="image/png"/></draw:frame></text:p>
      <text:p text:style-name="P4"><text:s text:c="2"/>a. (1,5 puntos) Implementa todas las clases y la interfaz. <text:line-break/> b. (2 puntos) En otra clase (PublicacionesTester), crea un método estático con esta firma:<text:line-break/> <text:line-break/> public static void cuantosLibrosCuantasRevistas(ArrayList &lt;Publicacion&gt; l)<text:line-break/><text:line-break/>El método debe mostrar cuántos libros y cuántas revistas hay en la ArrayList l que recibe como parámetro. De los libros, también debe indicar cuántos de ellos se encuentran en la biblioteca1 (no están prestados en ese momento). Podría ser algo así:<text:line-break/> Hay 4 revistas y 6 libros; solo 2 de estos libros se encuentran actualmente en la biblioteca<text:line-break/><text:line-break/> c. (2 puntos) Implementa los métodos equals y compareTo (sobrescribiéndolos) en la clase Publicacion. Dos publicaciones son iguales si tienen el mismo código y también se ordenarán teniendo en cuenta ese código (que es numérico).<text:line-break/> d. (1,5 puntos) Escribe un método main (en PublicacionesTester) que cree una ArrayList de publicaciones y le añada 10 elementos (no solicites la información, insértalos con literales). Inserta algunas revistas (menos de 5) y algunos libros (más de 5). Solo algunos de los libros deben estar prestados. Llama al método creado en la parte b, con la ArrayList que acabas de crear<text:line-break/> e. (1 punto) En el mismo main, después de realizar la parte d, ordena la ArrayList y muéstrala tras ordenarla.<text:line-break/><text:line-break/> <text:span text:style-name="T5">f.</text:span>(0,75 puntos) Escribe el código del método de la parte b, pero utilizando un iterador para recorrer la ArrayList. Cambia el nombre del método para que pueda estar en la misma clase.<text:line-break/></text:p>
      <text:p text:style-name="P5"/>
      <text:p text:style-name="P5"/>
      <text:p text:style-name="P6"><text:soft-page-break/>// Prestable.java</text:p>
      <text:p text:style-name="P6">public interface Prestable {</text:p>
      <text:p text:style-name="P6"><text:s text:c="4"/>void prestar();</text:p>
      <text:p text:style-name="P6"><text:s text:c="4"/>void devolver();</text:p>
      <text:p text:style-name="P6"><text:s text:c="4"/>boolean estaDisponible();</text:p>
      <text:p text:style-name="P6">}</text:p>
      <text:p text:style-name="P6"/>
      <text:p text:style-name="P6">// Publicacion.java</text:p>
      <text:p text:style-name="P6">public abstract class Publicacion implements Comparable&lt;Publicacion&gt; {</text:p>
      <text:p text:style-name="P6"><text:s text:c="4"/>private int codigo;</text:p>
      <text:p text:style-name="P6"><text:s text:c="4"/>private String titulo;</text:p>
      <text:p text:style-name="P6"/>
      <text:p text:style-name="P6"><text:s text:c="4"/>public Publicacion(int codigo, String titulo) {</text:p>
      <text:p text:style-name="P6"><text:s text:c="8"/>this.codigo = codigo;</text:p>
      <text:p text:style-name="P6"><text:s text:c="8"/>this.titulo = titulo;</text:p>
      <text:p text:style-name="P6"><text:s text:c="4"/>}</text:p>
      <text:p text:style-name="P6"/>
      <text:p text:style-name="P6"><text:s text:c="4"/>public int getCodigo() { return codigo; }</text:p>
      <text:p text:style-name="P6"><text:s text:c="4"/>public String getTitulo() { return titulo; }</text:p>
      <text:p text:style-name="P6"/>
      <text:p text:style-name="P6"><text:s text:c="4"/>@Override</text:p>
      <text:p text:style-name="P6"><text:s text:c="4"/>public boolean equals(Object o) {</text:p>
      <text:p text:style-name="P6"><text:s text:c="8"/>if (this == o) return true;</text:p>
      <text:p text:style-name="P6"><text:s text:c="8"/>if (!(o instanceof Publicacion)) return false;</text:p>
      <text:p text:style-name="P6"><text:s text:c="8"/>return this.codigo == ((Publicacion) o).codigo;</text:p>
      <text:p text:style-name="P6"><text:s text:c="4"/>}</text:p>
      <text:p text:style-name="P6"/>
      <text:p text:style-name="P6"><text:s text:c="4"/>@Override</text:p>
      <text:p text:style-name="P6"><text:s text:c="4"/>public int compareTo(Publicacion otra) {</text:p>
      <text:p text:style-name="P6"><text:s text:c="8"/>return Integer.compare(this.codigo, otra.codigo);</text:p>
      <text:p text:style-name="P6"><text:s text:c="4"/>}</text:p>
      <text:p text:style-name="P6"/>
      <text:p text:style-name="P6"><text:s text:c="4"/>@Override</text:p>
      <text:p text:style-name="P6"><text:s text:c="4"/>public String toString() {</text:p>
      <text:p text:style-name="P6"><text:s text:c="8"/>return "Publicacion[codigo=" + codigo + ", titulo=" + titulo + "]";</text:p>
      <text:p text:style-name="P6"><text:s text:c="4"/>}</text:p>
      <text:p text:style-name="P6">}</text:p>
      <text:p text:style-name="P6"/>
      <text:p text:style-name="P6"/>
      <text:p text:style-name="P7">// Libro.java</text:p>
      <text:p text:style-name="P8">public class Libro extends Publicacion implements Prestable {</text:p>
      <text:p text:style-name="P8"><text:s text:c="4"/>private String autor;</text:p>
      <text:p text:style-name="P8"><text:s text:c="4"/>private boolean prestado;</text:p>
      <text:p text:style-name="P8"/>
      <text:p text:style-name="P8"><text:s text:c="4"/>public Libro(int codigo, String titulo, String autor) {</text:p>
      <text:p text:style-name="P8"><text:s text:c="8"/>super(codigo, titulo);</text:p>
      <text:p text:style-name="P8"><text:s text:c="8"/>this.prestado = false;</text:p>
      <text:p text:style-name="P8"><text:s text:c="4"/>}</text:p>
      <text:p text:style-name="P8"/>
      <text:p text:style-name="P8"><text:s text:c="4"/>@Override</text:p>
      <text:p text:style-name="P8"><text:s text:c="4"/>public void prestar() {</text:p>
      <text:p text:style-name="P8"><text:s text:c="8"/>this.prestado = true;</text:p>
      <text:p text:style-name="P8"><text:s text:c="4"/>}</text:p>
      <text:p text:style-name="P8"/>
      <text:p text:style-name="P8"><text:s text:c="4"/>@Override</text:p>
      <text:p text:style-name="P8"><text:s text:c="4"/>public void devolver() {</text:p>
      <text:p text:style-name="P8"><text:s text:c="8"/>this.prestado = false;</text:p>
      <text:p text:style-name="P8"><text:s text:c="4"/>}</text:p>
      <text:p text:style-name="P8"/>
      <text:p text:style-name="P8"><text:s text:c="4"/>@Override</text:p>
      <text:p text:style-name="P8"><text:s text:c="4"/>public boolean estaDisponible() {</text:p>
      <text:p text:style-name="P8"><text:s text:c="8"/>return !prestado;</text:p>
      <text:p text:style-name="P8"><text:s text:c="4"/>}</text:p>
      <text:p text:style-name="P8"/>
      <text:p text:style-name="P8"><text:s text:c="4"/>public String getAutor() { return autor; }</text:p>
      <text:p text:style-name="P8"/>
      <text:p text:style-name="P8"><text:s text:c="4"/>@Override</text:p>
      <text:p text:style-name="P8"><text:s text:c="4"/>public String toString() {</text:p>
      <text:p text:style-name="P8"><text:s text:c="8"/>return "Libro[codigo=" + getCodigo() + ", titulo=" + getTitulo() +</text:p>
      <text:p text:style-name="P8"><text:s text:c="15"/>", autor=" + autor + ", prestado=" + prestado + "]";</text:p>
      <text:p text:style-name="P8"><text:s text:c="4"/>}</text:p>
      <text:p text:style-name="P8">}</text:p>
      <text:p text:style-name="P8"/>
      <text:p text:style-name="P8"/>
      <text:p text:style-name="P8">// Revista.java</text:p>
      <text:p text:style-name="P8">public class Revista extends Publicacion {</text:p>
      <text:p text:style-name="P8"><text:s text:c="4"/>private String periodicidad;</text:p>
      <text:p text:style-name="P8"/>
      <text:p text:style-name="P8"><text:s text:c="4"/>public Revista(int codigo, String titulo, String periodicidad) {</text:p>
      <text:p text:style-name="P8"><text:s text:c="8"/>super(codigo, titulo);</text:p>
      <text:p text:style-name="P8"><text:s text:c="8"/>this.periodicidad = periodicidad;</text:p>
      <text:p text:style-name="P8"><text:s text:c="4"/>}</text:p>
      <text:p text:style-name="P8"/>
      <text:p text:style-name="P8"><text:s text:c="4"/>public String getPeriodicidad() { return periodicidad; }</text:p>
      <text:p text:style-name="P8"/>
      <text:p text:style-name="P8"><text:s text:c="4"/>@Override</text:p>
      <text:p text:style-name="P8"><text:soft-page-break/><text:s text:c="4"/>public String toString() {</text:p>
      <text:p text:style-name="P8"><text:s text:c="8"/>return "Revista[codigo=" + getCodigo() + ", titulo=" + getTitulo() +</text:p>
      <text:p text:style-name="P8"><text:s text:c="15"/>", periodicidad=" + periodicidad + "]";</text:p>
      <text:p text:style-name="P8"><text:s text:c="4"/>}</text:p>
      <text:p text:style-name="P8">}</text:p>
      <text:p text:style-name="P8"/>
      <text:p text:style-name="P8"/>
      <text:p text:style-name="P8">public static void cuantosLibrosCuantasRevistas(ArrayList&lt;Publicacion&gt; l) {</text:p>
      <text:p text:style-name="P8"><text:s text:c="4"/>int numLibros = 0;</text:p>
      <text:p text:style-name="P8"><text:s text:c="4"/>int numRevistas = 0;</text:p>
      <text:p text:style-name="P8"><text:s text:c="4"/>int librosEnBiblioteca = 0;</text:p>
      <text:p text:style-name="P8"/>
      <text:p text:style-name="P8"><text:s text:c="4"/>for (Publicacion p : l) {</text:p>
      <text:p text:style-name="P8"><text:s text:c="8"/>if (p instanceof Libro) {</text:p>
      <text:p text:style-name="P8"><text:s text:c="12"/>numLibros++;</text:p>
      <text:p text:style-name="P8"><text:s text:c="12"/>if (((Libro) p).estaDisponible()) {</text:p>
      <text:p text:style-name="P8"><text:s text:c="16"/>librosEnBiblioteca++;</text:p>
      <text:p text:style-name="P8"><text:s text:c="12"/>}</text:p>
      <text:p text:style-name="P8"><text:s text:c="8"/>} else if (p instanceof Revista) {</text:p>
      <text:p text:style-name="P8"><text:s text:c="12"/>numRevistas++;</text:p>
      <text:p text:style-name="P8"><text:s text:c="8"/>}</text:p>
      <text:p text:style-name="P8"><text:s text:c="4"/>}</text:p>
      <text:p text:style-name="P8"/>
      <text:p text:style-name="P8"><text:s text:c="4"/>System.out.println("There are " + numRevistas + " magazines and " +</text:p>
      <text:p text:style-name="P8"><text:s text:c="23"/>numLibros + " books; only " + librosEnBiblioteca +</text:p>
      <text:p text:style-name="P8"><text:s text:c="23"/>" of these books are currently at the library");</text:p>
      <text:p text:style-name="P8">}</text:p>
      <text:p text:style-name="P8"/>
      <text:p text:style-name="P8"/>
      <text:p text:style-name="P8">public static void main(String[] args) {</text:p>
      <text:p text:style-name="P8"><text:s text:c="8"/>ArrayList&lt;Publicacion&gt; lista = new ArrayList&lt;&gt;();</text:p>
      <text:p text:style-name="P8"/>
      <text:p text:style-name="P8"><text:s text:c="8"/>// 3 revistas</text:p>
      <text:p text:style-name="P8"><text:s text:c="8"/>lista.add(new Revista(3, "National Geographic", "mensual"));</text:p>
      <text:p text:style-name="P8"><text:s text:c="8"/>lista.add(new Revista(7, "El País Semanal", "semanal"));</text:p>
      <text:p text:style-name="P8"><text:s text:c="8"/>lista.add(new Revista(11, "Time", "semanal"));</text:p>
      <text:p text:style-name="P8"/>
      <text:p text:style-name="P8"><text:s text:c="8"/>// 7 libros (algunos prestados)</text:p>
      <text:p text:style-name="P8"><text:s text:c="8"/>lista.add(new Libro(1, "Don Quijote", "Cervantes", false));</text:p>
      <text:p text:style-name="P8"><text:s text:c="8"/>lista.add(new Libro(2, "1984", "Orwell", true));</text:p>
      <text:p text:style-name="P8"><text:s text:c="8"/>lista.add(new Libro(5, "El Principito", "Saint-Exupéry", false));</text:p>
      <text:p text:style-name="P8"><text:s text:c="8"/>lista.add(new Libro(6, "Cien Años de Soledad", "García Márquez", true));</text:p>
      <text:p text:style-name="P8"><text:s text:c="8"/>lista.add(new Libro(8, "Harry Potter", "Rowling", false));</text:p>
      <text:p text:style-name="P8"><text:s text:c="8"/>lista.add(new Libro(9, "La Odisea", "Homero", true));</text:p>
      <text:p text:style-name="P8"><text:s text:c="8"/>lista.add(new Libro(10, "Hamlet", "Shakespeare", false));</text:p>
      <text:p text:style-name="P8"/>
      <text:p text:style-name="P8"><text:s text:c="8"/>// Llamada al método b)</text:p>
      <text:p text:style-name="P8"><text:soft-page-break/><text:s text:c="8"/>cuantosLibrosCuantasRevistas(lista);</text:p>
      <text:p text:style-name="P8"/>
      <text:p text:style-name="P8"><text:s text:c="8"/>// e) Ordenar y mostrar</text:p>
      <text:p text:style-name="P8"><text:s text:c="8"/>java.util.Collections.sort(lista);</text:p>
      <text:p text:style-name="P8"><text:s text:c="8"/>System.out.println("\nLista ordenada:");</text:p>
      <text:p text:style-name="P8"><text:s text:c="8"/>for (Publicacion p : lista) {</text:p>
      <text:p text:style-name="P8"><text:s text:c="12"/>System.out.println(p);</text:p>
      <text:p text:style-name="P8"><text:s text:c="8"/>}</text:p>
      <text:p text:style-name="P8"><text:s text:c="4"/>}</text:p>
      <text:p text:style-name="P8"/>
      <text:p text:style-name="P8"/>
      <text:p text:style-name="P8"/>
      <text:p text:style-name="P8">public static void cuantosLibrosCuantasRevistasIterator(ArrayList&lt;Publicacion&gt; l) {</text:p>
      <text:p text:style-name="P8"><text:s text:c="8"/>int numLibros = 0;</text:p>
      <text:p text:style-name="P8"><text:s text:c="8"/>int numRevistas = 0;</text:p>
      <text:p text:style-name="P8"><text:s text:c="8"/>int librosEnBiblioteca = 0;</text:p>
      <text:p text:style-name="P8"/>
      <text:p text:style-name="P8"><text:s text:c="8"/>java.util.Iterator&lt;Publicacion&gt; it = l.iterator();</text:p>
      <text:p text:style-name="P8"><text:s text:c="8"/>while (it.hasNext()) {</text:p>
      <text:p text:style-name="P8"><text:s text:c="12"/>Publicacion p = it.next();</text:p>
      <text:p text:style-name="P8"><text:s text:c="12"/>if (p instanceof Libro) {</text:p>
      <text:p text:style-name="P8"><text:s text:c="16"/>numLibros++;</text:p>
      <text:p text:style-name="P8"><text:s text:c="16"/>if (!((Libro) p).isPrestado()) librosEnBiblioteca++;</text:p>
      <text:p text:style-name="P8"><text:s text:c="12"/>} else if (p instanceof Revista) {</text:p>
      <text:p text:style-name="P8"><text:s text:c="16"/>numRevistas++;</text:p>
      <text:p text:style-name="P8"><text:s text:c="12"/>}</text:p>
      <text:p text:style-name="P8"><text:s text:c="8"/>}</text:p>
      <text:p text:style-name="P8"/>
      <text:p text:style-name="P8"><text:s text:c="8"/>System.out.println("There are " + numRevistas + " magazines and " +</text:p>
      <text:p text:style-name="P8"><text:s text:c="27"/>numLibros + " books; only " + librosEnBiblioteca +</text:p>
      <text:p text:style-name="P8"><text:s text:c="27"/>" of these books are currently at the library");</text:p>
      <text:p text:style-name="P8"><text:s text:c="4"/>}</text:p>
      <text:p text:style-name="P8">} // fin de PublicacionesTester</text:p>
      <text:p text:style-name="P8"/>
      <text:p text:style-name="P8"/>
      <text:p text:style-name="P8"/>
      <text:p text:style-name="P9"><text:span text:style-name="T6">2</text:span><text:span text:style-name="T7">. </text:span><text:span text:style-name="T8">(1.</text:span><text:span text:style-name="T6">2</text:span><text:span text:style-name="T8">5 points) </text:span><text:span text:style-name="T7">Given the </text:span><text:span text:style-name="T9">following code:</text:span></text:p>
      <text:p text:style-name="P10"><text:s/></text:p>
      <text:p text:style-name="P11"><text:tab/>interface Procesable {</text:p>
      <text:p text:style-name="P11"><text:tab/><text:tab/>void procesar(); </text:p>
      <text:p text:style-name="P11"><text:tab/>}</text:p>
      <text:p text:style-name="P11"><text:tab/>class A implements Procesable{</text:p>
      <text:p text:style-name="P11"><text:tab/><text:tab/>void procesar() { </text:p>
      <text:p text:style-name="P12"><text:tab/><text:tab/><text:tab/>System.out.println("Procesando A");<text:span text:style-name="T10">}</text:span></text:p>
      <text:p text:style-name="P12"><text:tab/>}</text:p>
      <text:p text:style-name="P12"><text:tab/>class B implements Procesable {</text:p>
      <text:p text:style-name="P12"><text:tab/><text:tab/>void procesar() { </text:p>
      <text:p text:style-name="P12"><text:tab/><text:tab/><text:tab/>System.out.println("Procesando B"); </text:p>
      <text:p text:style-name="P12"><text:tab/><text:tab/>}</text:p>
      <text:p text:style-name="P12"><text:tab/>}</text:p>
      <text:p text:style-name="P12"><text:tab/>class Cuestion {</text:p>
      <text:p text:style-name="P13"><text:tab/><text:tab/></text:p>
      <text:p text:style-name="P12"><text:tab/><text:tab/>public static void main(String[] args){</text:p>
      <text:p text:style-name="P12"><text:tab/><text:tab/><text:tab/><text:span text:style-name="T11">ArrayList &lt;</text:span>Procesable&gt; <text:span text:style-name="T11">li</text:span> <text:span text:style-name="T11">= new ArrayList &lt;Procesable&gt;</text:span><text:span text:style-name="T12">()</text:span>;</text:p>
      <text:p text:style-name="P13"><text:tab/><text:tab/><text:tab/>Procesable p=null;</text:p>
      <text:p text:style-name="P14"><text:tab/><text:tab/><text:tab/>Random r = new Random();</text:p>
      <text:p text:style-name="P13"><text:tab/><text:tab/><text:tab/>for (int i= 1; i&lt;=10; i++){</text:p>
      <text:p text:style-name="P15"><text:tab/><text:tab/><text:tab/><text:tab/><text:tab/><text:tab/></text:p>
      <text:p text:style-name="P16"><text:span text:style-name="T13"><text:tab/><text:tab/><text:tab/><text:tab/>if(</text:span><text:span text:style-name="T14">r.ne</text:span><text:span text:style-name="T15">xt</text:span><text:span text:style-name="T14">Double()&gt;0.5</text:span><text:span text:style-name="T13">)</text:span></text:p>
      <text:p text:style-name="P17"><text:tab/><text:tab/><text:tab/><text:tab/><text:tab/><text:span text:style-name="T11">li.add(</text:span>new A()<text:span text:style-name="T11">)</text:span>;</text:p>
      <text:p text:style-name="P18"><text:tab/><text:tab/><text:tab/><text:tab/>else</text:p>
      <text:p text:style-name="P19"><text:tab/><text:tab/><text:tab/><text:tab/><text:tab/><text:span text:style-name="T11">li.add(</text:span>new <text:span text:style-name="T11">B</text:span>()<text:span text:style-name="T11">)</text:span>;</text:p>
      <text:p text:style-name="P19"><text:tab/><text:tab/><text:tab/><text:span text:style-name="T11">}</text:span></text:p>
      <text:p text:style-name="P19"><text:tab/><text:tab/><text:tab/><text:span text:style-name="T12">processAllTheList(li);</text:span></text:p>
      <text:p text:style-name="P20"><text:tab/><text:tab/><text:tab/></text:p>
      <text:p text:style-name="P21"><text:span text:style-name="T16"><text:tab/><text:tab/></text:span><text:span text:style-name="T17">}</text:span></text:p>
      <text:p text:style-name="P22"><text:tab/>}</text:p>
      <text:p text:style-name="P20"/>
      <text:p text:style-name="P23"><text:span text:style-name="T18">W</text:span>rite a method with the following signature:</text:p>
      <text:p text:style-name="P23"><text:tab/><text:tab/><text:span text:style-name="T19">public static void processAllTheList(ArrayList &lt;Procesable&gt; l)</text:span></text:p>
      <text:p text:style-name="P23"/>
      <text:p text:style-name="P23">The method has to call the <text:span text:style-name="T12">procedure</text:span> procesar <text:span text:style-name="T12">for all the elements of the list.</text:span></text:p>
      <text:p text:style-name="P24"/>
      <text:p text:style-name="P24"/>
      <text:p text:style-name="P24">public static void processAllTheList(ArrayList&lt;Procesable&gt; l) {</text:p>
      <text:p text:style-name="P24"><text:s text:c="4"/>for (int i = 0; i &lt; l.size(); i++) {</text:p>
      <text:p text:style-name="P24"><text:s text:c="8"/>Procesable p = l.get(i);</text:p>
      <text:p text:style-name="P24"><text:s text:c="8"/>p.procesar();</text:p>
      <text:p text:style-name="P24"><text:s text:c="4"/>}</text:p>
      <text:p text:style-name="P24">}</text:p>
      <text:p text:style-name="P25"><text:span text:style-name="T20">4. </text:span><text:span text:style-name="T21">(1.25 points) The following code produces an error. Say the reason. Fix it up</text:span></text:p>
      <text:p text:style-name="P26"/>
      <text:p text:style-name="P27"><text:tab/>abstract class A {</text:p>
      <text:p text:style-name="P28"><text:span text:style-name="T22"><text:tab/><text:tab/></text:span><text:span text:style-name="T23">protected </text:span><text:span text:style-name="T22">int i;</text:span></text:p>
      <text:p text:style-name="P28"><text:span text:style-name="T22"><text:tab/><text:tab/></text:span><text:span text:style-name="T23">public </text:span><text:span text:style-name="T22">A(int i) {</text:span></text:p>
      <text:p text:style-name="P27"><text:tab/><text:tab/><text:tab/>this.i = i;</text:p>
      <text:p text:style-name="P27"><text:tab/><text:tab/>}</text:p>
      <text:p text:style-name="P27"><text:tab/>}</text:p>
      <text:p text:style-name="P27"><text:tab/>class B extends A {</text:p>
      <text:p text:style-name="P28"><text:span text:style-name="T22"><text:tab/><text:tab/></text:span><text:span text:style-name="T23">public </text:span><text:span text:style-name="T22">void metodo() { </text:span></text:p>
      <text:p text:style-name="P27"><text:tab/><text:tab/><text:tab/>System.out.println(i); </text:p>
      <text:p text:style-name="P27"><text:tab/><text:tab/>}</text:p>
      <text:p text:style-name="P27"><text:tab/>}</text:p>
      <text:p text:style-name="P28"><text:span text:style-name="T22"><text:tab/>class Cuestion {</text:span><text:span text:style-name="T20"> </text:span></text:p>
      <text:p text:style-name="P28"><text:span text:style-name="T20"><text:tab/><text:tab/></text:span><text:span text:style-name="T22">public static void main(String[] args){</text:span></text:p>
      <text:p text:style-name="P27"><text:tab/><text:tab/><text:tab/>A[] v = new A[10];</text:p>
      <text:p text:style-name="P27"><text:tab/><text:tab/><text:tab/>for ( int i = 0; i &lt; 10; i++ ) {</text:p>
      <text:p text:style-name="P27"><text:tab/><text:tab/><text:tab/><text:tab/>v[i] = new B();</text:p>
      <text:p text:style-name="P27"><text:tab/><text:tab/><text:tab/><text:tab/>v[i].metodo();</text:p>
      <text:p text:style-name="P27"><text:tab/><text:tab/><text:tab/>}</text:p>
      <text:p text:style-name="P27"><text:tab/><text:tab/>}</text:p>
      <text:p text:style-name="P28"><text:span text:style-name="T22"><text:tab/>}</text:span><text:span text:style-name="T20"> </text:span></text:p>
      <text:p text:style-name="P28"><text:span text:style-name="T20"/></text:p>
      <text:p text:style-name="P29"><text:span text:style-name="Strong_20_Emphasis"><text:span text:style-name="T24">Constructor de </text:span></text:span><text:span text:style-name="Strong_20_Emphasis"><text:span text:style-name="Source_20_Text"><text:span text:style-name="T25">B</text:span></text:span></text:span><text:span text:style-name="Strong_20_Emphasis"><text:span text:style-name="T24"> no definido</text:span></text:span><text:span text:style-name="T20">: En la clase </text:span><text:span text:style-name="Source_20_Text"><text:span text:style-name="T26">B</text:span></text:span><text:span text:style-name="T20">, se intenta crear una instancia con </text:span><text:span text:style-name="Source_20_Text"><text:span text:style-name="T26">new B()</text:span></text:span><text:span text:style-name="T20">, pero no hay un constructor en </text:span><text:span text:style-name="Source_20_Text"><text:span text:style-name="T26">B</text:span></text:span><text:span text:style-name="T20"> que reciba el parámetro </text:span><text:span text:style-name="Source_20_Text"><text:span text:style-name="T26">int</text:span></text:span><text:span text:style-name="T20"> requerido por la clase </text:span><text:span text:style-name="Source_20_Text"><text:span text:style-name="T26">A</text:span></text:span><text:span text:style-name="T20">.</text:span></text:p>
      <text:list text:style-name="L2">
        <text:list-item>
          <text:p text:style-name="P30"><text:span text:style-name="Strong_20_Emphasis">Acceso a </text:span><text:span text:style-name="Strong_20_Emphasis"><text:span text:style-name="Source_20_Text">i</text:span></text:span><text:span text:style-name="Strong_20_Emphasis"> en </text:span><text:span text:style-name="Strong_20_Emphasis"><text:span text:style-name="Source_20_Text">metodo()</text:span></text:span>: Aunque <text:span text:style-name="Source_20_Text">i</text:span> es accesible porque es <text:span text:style-name="Source_20_Text">protected</text:span>, el problema principal está en el constructor de <text:span text:style-name="Source_20_Text">B</text:span>.</text:p>
        </text:list-item>
      </text:list>
      <text:h text:style-name="Heading_20_3" text:outline-level="3">Solución:</text:h>
      <text:list text:style-name="L3">
        <text:list-item>
          <text:p text:style-name="P31">Definir un constructor en <text:span text:style-name="Source_20_Text">B</text:span> que llame al constructor de <text:span text:style-name="Source_20_Text">A</text:span> con un parámetro <text:span text:style-name="Source_20_Text">int</text:span>.</text:p>
        </text:list-item>
        <text:list-item>
          <text:p text:style-name="P31">Pasar un valor entero al crear instancias de <text:span text:style-name="Source_20_Text">B</text:span> en el ciclo.</text:p>
        </text:list-item>
      </text:list>
      <text:p text:style-name="P32"/>
      <text:p text:style-name="P32">abstract class A {</text:p>
      <text:p text:style-name="P32"><text:s text:c="4"/>protected int i;</text:p>
      <text:p text:style-name="P32"/>
      <text:p text:style-name="P32"><text:s text:c="4"/>public A(int i) {</text:p>
      <text:p text:style-name="P32"><text:s text:c="8"/>this.i = i;</text:p>
      <text:p text:style-name="P32"><text:s text:c="4"/>}</text:p>
      <text:p text:style-name="P32">}</text:p>
      <text:p text:style-name="P32"/>
      <text:p text:style-name="P32">class B extends A {</text:p>
      <text:p text:style-name="P32"><text:s text:c="4"/>public B(int i) { <text:s text:c="6"/>// Constructor que llama al de A</text:p>
      <text:p text:style-name="P32"><text:s text:c="8"/>super(i);</text:p>
      <text:p text:style-name="P32"><text:s text:c="4"/>}</text:p>
      <text:p text:style-name="P32"/>
      <text:p text:style-name="P32"><text:s text:c="4"/>public void metodo() {</text:p>
      <text:p text:style-name="P32"><text:s text:c="8"/>System.out.println(i);</text:p>
      <text:p text:style-name="P32"><text:s text:c="4"/>}</text:p>
      <text:p text:style-name="P32">}</text:p>
      <text:p text:style-name="P32"><text:soft-page-break/></text:p>
      <text:p text:style-name="P32">class Cuestion {</text:p>
      <text:p text:style-name="P32"><text:s text:c="4"/>public static void main(String[] args) {</text:p>
      <text:p text:style-name="P32"><text:s text:c="8"/>B[] v = new B[10]; <text:s/>// Cambiamos el array a tipo B para acceder a metodo()</text:p>
      <text:p text:style-name="P32"><text:s text:c="8"/>for (int i = 0; i &lt; 10; i++) {</text:p>
      <text:p text:style-name="P32"><text:s text:c="12"/>v[i] = new B(i);</text:p>
      <text:p text:style-name="P32"><text:s text:c="12"/>v[i].metodo();</text:p>
      <text:p text:style-name="P32"><text:s text:c="8"/>}</text:p>
      <text:p text:style-name="P32"><text:s text:c="4"/>}</text:p>
      <text:p text:style-name="P3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ヒラギノ角ゴ Pro W3" svg:font-family="'ヒラギノ角ゴ Pro W3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uerpo_20_A" style:display-name="Cuerpo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swiss" fo:font-size="12pt" fo:letter-spacing="normal" style:rfc-language-tag="es-ES-u-co-trad" fo:language="es" fo:country="ES" fo:font-style="normal" style:text-underline-style="none" fo:font-weight="normal" style:letter-kerning="false" fo:background-color="transparent" style:font-name-asian="ヒラギノ角ゴ Pro W3" style:font-family-asian="'ヒラギノ角ゴ Pro W3'" style:font-family-generic-asian="roman" style:font-size-asian="12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WW8Num2z0" style:family="text">
      <style:text-properties fo:language="es" fo:country="ES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style:text-position="0% 100%" fo:font-size="11pt" style:font-size-asian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>
      <style:text-properties fo:language="es" fo:country="E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1cm"/>
        </style:list-level-properties>
      </text:list-level-style-number>
      <text:list-level-style-bullet text:level="2" text:style-name="WW8Num1z0" loext:num-list-format="%2%." style:num-suffix="." text:bullet-char="←">
        <style:list-level-properties text:list-level-position-and-space-mode="label-alignment">
          <style:list-level-label-alignment text:label-followed-by="nothing" fo:text-indent="1.27cm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←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←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←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←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←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←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←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619cm" fo:margin-left="-0.307cm" table:align="left" style:writing-mode="lr-tb"/>
    </style:style>
    <style:style style:name="Tabla1.A" style:family="table-column">
      <style:table-column-properties style:column-width="3.448cm"/>
    </style:style>
    <style:style style:name="Tabla1.B" style:family="table-column">
      <style:table-column-properties style:column-width="5.965cm"/>
    </style:style>
    <style:style style:name="Tabla1.C" style:family="table-column">
      <style:table-column-properties style:column-width="1.311cm"/>
    </style:style>
    <style:style style:name="Tabla1.D" style:family="table-column">
      <style:table-column-properties style:column-width="4.895cm"/>
    </style:style>
    <style:style style:name="Tabla1.1" style:family="table-row">
      <style:table-row-properties style:min-row-height="0.679cm" fo:keep-together="always"/>
    </style:style>
    <style:style style:name="Tabla1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1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1pt solid #000000" fo:border-right="none" fo:border-top="2.25pt solid #000000" fo:border-bottom="1pt solid #00000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2.25pt solid #000000" fo:border-bottom="1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1pt solid #000000" fo:border-bottom="1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2.2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1pt solid #000000" fo:border-bottom="2.25pt solid #000000" style:writing-mode="lr-tb"/>
    </style:style>
    <style:style style:name="MP1" style:family="paragraph" style:parent-style-name="Header">
      <style:text-properties officeooo:paragraph-rsid="0013125e"/>
    </style:style>
    <style:style style:name="MP2" style:family="paragraph" style:parent-style-name="Header">
      <style:text-properties fo:language="none" fo:country="none" officeooo:paragraph-rsid="0013125e" style:language-asian="none" style:country-asian="none"/>
    </style:style>
    <style:style style:name="MP3" style:family="paragraph" style:parent-style-name="Header">
      <style:paragraph-properties fo:text-align="center" style:justify-single-word="false"/>
      <style:text-properties officeooo:paragraph-rsid="0013125e"/>
    </style:style>
    <style:style style:name="MP4" style:family="paragraph" style:parent-style-name="Header">
      <style:paragraph-properties fo:text-align="center" style:justify-single-word="false"/>
      <style:text-properties officeooo:rsid="002ff6f9" officeooo:paragraph-rsid="002ff6f9"/>
    </style:style>
    <style:style style:name="MP5" style:family="paragraph" style:parent-style-name="Standard">
      <style:text-properties officeooo:rsid="00316aa7" officeooo:paragraph-rsid="00316aa7"/>
    </style:style>
    <style:style style:name="MT1" style:family="text">
      <style:text-properties officeooo:rsid="00497181"/>
    </style:style>
    <style:style style:name="MT2" style:family="text">
      <style:text-properties officeooo:rsid="003d49ba"/>
    </style:style>
    <style:style style:name="MT3" style:family="text">
      <style:text-properties officeooo:rsid="0013125e"/>
    </style:style>
    <style:style style:name="MT4" style:family="text">
      <style:text-properties officeooo:rsid="00254371"/>
    </style:style>
    <style:style style:name="MT5" style:family="text">
      <style:text-properties officeooo:rsid="0057ec8b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2"><draw:frame draw:style-name="Mfr1" draw:name="Imagen1" text:anchor-type="as-char" svg:width="2.935cm" svg:height="1.473cm" draw:z-index="7"><draw:image xlink:href="Pictures/100000000000008100000040568B7EB6.png" xlink:type="simple" xlink:show="embed" xlink:actuate="onLoad" draw:mime-type="image/png"/></draw:frame></text:p>
            </table:table-cell>
            <table:table-cell table:style-name="Tabla1.B1" office:value-type="string">
              <text:p text:style-name="MP3">Unit<text:span text:style-name="MT1">s</text:span> <text:span text:style-name="MT1">7 and 8</text:span><text:span text:style-name="MT2"> -</text:span> EXAM. </text:p>
            </table:table-cell>
            <table:table-cell table:style-name="Tabla1.C1" table:number-columns-spanned="2" office:value-type="string">
              <text:p text:style-name="MP4">A</text:p>
            </table:table-cell>
            <table:covered-table-cell/>
          </table:table-row>
          <table:table-row table:style-name="Tabla1.1">
            <table:covered-table-cell table:style-name="Tabla1.A1"/>
            <table:table-cell table:style-name="Tabla1.B2" table:number-columns-spanned="3" office:value-type="string">
              <text:p text:style-name="MP1">Student:</text:p>
            </table:table-cell>
            <table:covered-table-cell/>
            <table:covered-table-cell/>
          </table:table-row>
          <table:table-row table:style-name="Tabla1.1">
            <table:covered-table-cell table:style-name="Tabla1.A1"/>
            <table:table-cell table:style-name="Tabla1.B3" table:number-columns-spanned="2" office:value-type="string">
              <text:p text:style-name="MP3">1º <text:span text:style-name="MT3">DA</text:span><text:span text:style-name="MT4">W</text:span></text:p>
            </table:table-cell>
            <table:covered-table-cell/>
            <table:table-cell table:style-name="Tabla1.D3" office:value-type="string">
              <text:p text:style-name="MP3"><text:span text:style-name="MT5">4</text:span>/<text:span text:style-name="MT2">0</text:span><text:span text:style-name="MT1">4</text:span>/20<text:span text:style-name="MT3">2</text:span><text:span text:style-name="MT5">3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10-18T10:16:50.962000000</meta:creation-date>
    <dc:date>2026-04-18T00:06:13.988719800</dc:date>
    <meta:editing-duration>PT16H21M27S</meta:editing-duration>
    <meta:editing-cycles>51</meta:editing-cycles>
    <meta:generator>LibreOffice/25.8.5.2$Windows_X86_64 LibreOffice_project/9c8b85f387cc00a89945a79c9e6239f32e450ac2</meta:generator>
    <meta:document-statistic meta:table-count="1" meta:image-count="2" meta:object-count="0" meta:page-count="8" meta:paragraph-count="229" meta:word-count="1141" meta:character-count="8460" meta:non-whitespace-character-count="6393"/>
  </office:meta>
</office:document-meta>
</file>
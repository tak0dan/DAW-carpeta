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4000001B67A9844F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 style:list-style-name="WWNum3"/>
    <style:style style:name="P2" style:family="paragraph" style:parent-style-name="Standard">
      <style:text-properties officeooo:rsid="00069058" officeooo:paragraph-rsid="00069058"/>
    </style:style>
    <style:style style:name="P3" style:family="paragraph" style:parent-style-name="List_20_Paragraph" style:list-style-name="WWNum4"/>
    <style:style style:name="P4" style:family="paragraph" style:parent-style-name="Standard">
      <style:paragraph-properties fo:margin-left="1.27cm"/>
    </style:style>
    <style:style style:name="P5" style:family="paragraph" style:parent-style-name="Standard">
      <style:paragraph-properties fo:margin-left="1.111cm"/>
    </style:style>
    <style:style style:name="P6" style:family="paragraph" style:parent-style-name="Standard">
      <style:paragraph-properties fo:text-align="start" style:justify-single-word="false" fo:text-indent="0cm" style:auto-text-indent="false"/>
    </style:style>
    <style:style style:name="P7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8" style:family="paragraph" style:parent-style-name="List_20_Paragraph" style:list-style-name="WWNum3">
      <style:paragraph-properties fo:margin-top="0.423cm" fo:margin-bottom="0.423cm" style:contextual-spacing="true"/>
    </style:style>
    <style:style style:name="P9" style:family="paragraph" style:parent-style-name="List_20_Paragraph">
      <style:paragraph-properties fo:margin-top="0.423cm" fo:margin-bottom="0.423cm" style:contextual-spacing="true"/>
      <style:text-properties fo:color="#000000" loext:opacity="100%" style:font-name="Consolas" fo:font-size="10pt" officeooo:rsid="000d90f5" style:font-size-asian="10pt"/>
    </style:style>
    <style:style style:name="P10" style:family="paragraph" style:parent-style-name="List_20_Paragraph">
      <style:paragraph-properties fo:margin-left="0cm" fo:margin-top="0.423cm" fo:margin-bottom="0.423cm" style:contextual-spacing="true" fo:text-indent="0cm" style:auto-text-indent="false"/>
      <style:text-properties fo:color="#000000" loext:opacity="100%" style:font-name="Consolas" fo:font-size="10pt" officeooo:rsid="000d90f5" style:font-size-asian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0821c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Aptos" style:font-name-asian="Aptos1" style:font-name-complex="Aptos1"/>
    </style:style>
    <style:style style:name="T8" style:family="text">
      <style:text-properties fo:color="#000000" loext:opacity="100%" style:font-name="Consolas" fo:font-size="10pt" style:font-size-asian="10pt"/>
    </style:style>
    <style:style style:name="T9" style:family="text">
      <style:text-properties style:font-name="Consolas" fo:font-size="10pt" style:font-size-asian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List_20_Paragraph" loext:marker-style-name="T1"><text:span text:style-name="T1"/></text:p>
      <text:list xml:id="list434615422" text:style-name="WWNum3">
        <text:list-item>
          <text:p text:style-name="P1" loext:marker-style-name="T1"><text:span text:style-name="T1">Queremos implementar el siguiente UML en Java:</text:span><text:span text:style-name="T1"/></text:p>
        </text:list-item>
      </text:list>
      <text:p text:style-name="Standard"><draw:frame draw:style-name="fr1" draw:name="Imagen 1" text:anchor-type="as-char" svg:width="13.631cm" svg:height="9.271cm" draw:z-index="0"><draw:image xlink:href="Pictures/1000000000000284000001B67A9844F9.png" xlink:type="simple" xlink:show="embed" xlink:actuate="onLoad" draw:mime-type="image/png"/></draw:frame></text:p>
      <text:p text:style-name="P2">CLASE TAREA: <text:span text:style-name="T2">metodo completar, no recibe nada, no devuelve nada</text:span></text:p>
      <text:list text:style-name="WWNum4">
        <text:list-item>
          <text:p text:style-name="P3">(2.5 puntos) Implementa todas las clases y/o interfaces de la forma más adecuada. </text:p>
          <text:list>
            <text:list-item>
              <text:p text:style-name="P3">La clase <text:span text:style-name="T3">Plan</text:span> tiene dos métodos, <text:span text:style-name="T4">obtenerResumen </text:span>y <text:span text:style-name="T4">ejecutar, </text:span>aparte del getter, setter y toString().</text:p>
            </text:list-item>
            <text:list-item>
              <text:p text:style-name="P3">La clase <text:span text:style-name="T3">Tarea</text:span> tendrá los siguientes atributos: descripción y completada. </text:p>
            </text:list-item>
            <text:list-item>
              <text:p text:style-name="P3">La clase <text:span text:style-name="T3">Evento</text:span> guardará el título y la hora.</text:p>
            </text:list-item>
            <text:list-item>
              <text:p text:style-name="P3">El método <text:span text:style-name="T4">obtenerResumen</text:span>() devolverá el texto "Evento: [titulo] a las [hora]" para la clase Evento y "Tarea: [descripcion] - Pendiente de realizar" o "Tarea: [descripcion] - Realizada" para la tarea.</text:p>
            </text:list-item>
            <text:list-item>
              <text:p text:style-name="P3">El método ejecutar muestra "Asistiendo al evento: [titulo]..." para la clase Evento y marca la tarea como completada y muestra el mensaje “Realizando tarea: [descripcion]” para la clase Tarea</text:p>
            </text:list-item>
          </text:list>
        </text:list-item>
        <text:list-item>
          <text:p text:style-name="P3">(1.5 puntos) Crearemos un PlannerTester.java que contendrá un método estático con la siguiente cabecera:</text:p>
        </text:list-item>
      </text:list>
      <text:p text:style-name="Standard" loext:marker-style-name="T5"><text:span text:style-name="T5">public static void muestraTareasPendientes(List &lt;Plan&gt; l)</text:span><text:span text:style-name="T5"/></text:p>
      <text:p text:style-name="Standard">Esta tarea recorrerá la lista y mostrará por pantalla el <text:span text:style-name="T6">resumen </text:span>de las <text:span text:style-name="T6">tareas pendientes </text:span>(un resumen en cada línea)</text:p>
      <text:list text:continue-numbering="true" text:style-name="WWNum4">
        <text:list-item>
          <text:p text:style-name="P3">(1.5 puntos) Crearemos otro método estático con la siguiente cabecera:</text:p>
        </text:list-item>
      </text:list>
      <text:p text:style-name="Standard" loext:marker-style-name="T5"><text:span text:style-name="T5">public static int devuelveDuracionTotalPlanes(List &lt;Plan&gt; l)</text:span><text:span text:style-name="T5"/></text:p>
      <text:p text:style-name="P4" loext:marker-style-name="T4">Este método devolverá el total (la suma) de la duración de todos los planes que existen en la lista.<text:span text:style-name="T4"/></text:p>
      <text:list text:continue-numbering="true" text:style-name="WWNum4">
        <text:list-item>
          <text:p text:style-name="P3">( 1 punto) Dentro de PlannerTester.java, crearemos también un método main. En este main, vamos a definir una lista (List) de objetos de tipo Planificable. Puedes decidir si lo instancias como ArrayList o como LinkedList. En él crearemos tres Tareas y cuatro eventos.</text:p>
        </text:list-item>
      </text:list>
      <text:p text:style-name="P5" loext:marker-style-name="T7"><text:soft-page-break/><text:span text:style-name="T7">Desde este main también llamaremos a los dos métodos que hemos creado en los apartados b y c.</text:span><text:span text:style-name="T7"/></text:p>
      <text:p text:style-name="Standard"><text:span text:style-name="T8"/></text:p>
      <text:list text:continue-list="list434615422" text:style-name="WWNum3">
        <text:list-item>
          <text:p text:style-name="P1">(2 puntos) Vamos a crear una excepción definida por el usuario, que se llame HoraIncorrectaException.</text:p>
        </text:list-item>
      </text:list>
      <text:p text:style-name="Standard">Lanzaremos la excepción siempre y cuando se intente poner en una tarea una hora que no esté entre 0 y 23. Después en el main, haremos que se produzca la situación y evitaremos que nuestro programa se pare, manejando la excepción.</text:p>
      <text:p text:style-name="P6" loext:marker-style-name="T9"><text:span text:style-name="T8"/></text:p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list text:continue-numbering="true" text:style-name="WWNum3">
        <text:list-item>
          <text:p text:style-name="P1"><text:soft-page-break/>(1.5 puntos) Crea una lista de números enteros utilizando LinkedList. La lista inicial debe contener los siguientes valores: {10, 20, 30, 40, 50}.</text:p>
          <text:list>
            <text:list-item>
              <text:p text:style-name="P8">Crea un ListIterator y recorre la lista desde el final hacia el principio, imprimiendo cada valor.</text:p>
            </text:list-item>
            <text:list-item>
              <text:p text:style-name="P8">Durante el recorrido, cambia el valor de cada número, multiplicándolo por 2. Actualiza los elementos directamente usando el método set() del ListIterator.</text:p>
            </text:list-item>
            <text:list-item>
              <text:p text:style-name="P8">Después, recorre la lista hacia adelante e inserta un número 25 detrás de cada número que sea múltiplo de 20 (es decir, después del número 20 y después del número 40).</text:p>
            </text:list-item>
            <text:list-item>
              <text:p text:style-name="P8">Vuelve a recorrer la lista hacia adelante y borra el número 40 (método remove() del ListIterator.</text:p>
            </text:list-item>
            <text:list-item>
              <text:p text:style-name="P8">Después de cada uno de los pasos, muestra el contenido de la lista, para ver cómo va evolucionando.</text:p>
            </text:list-item>
          </text:list>
        </text:list-item>
      </text:list>
      <text:p text:style-name="P9"/>
      <text:p text:style-name="P9"/>
      <text:p text:style-name="P10">import java.util.LinkedList;</text:p>
      <text:p text:style-name="P10">import java.util.ListIterator;</text:p>
      <text:p text:style-name="P10"/>
      <text:p text:style-name="P10">public class EjercicioLinkedList {</text:p>
      <text:p text:style-name="P10"><text:s text:c="4"/>public static void main(String[] args) {</text:p>
      <text:p text:style-name="P10"><text:s text:c="8"/>LinkedList&lt;Integer&gt; lista = new LinkedList&lt;&gt;();</text:p>
      <text:p text:style-name="P10"><text:s text:c="8"/>lista.add(10); lista.add(20); lista.add(30); lista.add(40); lista.add(50);</text:p>
      <text:p text:style-name="P10"/>
      <text:p text:style-name="P10"><text:s text:c="8"/>// 1) Recorrer de atrás hacia adelante y multiplicar x2</text:p>
      <text:p text:style-name="P10"><text:s text:c="8"/>ListIterator&lt;Integer&gt; it = lista.listIterator(lista.size());</text:p>
      <text:p text:style-name="P10"><text:s text:c="8"/>while (it.hasPrevious()) {</text:p>
      <text:p text:style-name="P10"><text:s text:c="12"/>int val = it.previous();</text:p>
      <text:p text:style-name="P10"><text:s text:c="12"/>it.set(val * 2);</text:p>
      <text:p text:style-name="P10"><text:s text:c="8"/>}</text:p>
      <text:p text:style-name="P10"><text:s text:c="8"/>System.out.println("Tras multiplicar x2: " + lista);</text:p>
      <text:p text:style-name="P10"><text:s text:c="8"/>// [20, 40, 60, 80, 100]</text:p>
      <text:p text:style-name="P10"/>
      <text:p text:style-name="P10"><text:s text:c="8"/>// 2) Recorrer hacia adelante e insertar 25 detrás de múltiplos de 20</text:p>
      <text:p text:style-name="P10"><text:s text:c="8"/>it = lista.listIterator();</text:p>
      <text:p text:style-name="P10"><text:s text:c="8"/>while (it.hasNext()) {</text:p>
      <text:p text:style-name="P10"><text:s text:c="12"/>int val = it.next();</text:p>
      <text:p text:style-name="P10"><text:s text:c="12"/>if (val % 20 == 0) {</text:p>
      <text:p text:style-name="P10"><text:s text:c="16"/>it.add(25);</text:p>
      <text:p text:style-name="P10"><text:s text:c="12"/>}</text:p>
      <text:p text:style-name="P10"><text:s text:c="8"/>}</text:p>
      <text:p text:style-name="P10"><text:s text:c="8"/>System.out.println("Tras insertar 25: " + lista);</text:p>
      <text:p text:style-name="P10"><text:s text:c="8"/>// [20, 25, 40, 25, 60, 25, 80, 25, 100, 25]</text:p>
      <text:p text:style-name="P10"/>
      <text:p text:style-name="P10"><text:s text:c="8"/>// 3) Recorrer hacia adelante y borrar el 40</text:p>
      <text:p text:style-name="P10"><text:s text:c="8"/>it = lista.listIterator();</text:p>
      <text:p text:style-name="P10"><text:s text:c="8"/>while (it.hasNext()) {</text:p>
      <text:p text:style-name="P10"><text:s text:c="12"/>int val = it.next();</text:p>
      <text:p text:style-name="P10"><text:s text:c="12"/>if (val == 40) {</text:p>
      <text:p text:style-name="P10"><text:s text:c="16"/>it.remove();</text:p>
      <text:p text:style-name="P10"><text:s text:c="12"/>}</text:p>
      <text:p text:style-name="P10"><text:s text:c="8"/>}</text:p>
      <text:p text:style-name="P10"><text:s text:c="8"/>System.out.println("Tras borrar 40: " + lista);</text:p>
      <text:p text:style-name="P10"><text:s text:c="4"/>}</text:p>
      <text:p text:style-name="P10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1pt" fo:language="es" fo:country="ES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1pt" fo:language="es" fo:country="ES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3cm" fo:margin-right="0.99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IAZ IBAÑEZ, MILAGROS PILAR</meta:initial-creator>
    <meta:editing-cycles>17</meta:editing-cycles>
    <meta:creation-date>2025-04-07T20:53:00</meta:creation-date>
    <dc:date>2026-04-20T21:15:29.922886300</dc:date>
    <meta:editing-duration>PT3H30M55S</meta:editing-duration>
    <meta:generator>LibreOffice/25.8.5.2$Windows_X86_64 LibreOffice_project/9c8b85f387cc00a89945a79c9e6239f32e450ac2</meta:generator>
    <meta:document-statistic meta:table-count="0" meta:image-count="1" meta:object-count="0" meta:page-count="3" meta:paragraph-count="60" meta:word-count="604" meta:character-count="4038" meta:non-whitespace-character-count="3220"/>
    <meta:user-defined meta:name="AppVersion">16.0000</meta:user-defined>
    <meta:template xlink:type="simple" xlink:actuate="onRequest" xlink:title="Normal.dotm" xlink:href=""/>
  </office:meta>
</office:document-meta>
</file>
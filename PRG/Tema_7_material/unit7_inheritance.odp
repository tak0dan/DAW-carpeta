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0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8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3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4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6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6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0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2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5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7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8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2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6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5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82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2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4">
      <style:text-properties fo:font-variant="normal" fo:text-transform="none" fo:color="#0082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6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08">
      <style:text-properties fo:font-variant="normal" fo:text-transform="none" fo:color="#0082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50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3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4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5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6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7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8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0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12">
      <style:text-properties fo:font-variant="normal" fo:text-transform="none" fo:color="#0082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6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4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6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38" style:parent-style-name="Graphics">
      <style:graphic-properties draw:fill="none" fo:clip="rect(0in, 0in, 0in, 0in)" draw:stroke="none"/>
    </style:style>
    <style:style style:family="paragraph" style:name="a171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0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4">
      <style:text-properties fo:font-variant="normal" fo:text-transform="none" fo:color="#aa00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720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4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3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0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3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4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6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5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0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4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5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6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1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5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8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4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5">
      <style:paragraph-properties fo:line-height="100%" fo:text-align="justify" fo:text-align-last="start" style:tab-stop-distance="1in" fo:margin-left="0.2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0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2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02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0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1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1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1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1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0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2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2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6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27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2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2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 style:parent-style-name="Graphics">
      <style:graphic-properties draw:fill="none" draw:stroke="none"/>
    </style:style>
    <style:style style:family="text" style:name="a203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6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7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8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49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90%" fo:text-align="left" style:tab-stop-distance="1in" fo:margin-left="1.31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5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90%" fo:text-align="left" style:tab-stop-distance="1in" fo:margin-left="1.31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2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draw:stroke="none"/>
    </style:style>
    <style:style style:family="text" style:name="a205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4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5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0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8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0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6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3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84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8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8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8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8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3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1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5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6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7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9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3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0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63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6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6">
      <style:paragraph-properties fo:line-height="7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2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4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6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8">
      <style:paragraph-properties fo:line-height="7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8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0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610b4b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3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8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0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2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4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7" style:parent-style-name="Graphics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9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1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Liberation Sans" style:font-family-complex="Courier New" style:font-family-generic="modern" style:font-family-generic-asian="swiss" style:font-family-generic-complex="modern" style:font-pitch="fixed" style:font-pitch-asian="variable" style:font-pitch-complex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9" style:parent-style-name="Graphics">
      <style:graphic-properties draw:fill="none" draw:stroke="none"/>
    </style:style>
    <style:style style:family="text" style:name="a2220">
      <style:text-properties fo:font-variant="normal" fo:text-transform="none" fo:color="#b9b9b9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8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 serif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draw:stroke="non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aa00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4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44">
      <style:text-properties fo:font-variant="normal" fo:text-transform="none" fo:color="#651f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4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4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7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50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aa00ff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8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3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5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3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4">
      <style:text-properties fo:font-variant="normal" fo:text-transform="none" fo:color="#bf00b8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2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0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2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6" style:parent-style-name="Graphics">
      <style:graphic-properties draw:fill="none" draw:stroke="none"/>
    </style:style>
    <style:style style:family="text" style:name="a252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0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4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5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6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7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8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9">
      <style:text-properties fo:font-variant="normal" fo:text-transform="none" fo:color="#2a2a2a" style:text-line-through-type="none" style:text-line-through-style="none" style:text-line-through-width="auto" style:text-line-through-color="font-color" style:text-position="0% 100%" fo:font-family="Fira Mon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33" style:parent-style-name="Graphics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3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Ink Free" style:font-family-complex="Tahoma" style:font-family-generic="script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70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5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Liberation Sans" style:font-family-complex="Liberation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Times New Roman" style:font-family-generic-asian="roman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051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1096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2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1042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2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1" style:num-suffix=".">
        <style:list-level-properties text:space-before="0in" text:min-label-width="0.5625in"/>
        <style:text-properties fo:color="#ff6600"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color="#ff6600"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color="#ff6600"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color="#ff6600"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color="#ff6600"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color="#ff6600"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color="#ff6600"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color="#ff6600"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color="#ff6600" fo:font-family="Calibri Light" fo:font-size="100%"/>
      </text:list-level-style-number>
    </text:list-style>
    <text:list-style style:name="a23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a" style:num-letter-sync="true" style:num-suffix=".">
        <style:list-level-properties text:space-before="0in" text:min-label-width="0.5625in"/>
        <style:text-properties fo:color="#ff6600" fo:font-family="Calibri Light" fo:font-size="100%"/>
      </text:list-level-style-number>
      <text:list-level-style-number text:level="2" style:num-format="a" style:num-letter-sync="true" style:num-suffix=".">
        <style:list-level-properties text:space-before="0.75in" text:min-label-width="0.5625in"/>
        <style:text-properties fo:color="#ff6600" fo:font-family="Calibri Light" fo:font-size="100%"/>
      </text:list-level-style-number>
      <text:list-level-style-number text:level="3" style:num-format="a" style:num-letter-sync="true" style:num-suffix=".">
        <style:list-level-properties text:space-before="1.25in" text:min-label-width="0.5625in"/>
        <style:text-properties fo:color="#ff6600" fo:font-family="Calibri Light" fo:font-size="100%"/>
      </text:list-level-style-number>
      <text:list-level-style-number text:level="4" style:num-format="a" style:num-letter-sync="true" style:num-suffix=".">
        <style:list-level-properties text:space-before="1.75in" text:min-label-width="0.5625in"/>
        <style:text-properties fo:color="#ff6600" fo:font-family="Calibri Light" fo:font-size="100%"/>
      </text:list-level-style-number>
      <text:list-level-style-number text:level="5" style:num-format="a" style:num-letter-sync="true" style:num-suffix=".">
        <style:list-level-properties text:space-before="2.25in" text:min-label-width="0.5625in"/>
        <style:text-properties fo:color="#ff6600" fo:font-family="Calibri Light" fo:font-size="100%"/>
      </text:list-level-style-number>
      <text:list-level-style-number text:level="6" style:num-format="a" style:num-letter-sync="true" style:num-suffix=".">
        <style:list-level-properties text:space-before="2.75in" text:min-label-width="0.5625in"/>
        <style:text-properties fo:color="#ff6600" fo:font-family="Calibri Light" fo:font-size="100%"/>
      </text:list-level-style-number>
      <text:list-level-style-number text:level="7" style:num-format="a" style:num-letter-sync="true" style:num-suffix=".">
        <style:list-level-properties text:space-before="3.25in" text:min-label-width="0.5625in"/>
        <style:text-properties fo:color="#ff6600" fo:font-family="Calibri Light" fo:font-size="100%"/>
      </text:list-level-style-number>
      <text:list-level-style-number text:level="8" style:num-format="a" style:num-letter-sync="true" style:num-suffix=".">
        <style:list-level-properties text:space-before="3.75in" text:min-label-width="0.5625in"/>
        <style:text-properties fo:color="#ff6600" fo:font-family="Calibri Light" fo:font-size="100%"/>
      </text:list-level-style-number>
      <text:list-level-style-number text:level="9" style:num-format="a" style:num-letter-sync="true" style:num-suffix=".">
        <style:list-level-properties text:space-before="4.25in" text:min-label-width="0.5625in"/>
        <style:text-properties fo:color="#ff6600" fo:font-family="Calibri Light" fo:font-size="100%"/>
      </text:list-level-style-number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number text:level="1" style:num-format="a" style:num-letter-sync="true" style:num-suffix=".">
        <style:list-level-properties text:space-before="0in" text:min-label-width="0.5625in"/>
        <style:text-properties fo:color="#ff6600" fo:font-family="Calibri Light" fo:font-size="100%"/>
      </text:list-level-style-number>
      <text:list-level-style-number text:level="2" style:num-format="a" style:num-letter-sync="true" style:num-suffix=".">
        <style:list-level-properties text:space-before="0.75in" text:min-label-width="0.5625in"/>
        <style:text-properties fo:color="#ff6600" fo:font-family="Calibri Light" fo:font-size="100%"/>
      </text:list-level-style-number>
      <text:list-level-style-number text:level="3" style:num-format="a" style:num-letter-sync="true" style:num-suffix=".">
        <style:list-level-properties text:space-before="1.25in" text:min-label-width="0.5625in"/>
        <style:text-properties fo:color="#ff6600" fo:font-family="Calibri Light" fo:font-size="100%"/>
      </text:list-level-style-number>
      <text:list-level-style-number text:level="4" style:num-format="a" style:num-letter-sync="true" style:num-suffix=".">
        <style:list-level-properties text:space-before="1.75in" text:min-label-width="0.5625in"/>
        <style:text-properties fo:color="#ff6600" fo:font-family="Calibri Light" fo:font-size="100%"/>
      </text:list-level-style-number>
      <text:list-level-style-number text:level="5" style:num-format="a" style:num-letter-sync="true" style:num-suffix=".">
        <style:list-level-properties text:space-before="2.25in" text:min-label-width="0.5625in"/>
        <style:text-properties fo:color="#ff6600" fo:font-family="Calibri Light" fo:font-size="100%"/>
      </text:list-level-style-number>
      <text:list-level-style-number text:level="6" style:num-format="a" style:num-letter-sync="true" style:num-suffix=".">
        <style:list-level-properties text:space-before="2.75in" text:min-label-width="0.5625in"/>
        <style:text-properties fo:color="#ff6600" fo:font-family="Calibri Light" fo:font-size="100%"/>
      </text:list-level-style-number>
      <text:list-level-style-number text:level="7" style:num-format="a" style:num-letter-sync="true" style:num-suffix=".">
        <style:list-level-properties text:space-before="3.25in" text:min-label-width="0.5625in"/>
        <style:text-properties fo:color="#ff6600" fo:font-family="Calibri Light" fo:font-size="100%"/>
      </text:list-level-style-number>
      <text:list-level-style-number text:level="8" style:num-format="a" style:num-letter-sync="true" style:num-suffix=".">
        <style:list-level-properties text:space-before="3.75in" text:min-label-width="0.5625in"/>
        <style:text-properties fo:color="#ff6600" fo:font-family="Calibri Light" fo:font-size="100%"/>
      </text:list-level-style-number>
      <text:list-level-style-number text:level="9" style:num-format="a" style:num-letter-sync="true" style:num-suffix=".">
        <style:list-level-properties text:space-before="4.25in" text:min-label-width="0.5625in"/>
        <style:text-properties fo:color="#ff6600" fo:font-family="Calibri Light" fo:font-size="100%"/>
      </text:list-level-style-number>
    </text:list-style>
    <text:list-style style:name="a1060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1" style:num-suffix=".">
        <style:list-level-properties text:space-before="0in"/>
        <style:text-properties fo:color="#ff6600" fo:font-size="100%"/>
      </text:list-level-style-number>
      <text:list-level-style-number text:level="2" style:num-format="1" style:num-suffix=".">
        <style:list-level-properties text:space-before="0.75in"/>
        <style:text-properties fo:color="#ff6600" fo:font-size="100%"/>
      </text:list-level-style-number>
      <text:list-level-style-number text:level="3" style:num-format="1" style:num-suffix=".">
        <style:list-level-properties text:space-before="1.25in"/>
        <style:text-properties fo:color="#ff6600" fo:font-size="100%"/>
      </text:list-level-style-number>
      <text:list-level-style-number text:level="4" style:num-format="1" style:num-suffix=".">
        <style:list-level-properties text:space-before="1.75in"/>
        <style:text-properties fo:color="#ff6600" fo:font-size="100%"/>
      </text:list-level-style-number>
      <text:list-level-style-number text:level="5" style:num-format="1" style:num-suffix=".">
        <style:list-level-properties text:space-before="2.25in"/>
        <style:text-properties fo:color="#ff6600" fo:font-size="100%"/>
      </text:list-level-style-number>
      <text:list-level-style-number text:level="6" style:num-format="1" style:num-suffix=".">
        <style:list-level-properties text:space-before="2.75in"/>
        <style:text-properties fo:color="#ff6600" fo:font-size="100%"/>
      </text:list-level-style-number>
      <text:list-level-style-number text:level="7" style:num-format="1" style:num-suffix=".">
        <style:list-level-properties text:space-before="3.25in"/>
        <style:text-properties fo:color="#ff6600" fo:font-size="100%"/>
      </text:list-level-style-number>
      <text:list-level-style-number text:level="8" style:num-format="1" style:num-suffix=".">
        <style:list-level-properties text:space-before="3.75in"/>
        <style:text-properties fo:color="#ff6600" fo:font-size="100%"/>
      </text:list-level-style-number>
      <text:list-level-style-number text:level="9" style:num-format="1" style:num-suffix=".">
        <style:list-level-properties text:space-before="4.25in"/>
        <style:text-properties fo:color="#ff6600" fo:font-size="100%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20" draw:master-page-name="Master1-Layout7-blank-En-blanco" presentation:presentation-page-layout-name="Master1-PPL7" draw:id="Slide-256">
        <draw:frame draw:id="id148" presentation:style-name="a1025" draw:name="Título 1" svg:x="0.55118in" svg:y="2.34803in" svg:width="8.63898in" svg:height="1.38031in" presentation:class="title" presentation:placeholder="false">
          <draw:text-box>
            <text:p text:style-name="a1024" text:class-names="" text:cond-style-name=""><text:span text:style-name="a1021" text:class-names="">UNIT 7.<text:s text:c="1"/></text:span><text:span text:style-name="a1022" text:class-names="">Inheritance</text:span><text:span text:style-name="a1023" text:class-names=""/></text:p>
          </draw:text-box>
          <svg:title/>
          <svg:desc/>
        </draw:frame>
        <presentation:notes draw:style-name="a1031">
          <draw:frame draw:id="id149" draw:style-name="a1028" draw:name="Marcador de número de diapositiva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0" presentation:style-name="a1029" draw:name="Marcador de imagen de diapositiva 1">
            <svg:title/>
            <svg:desc/>
          </draw:page-thumbnail>
          <draw:frame draw:id="id151" presentation:style-name="a103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32" draw:master-page-name="Master2-Layout7-blank-En-blanco" presentation:presentation-page-layout-name="Master2-PPL7" draw:id="Slide-257">
        <draw:frame draw:id="id152" presentation:style-name="a1037" draw:name="Título 1" svg:x="0.55118in" svg:y="0.32953in" svg:width="8.97638in" svg:height="0.75709in" presentation:class="title" presentation:placeholder="false">
          <draw:text-box>
            <text:p text:style-name="a1036" text:class-names="" text:cond-style-name=""><text:span text:style-name="a1033" text:class-names="">UNIT 7.<text:s text:c="1"/></text:span><text:span text:style-name="a1034" text:class-names="">Inheritance</text:span><text:span text:style-name="a1035" text:class-names=""/></text:p>
          </draw:text-box>
          <svg:title/>
          <svg:desc/>
        </draw:frame>
        <draw:frame draw:id="id153" presentation:style-name="a1100" draw:name="Marcador de texto 2" svg:x="1.42038in" svg:y="1.3638in" svg:width="8.74016in" svg:height="6.09454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38" text:class-names=""><text:s text:c="1"/></text:span><text:span text:style-name="a1039" text:class-names="">Introduction</text:span><text:span text:style-name="a1040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3" text:class-names=""><text:s text:c="1"/></text:span><text:span text:style-name="a1044" text:class-names="">Types</text:span><text:span text:style-name="a1045" text:class-names=""><text:s text:c="1"/></text:span><text:span text:style-name="a1046" text:class-names="">of</text:span><text:span text:style-name="a1047" text:class-names=""><text:s text:c="1"/></text:span><text:span text:style-name="a1048" text:class-names="">inheritance</text:span><text:span text:style-name="a1049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2" text:class-names=""><text:s text:c="1"/></text:span><text:span text:style-name="a1053" text:class-names="">Examples</text:span><text:span text:style-name="a1054" text:class-names=""><text:s text:c="1"/></text:span><text:span text:style-name="a1055" text:class-names="">of</text:span><text:span text:style-name="a1056" text:class-names=""><text:s text:c="1"/></text:span><text:span text:style-name="a1057" text:class-names="">inheritance</text:span><text:span text:style-name="a1058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1" text:class-names=""><text:s text:c="1"/></text:span><text:span text:style-name="a1062" text:class-names="">Extending</text:span><text:span text:style-name="a1063" text:class-names=""><text:s text:c="1"/>a<text:s text:c="1"/></text:span><text:span text:style-name="a1064" text:class-names="">class</text:span><text:span text:style-name="a1065" text:class-names="">.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68" text:class-names="">Overriding</text:span><text:span text:style-name="a1069" text:class-names=""><text:s text:c="1"/></text:span><text:span text:style-name="a1070" text:class-names="">methods</text:span><text:span text:style-name="a1071" text:class-names=""/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4" text:class-names="">Protected</text:span><text:span text:style-name="a1075" text:class-names=""><text:s text:c="1"/></text:span><text:span text:style-name="a1076" text:class-names="">access</text:span><text:span text:style-name="a1077" text:class-names=""/></text:p>
                  </text:list-item>
                </text:list>
              </text:list-item>
            </text:list>
            <text:list text:style-name="a1085">
              <text:list-item>
                <text:p text:style-name="a1084" text:class-names="" text:cond-style-name=""><text:span text:style-name="a1080" text:class-names="">Abstract</text:span><text:span text:style-name="a1081" text:class-names=""><text:s text:c="1"/></text:span><text:span text:style-name="a1082" text:class-names="">Classes</text:span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Interfaces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89" text:class-names=""><text:s text:c="1"/></text:span><text:span text:style-name="a1090" text:class-names="">Exceptions</text:span><text:span text:style-name="a1091" text:class-names=""><text:s text:c="1"/>in Java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  <presentation:notes draw:style-name="a1106">
          <draw:frame draw:id="id154" draw:style-name="a1103" draw:name="Marcador de número de diapositiva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55" presentation:style-name="a1104" draw:name="Marcador de imagen de diapositiva 1">
            <svg:title/>
            <svg:desc/>
          </draw:page-thumbnail>
          <draw:frame draw:id="id156" presentation:style-name="a110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07" draw:master-page-name="Master2-Layout7-blank-En-blanco" presentation:presentation-page-layout-name="Master2-PPL7" draw:id="Slide-258">
        <draw:frame draw:id="id157" presentation:style-name="a1112" draw:name="Título 1" svg:x="0.55118in" svg:y="0.32953in" svg:width="8.97638in" svg:height="0.75709in" presentation:class="title" presentation:placeholder="false">
          <draw:text-box>
            <text:p text:style-name="a1111" text:class-names="" text:cond-style-name=""><text:span text:style-name="a1108" text:class-names="">1.<text:s text:c="1"/></text:span><text:span text:style-name="a1109" text:class-names="">Introduction</text:span><text:span text:style-name="a1110" text:class-names=""/></text:p>
          </draw:text-box>
          <svg:title/>
          <svg:desc/>
        </draw:frame>
        <draw:frame draw:id="id158" presentation:style-name="a1184" draw:name="Marcador de texto 2" svg:x="0.93352in" svg:y="1.50984in" svg:width="8.74016in" svg:height="5.53976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16" text:class-names="">Inheritance</text:span><text:span text:style-name="a1117" text:class-names=""><text:s text:c="1"/></text:span><text:span text:style-name="a1118" text:class-names="">is</text:span><text:span text:style-name="a1119" text:class-names=""><text:s text:c="1"/></text:span><text:span text:style-name="a1120" text:class-names="">one</text:span><text:span text:style-name="a1121" text:class-names=""><text:s text:c="1"/></text:span><text:span text:style-name="a1122" text:class-names="">of</text:span><text:span text:style-name="a1123" text:class-names=""><text:s text:c="1"/></text:span><text:span text:style-name="a1124" text:class-names="">the</text:span><text:span text:style-name="a1125" text:class-names=""><text:s text:c="1"/></text:span><text:span text:style-name="a1126" text:class-names="">main</text:span><text:span text:style-name="a1127" text:class-names=""><text:s text:c="1"/></text:span><text:span text:style-name="a1128" text:class-names="">techniques</text:span><text:span text:style-name="a1129" text:class-names=""><text:s text:c="1"/></text:span><text:span text:style-name="a1130" text:class-names="">of</text:span><text:span text:style-name="a1131" text:class-names=""><text:s text:c="1"/></text:span><text:span text:style-name="a1132" text:class-names="">the</text:span><text:span text:style-name="a1133" text:class-names=""><text:s text:c="1"/>OOP (</text:span><text:span text:style-name="a1134" text:class-names="">Object</text:span><text:span text:style-name="a1135" text:class-names=""><text:s text:c="1"/></text:span><text:span text:style-name="a1136" text:class-names="">Oriented</text:span><text:span text:style-name="a1137" text:class-names=""><text:s text:c="1"/></text:span><text:span text:style-name="a1138" text:class-names="">Programming</text:span><text:span text:style-name="a1139" text:class-names="">).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42" text:class-names="">A general<text:s text:c="1"/></text:span><text:span text:style-name="a1143" text:class-names="">class</text:span><text:span text:style-name="a1144" text:class-names=""><text:s text:c="1"/></text:span><text:span text:style-name="a1145" text:class-names="">is</text:span><text:span text:style-name="a1146" text:class-names=""><text:s text:c="1"/></text:span><text:span text:style-name="a1147" text:class-names="">first</text:span><text:span text:style-name="a1148" text:class-names=""><text:s text:c="1"/></text:span><text:span text:style-name="a1149" text:class-names="">defined</text:span><text:span text:style-name="a1150" text:class-names=""><text:s text:c="1"/>and<text:s text:c="1"/></text:span><text:span text:style-name="a1151" text:class-names="">then</text:span><text:span text:style-name="a1152" text:class-names=""><text:s text:c="1"/></text:span><text:span text:style-name="a1153" text:class-names="">other</text:span><text:span text:style-name="a1154" text:class-names=""><text:s text:c="1"/></text:span><text:span text:style-name="a1155" text:class-names="">classes</text:span><text:span text:style-name="a1156" text:class-names=""><text:s text:c="1"/>more<text:s text:c="1"/></text:span><text:span text:style-name="a1157" text:class-names="">specialized</text:span><text:span text:style-name="a1158" text:class-names=""><text:s text:c="1"/></text:span><text:span text:style-name="a1159" text:class-names="">inherit</text:span><text:span text:style-name="a1160" text:class-names=""><text:s text:c="1"/></text:span><text:span text:style-name="a1161" text:class-names="">attributes</text:span><text:span text:style-name="a1162" text:class-names=""><text:s text:c="1"/>and<text:s text:c="1"/></text:span><text:span text:style-name="a1163" text:class-names="">methods</text:span><text:span text:style-name="a1164" text:class-names=""><text:s text:c="1"/></text:span><text:span text:style-name="a1165" text:class-names="">of</text:span><text:span text:style-name="a1166" text:class-names=""><text:s text:c="1"/></text:span><text:span text:style-name="a1167" text:class-names="">the</text:span><text:span text:style-name="a1168" text:class-names=""><text:s text:c="1"/>general<text:s text:c="1"/></text:span><text:span text:style-name="a1169" text:class-names="">class</text:span><text:span text:style-name="a1170" text:class-names="">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3" text:class-names="">So,<text:s text:c="1"/></text:span><text:span text:style-name="a1174" text:class-names="">inheritance</text:span><text:span text:style-name="a1175" text:class-names=""><text:s text:c="1"/>produces<text:s text:c="1"/></text:span><text:span text:style-name="a1176" text:class-names="">reuse</text:span><text:span text:style-name="a1177" text:class-names=""><text:s text:c="1"/></text:span><text:span text:style-name="a1178" text:class-names="">of</text:span><text:span text:style-name="a1179" text:class-names=""><text:s text:c="1"/></text:span><text:span text:style-name="a1180" text:class-names="">code</text:span><text:span text:style-name="a1181" text:class-names="">.</text:span></text:p>
              </text:list-item>
            </text:list>
          </draw:text-box>
          <svg:title/>
          <svg:desc/>
        </draw:frame>
        <presentation:notes draw:style-name="a1190">
          <draw:frame draw:id="id159" draw:style-name="a1187" draw:name="Marcador de número de diapositiva 6" svg:x="4.67953in" svg:y="11.10827in" svg:width="3.5878in" svg:height="0.58425in">
            <draw:text-box>
              <text:p text:style-name="a1186" text:class-names="" text:cond-style-name=""><text:span text:style-name="a1185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160" presentation:style-name="a1188" draw:name="Marcador de imagen de diapositiva 1">
            <svg:title/>
            <svg:desc/>
          </draw:page-thumbnail>
          <draw:frame draw:id="id161" presentation:style-name="a118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191" draw:master-page-name="Master2-Layout7-blank-En-blanco" presentation:presentation-page-layout-name="Master2-PPL7" draw:id="Slide-259">
        <draw:frame draw:id="id162" presentation:style-name="a1196" draw:name="Título 1" svg:x="0.55118in" svg:y="0.32953in" svg:width="8.97638in" svg:height="0.75709in" presentation:class="title" presentation:placeholder="false">
          <draw:text-box>
            <text:p text:style-name="a1195" text:class-names="" text:cond-style-name=""><text:span text:style-name="a1192" text:class-names="">1.<text:s text:c="1"/></text:span><text:span text:style-name="a1193" text:class-names="">Introduction</text:span><text:span text:style-name="a1194" text:class-names=""/></text:p>
          </draw:text-box>
          <svg:title/>
          <svg:desc/>
        </draw:frame>
        <draw:frame draw:id="id163" presentation:style-name="a1206" draw:name="Marcador de texto 2" svg:x="0.93352in" svg:y="1.50984in" svg:width="8.74016in" svg:height="5.53976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7" text:class-names="">We have two classes: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1. Parent class ( Super or Base class )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2. Child class ( Subclass or Derived class )</text:span></text:p>
              </text:list-item>
            </text:list>
          </draw:text-box>
          <svg:title/>
          <svg:desc/>
        </draw:frame>
        <draw:frame draw:id="id164" draw:style-name="a1207" draw:name="Imagen 4" svg:x="1.60544in" svg:y="3.70323in" svg:width="2.43749in" svg:height="3.48212in" style:rel-width="scale" style:rel-height="scale">
          <draw:image xlink:href="media/image1.png" xlink:type="simple" xlink:show="embed" xlink:actuate="onLoad"/>
          <svg:title/>
          <svg:desc>Escala de tiempo

Descripción generada automáticamente</svg:desc>
        </draw:frame>
        <draw:frame draw:id="id165" draw:style-name="a1226" draw:name="CuadroTexto 3" svg:x="5.3036in" svg:y="4in" svg:width="3.86307in" svg:height="0.70684in">
          <draw:text-box>
            <text:p text:style-name="a1216" text:class-names="" text:cond-style-name=""><text:span text:style-name="a1208" text:class-names="">Ancestor</text:span><text:span text:style-name="a1209" text:class-names="">: a<text:s text:c="1"/></text:span><text:span text:style-name="a1210" text:class-names="">parent</text:span><text:span text:style-name="a1211" text:class-names=""><text:s text:c="1"/></text:span><text:span text:style-name="a1212" text:class-names="">of</text:span><text:span text:style-name="a1213" text:class-names=""><text:s text:c="1"/>a<text:s text:c="1"/></text:span><text:span text:style-name="a1214" text:class-names="">parent</text:span><text:span text:style-name="a1215" text:class-names=""/></text:p>
            <text:p text:style-name="a1225" text:class-names="" text:cond-style-name=""><text:span text:style-name="a1217" text:class-names="">Descendant</text:span><text:span text:style-name="a1218" text:class-names="">: a<text:s text:c="1"/></text:span><text:span text:style-name="a1219" text:class-names="">child</text:span><text:span text:style-name="a1220" text:class-names=""><text:s text:c="1"/></text:span><text:span text:style-name="a1221" text:class-names="">of</text:span><text:span text:style-name="a1222" text:class-names=""><text:s text:c="1"/>a<text:s text:c="1"/></text:span><text:span text:style-name="a1223" text:class-names="">child</text:span><text:span text:style-name="a1224" text:class-names=""/></text:p>
          </draw:text-box>
          <svg:title/>
          <svg:desc/>
        </draw:frame>
        <presentation:notes draw:style-name="a1232">
          <draw:frame draw:id="id166" draw:style-name="a1229" draw:name="Marcador de número de diapositiva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167" presentation:style-name="a1230" draw:name="Marcador de imagen de diapositiva 1">
            <svg:title/>
            <svg:desc/>
          </draw:page-thumbnail>
          <draw:frame draw:id="id168" presentation:style-name="a12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233" draw:master-page-name="Master2-Layout7-blank-En-blanco" presentation:presentation-page-layout-name="Master2-PPL7" draw:id="Slide-262">
        <draw:frame draw:id="id169" presentation:style-name="a1242" draw:name="Título 1" svg:x="0.55118in" svg:y="0.32953in" svg:width="8.97638in" svg:height="0.75709in" presentation:class="title" presentation:placeholder="false">
          <draw:text-box>
            <text:p text:style-name="a1241" text:class-names="" text:cond-style-name=""><text:span text:style-name="a1234" text:class-names="">2.<text:s text:c="1"/></text:span><text:span text:style-name="a1235" text:class-names="">Types</text:span><text:span text:style-name="a1236" text:class-names=""><text:s text:c="1"/></text:span><text:span text:style-name="a1237" text:class-names="">of</text:span><text:span text:style-name="a1238" text:class-names=""><text:s text:c="1"/></text:span><text:span text:style-name="a1239" text:class-names="">inheritance</text:span><text:span text:style-name="a1240" text:class-names=""/></text:p>
          </draw:text-box>
          <svg:title/>
          <svg:desc/>
        </draw:frame>
        <draw:frame draw:id="id170" draw:style-name="a1243" draw:name="Imagen 9" svg:x="3.47812in" svg:y="1.32951in" svg:width="1.3125in" svg:height="1.875in" style:rel-width="scale" style:rel-height="scale">
          <draw:image xlink:href="media/image1.png" xlink:type="simple" xlink:show="embed" xlink:actuate="onLoad"/>
          <svg:title/>
          <svg:desc>Escala de tiempo

Descripción generada automáticamente</svg:desc>
        </draw:frame>
        <draw:frame draw:id="id171" draw:style-name="a1248" draw:name="CuadroTexto 10" svg:x="1.11111in" svg:y="1.8in" svg:width="1.9in" svg:height="0.77415in">
          <draw:text-box>
            <text:p text:style-name="a1247" text:class-names="" text:cond-style-name=""><text:span text:style-name="a1244" text:class-names="">Single<text:s text:c="1"/></text:span><text:span text:style-name="a1245" text:class-names="">Inheritance</text:span><text:span text:style-name="a1246" text:class-names=""/></text:p>
          </draw:text-box>
          <svg:title/>
          <svg:desc/>
        </draw:frame>
        <draw:frame draw:id="id172" draw:style-name="a1249" draw:name="Imagen 12" svg:x="8.28422in" svg:y="1.32951in" svg:width="1.4078in" svg:height="2.27064in" style:rel-width="scale" style:rel-height="scale">
          <draw:image xlink:href="media/image2.png" xlink:type="simple" xlink:show="embed" xlink:actuate="onLoad"/>
          <svg:title/>
          <svg:desc>Escala de tiempo

Descripción generada automáticamente</svg:desc>
        </draw:frame>
        <draw:frame draw:id="id173" draw:style-name="a1255" draw:name="CuadroTexto 13" svg:x="6.1243in" svg:y="1.93036in" svg:width="1.9in" svg:height="0.77415in">
          <draw:text-box>
            <text:p text:style-name="a1254" text:class-names="" text:cond-style-name=""><text:span text:style-name="a1250" text:class-names="">Multi-level</text:span><text:span text:style-name="a1251" text:class-names=""><text:s text:c="1"/></text:span><text:span text:style-name="a1252" text:class-names="">Inheritance</text:span><text:span text:style-name="a1253" text:class-names=""/></text:p>
          </draw:text-box>
          <svg:title/>
          <svg:desc/>
        </draw:frame>
        <draw:frame draw:id="id174" draw:style-name="a1256" draw:name="Imagen 15" svg:x="0in" svg:y="4.75571in" svg:width="4.60417in" svg:height="1.875in" style:rel-width="scale" style:rel-height="scale">
          <draw:image xlink:href="media/image3.png" xlink:type="simple" xlink:show="embed" xlink:actuate="onLoad"/>
          <svg:title/>
          <svg:desc>Escala de tiempo

Descripción generada automáticamente</svg:desc>
        </draw:frame>
        <draw:frame draw:id="id175" draw:style-name="a1262" draw:name="CuadroTexto 16" svg:x="0.55118in" svg:y="3.60015in" svg:width="1.9in" svg:height="0.77415in">
          <draw:text-box>
            <text:p text:style-name="a1261" text:class-names="" text:cond-style-name=""><text:span text:style-name="a1257" text:class-names="">Hierarchical</text:span><text:span text:style-name="a1258" text:class-names=""><text:s text:c="1"/></text:span><text:span text:style-name="a1259" text:class-names="">Inheritance</text:span><text:span text:style-name="a1260" text:class-names=""/></text:p>
          </draw:text-box>
          <svg:title/>
          <svg:desc/>
        </draw:frame>
        <draw:frame draw:id="id176" draw:style-name="a1263" draw:name="Imagen 3" svg:x="7.0743in" svg:y="3.787in" svg:width="3.71875in" svg:height="3.125in" style:rel-width="scale" style:rel-height="scale">
          <draw:image xlink:href="media/image4.png" xlink:type="simple" xlink:show="embed" xlink:actuate="onLoad"/>
          <svg:title/>
          <svg:desc>Diagrama

Descripción generada automáticamente</svg:desc>
        </draw:frame>
        <draw:frame draw:id="id177" draw:style-name="a1269" draw:name="CuadroTexto 14" svg:x="5.47014in" svg:y="5.01782in" svg:width="1.9in" svg:height="0.77415in">
          <draw:text-box>
            <text:p text:style-name="a1268" text:class-names="" text:cond-style-name=""><text:span text:style-name="a1264" text:class-names="">Hybrid</text:span><text:span text:style-name="a1265" text:class-names=""><text:s text:c="1"/></text:span><text:span text:style-name="a1266" text:class-names="">Inheritance</text:span><text:span text:style-name="a1267" text:class-names=""/></text:p>
          </draw:text-box>
          <svg:title/>
          <svg:desc/>
        </draw:frame>
        <presentation:notes draw:style-name="a1275">
          <draw:frame draw:id="id178" draw:style-name="a1272" draw:name="Marcador de número de diapositiva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179" presentation:style-name="a1273" draw:name="Marcador de imagen de diapositiva 1">
            <svg:title/>
            <svg:desc/>
          </draw:page-thumbnail>
          <draw:frame draw:id="id180" presentation:style-name="a127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276" draw:master-page-name="Master2-Layout7-blank-En-blanco" presentation:presentation-page-layout-name="Master2-PPL7" draw:id="Slide-260">
        <draw:frame draw:id="id181" presentation:style-name="a1289" draw:name="Título 1" svg:x="0.55118in" svg:y="0.32953in" svg:width="8.97638in" svg:height="0.75709in" presentation:class="title" presentation:placeholder="false">
          <draw:text-box>
            <text:p text:style-name="a1288" text:class-names="" text:cond-style-name=""><text:span text:style-name="a1277" text:class-names="">2. More<text:s text:c="1"/></text:span><text:span text:style-name="a1278" text:class-names="">Types</text:span><text:span text:style-name="a1279" text:class-names=""><text:s text:c="1"/></text:span><text:span text:style-name="a1280" text:class-names="">of</text:span><text:span text:style-name="a1281" text:class-names=""><text:s text:c="1"/></text:span><text:span text:style-name="a1282" text:class-names="">inheritance</text:span><text:span text:style-name="a1283" text:class-names=""><text:s text:c="1"/>(</text:span><text:span text:style-name="a1284" text:class-names="">not</text:span><text:span text:style-name="a1285" text:class-names=""><text:s text:c="1"/></text:span><text:span text:style-name="a1286" text:class-names="">permitted</text:span><text:span text:style-name="a1287" text:class-names=""><text:s text:c="1"/>in Java)</text:span></text:p>
          </draw:text-box>
          <svg:title/>
          <svg:desc/>
        </draw:frame>
        <draw:frame draw:id="id182" draw:style-name="a1295" draw:name="CuadroTexto 10" svg:x="0.85556in" svg:y="2.79701in" svg:width="1.9in" svg:height="0.77415in">
          <draw:text-box>
            <text:p text:style-name="a1294" text:class-names="" text:cond-style-name=""><text:span text:style-name="a1290" text:class-names="">Multiple</text:span><text:span text:style-name="a1291" text:class-names=""><text:s text:c="1"/></text:span><text:span text:style-name="a1292" text:class-names="">Inheritance</text:span><text:span text:style-name="a1293" text:class-names=""/></text:p>
          </draw:text-box>
          <svg:title/>
          <svg:desc/>
        </draw:frame>
        <draw:frame draw:id="id183" draw:style-name="a1296" draw:name="Imagen 20" svg:x="3.66667in" svg:y="2.35256in" svg:width="3.34236in" svg:height="2.00944in" style:rel-width="scale" style:rel-height="scale">
          <draw:image xlink:href="media/image5.png" xlink:type="simple" xlink:show="embed" xlink:actuate="onLoad"/>
          <svg:title/>
          <svg:desc>Diagrama

Descripción generada automáticamente</svg:desc>
        </draw:frame>
        <presentation:notes draw:style-name="a1302">
          <draw:frame draw:id="id184" draw:style-name="a1299" draw:name="Marcador de número de diapositiva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>6</text:page-number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185" presentation:style-name="a1300" draw:name="Marcador de imagen de diapositiva 1">
            <svg:title/>
            <svg:desc/>
          </draw:page-thumbnail>
          <draw:frame draw:id="id186" presentation:style-name="a130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303" draw:master-page-name="Master2-Layout7-blank-En-blanco" presentation:presentation-page-layout-name="Master2-PPL7" draw:id="Slide-261">
        <draw:frame draw:id="id187" presentation:style-name="a1312" draw:name="Título 1" svg:x="0.55118in" svg:y="0.32953in" svg:width="8.97638in" svg:height="0.75709in" presentation:class="title" presentation:placeholder="false">
          <draw:text-box>
            <text:p text:style-name="a1311" text:class-names="" text:cond-style-name=""><text:span text:style-name="a1304" text:class-names="">3.<text:s text:c="1"/></text:span><text:span text:style-name="a1305" text:class-names="">Examples</text:span><text:span text:style-name="a1306" text:class-names=""><text:s text:c="1"/></text:span><text:span text:style-name="a1307" text:class-names="">of</text:span><text:span text:style-name="a1308" text:class-names=""><text:s text:c="1"/></text:span><text:span text:style-name="a1309" text:class-names="">inheritance</text:span><text:span text:style-name="a1310" text:class-names=""/></text:p>
          </draw:text-box>
          <svg:title/>
          <svg:desc/>
        </draw:frame>
        <draw:frame draw:id="id188" draw:style-name="a1313" draw:name="Imagen 7" svg:x="2.7178in" svg:y="1.31955in" svg:width="5.91553in" svg:height="5.62827in" style:rel-width="scale" style:rel-height="scale">
          <draw:image xlink:href="media/image6.png" xlink:type="simple" xlink:show="embed" xlink:actuate="onLoad"/>
          <svg:title/>
          <svg:desc>Imagen que contiene Tabla

Descripción generada automáticamente</svg:desc>
        </draw:frame>
        <presentation:notes draw:style-name="a1319">
          <draw:frame draw:id="id189" draw:style-name="a1316" draw:name="Marcador de número de diapositiva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>7</text:page-number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190" presentation:style-name="a1317" draw:name="Marcador de imagen de diapositiva 1">
            <svg:title/>
            <svg:desc/>
          </draw:page-thumbnail>
          <draw:frame draw:id="id191" presentation:style-name="a131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320" draw:master-page-name="Master2-Layout7-blank-En-blanco" presentation:presentation-page-layout-name="Master2-PPL7" draw:id="Slide-266">
        <draw:frame draw:id="id192" presentation:style-name="a1329" draw:name="Título 1" svg:x="0.55118in" svg:y="0.32953in" svg:width="8.97638in" svg:height="0.75709in" presentation:class="title" presentation:placeholder="false">
          <draw:text-box>
            <text:p text:style-name="a1328" text:class-names="" text:cond-style-name=""><text:span text:style-name="a1321" text:class-names="">3.<text:s text:c="1"/></text:span><text:span text:style-name="a1322" text:class-names="">Examples</text:span><text:span text:style-name="a1323" text:class-names=""><text:s text:c="1"/></text:span><text:span text:style-name="a1324" text:class-names="">of</text:span><text:span text:style-name="a1325" text:class-names=""><text:s text:c="1"/></text:span><text:span text:style-name="a1326" text:class-names="">inheritance</text:span><text:span text:style-name="a1327" text:class-names=""/></text:p>
          </draw:text-box>
          <svg:title/>
          <svg:desc/>
        </draw:frame>
        <draw:frame draw:id="id193" draw:style-name="a1330" draw:name="Imagen 3" svg:x="0.89826in" svg:y="0.94799in" svg:width="9.49164in" svg:height="6.8096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36">
          <draw:frame draw:id="id194" draw:style-name="a1333" draw:name="Marcador de número de diapositiva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>8</text:page-number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195" presentation:style-name="a1334" draw:name="Marcador de imagen de diapositiva 1">
            <svg:title/>
            <svg:desc/>
          </draw:page-thumbnail>
          <draw:frame draw:id="id196" presentation:style-name="a133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337" draw:master-page-name="Master2-Layout7-blank-En-blanco" presentation:presentation-page-layout-name="Master2-PPL7" draw:id="Slide-263">
        <draw:frame draw:id="id197" presentation:style-name="a1344" draw:name="Título 1" svg:x="0.55118in" svg:y="0.32953in" svg:width="8.97638in" svg:height="0.75709in" presentation:class="title" presentation:placeholder="false">
          <draw:text-box>
            <text:p text:style-name="a1343" text:class-names="" text:cond-style-name=""><text:span text:style-name="a1338" text:class-names="">4.<text:s text:c="1"/></text:span><text:span text:style-name="a1339" text:class-names="">Extending</text:span><text:span text:style-name="a1340" text:class-names=""><text:s text:c="1"/>a<text:s text:c="1"/></text:span><text:span text:style-name="a1341" text:class-names="">class</text:span><text:span text:style-name="a1342" text:class-names=""/></text:p>
          </draw:text-box>
          <svg:title/>
          <svg:desc/>
        </draw:frame>
        <draw:frame draw:id="id198" draw:style-name="a1353" draw:name="Marcador de texto 2" svg:x="0.87891in" svg:y="1.3638in" svg:width="9.26648in" svg:height="5.53976in">
          <draw:text-box>
            <text:p text:style-name="a1348" text:class-names="" text:cond-style-name=""><text:span text:style-name="a1345" text:class-names="">To create a child or derived class we use the<text:s text:c="1"/></text:span><text:span text:style-name="a1346" text:class-names="">extend</text:span><text:span text:style-name="a1347" text:class-names=""><text:s text:c="1"/>keyword.</text:span></text:p>
            <text:p text:style-name="a1350" text:class-names="" text:cond-style-name=""><text:span text:style-name="a1349" text:class-names=""/></text:p>
            <text:p text:style-name="a1352" text:class-names="" text:cond-style-name=""><text:span text:style-name="a1351" text:class-names="">We created the class Point in the last unit and now we want to create the class Point3D, to represent a new coordinate, z.</text:span></text:p>
          </draw:text-box>
          <svg:title/>
          <svg:desc/>
        </draw:frame>
        <presentation:notes draw:style-name="a1359">
          <draw:frame draw:id="id199" draw:style-name="a1356" draw:name="Marcador de número de diapositiva 6" svg:x="4.67953in" svg:y="11.10827in" svg:width="3.5878in" svg:height="0.58425in">
            <draw:text-box>
              <text:p text:style-name="a1355" text:class-names="" text:cond-style-name=""><text:span text:style-name="a1354" text:class-names=""><text:page-number style:num-format="1" text:fixed="false">9</text:page-number></text:span></text:p>
            </draw:text-box>
            <svg:title/>
            <svg:desc/>
          </draw:frame>
          <draw:page-thumbnail draw:page-number="9" svg:x="1.21181in" svg:y="0.89063in" svg:width="5.84722in" svg:height="4.38542in" presentation:class="page" draw:id="id200" presentation:style-name="a1357" draw:name="Marcador de imagen de diapositiva 1">
            <svg:title/>
            <svg:desc/>
          </draw:page-thumbnail>
          <draw:frame draw:id="id201" presentation:style-name="a135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60" draw:master-page-name="Master2-Layout7-blank-En-blanco" presentation:presentation-page-layout-name="Master2-PPL7" draw:id="Slide-264">
        <draw:frame draw:id="id202" presentation:style-name="a1367" draw:name="Título 1" svg:x="6.31111in" svg:y="1.78543in" svg:width="5.70534in" svg:height="0.75709in" presentation:class="title" presentation:placeholder="false">
          <draw:text-box>
            <text:p text:style-name="a1366" text:class-names="" text:cond-style-name=""><text:span text:style-name="a1361" text:class-names="">4.<text:s text:c="1"/></text:span><text:span text:style-name="a1362" text:class-names="">Extending</text:span><text:span text:style-name="a1363" text:class-names=""><text:s text:c="1"/><text:line-break/>a<text:s text:c="1"/></text:span><text:span text:style-name="a1364" text:class-names="">class</text:span><text:span text:style-name="a1365" text:class-names=""/></text:p>
          </draw:text-box>
          <svg:title/>
          <svg:desc/>
        </draw:frame>
        <draw:frame draw:id="id203" draw:style-name="a1511" draw:name="Marcador de texto 2" svg:x="1.15669in" svg:y="0.74217in" svg:width="9.26648in" svg:height="6.09116in">
          <draw:text-box>
            <text:p text:style-name="a1371" text:class-names="" text:cond-style-name=""><text:span text:style-name="a1368" text:class-names="">class</text:span><text:span text:style-name="a1369" text:class-names=""><text:s text:c="1"/>Point {</text:span><text:span text:style-name="a1370" text:class-names=""/></text:p>
            <text:p text:style-name="a1387" text:class-names="" text:cond-style-name=""><text:span text:style-name="a1372" text:class-names=""><text:tab/></text:span><text:span text:style-name="a1373" text:class-names="">p</text:span><text:span text:style-name="a1374" text:class-names="">rote</text:span><text:span text:style-name="a1375" text:class-names="">cted</text:span><text:span text:style-name="a1376" text:class-names=""><text:s text:c="1"/></text:span><text:span text:style-name="a1377" text:class-names="">double</text:span><text:span text:style-name="a1378" text:class-names=""><text:s text:c="1"/>x; //x<text:s text:c="1"/></text:span><text:span text:style-name="a1379" text:class-names="">value</text:span><text:span text:style-name="a1380" text:class-names=""><text:s text:c="1"/></text:span><text:span text:style-name="a1381" text:class-names="">of</text:span><text:span text:style-name="a1382" text:class-names=""><text:s text:c="1"/></text:span><text:span text:style-name="a1383" text:class-names="">the</text:span><text:span text:style-name="a1384" text:class-names=""><text:s text:c="1"/></text:span><text:span text:style-name="a1385" text:class-names="">point</text:span><text:span text:style-name="a1386" text:class-names=""/></text:p>
            <text:p text:style-name="a1401" text:class-names="" text:cond-style-name=""><text:span text:style-name="a1388" text:class-names=""><text:tab/></text:span><text:span text:style-name="a1389" text:class-names="">protected</text:span><text:span text:style-name="a1390" text:class-names=""><text:s text:c="1"/></text:span><text:span text:style-name="a1391" text:class-names="">double</text:span><text:span text:style-name="a1392" text:class-names=""><text:s text:c="1"/>y; //y<text:s text:c="1"/></text:span><text:span text:style-name="a1393" text:class-names="">value</text:span><text:span text:style-name="a1394" text:class-names=""><text:s text:c="1"/></text:span><text:span text:style-name="a1395" text:class-names="">of</text:span><text:span text:style-name="a1396" text:class-names=""><text:s text:c="1"/></text:span><text:span text:style-name="a1397" text:class-names="">the</text:span><text:span text:style-name="a1398" text:class-names=""><text:s text:c="1"/></text:span><text:span text:style-name="a1399" text:class-names="">point</text:span><text:span text:style-name="a1400" text:class-names=""/></text:p>
            <text:p text:style-name="a1406" text:class-names="" text:cond-style-name=""><text:span text:style-name="a1402" text:class-names=""><text:tab/>public Point(double abs, double<text:s text:c="1"/></text:span><text:span text:style-name="a1403" text:class-names="">ord</text:span><text:span text:style-name="a1404" text:class-names="">) {</text:span><text:span text:style-name="a1405" text:class-names=""/></text:p>
            <text:p text:style-name="a1411" text:class-names="" text:cond-style-name=""><text:span text:style-name="a1407" text:class-names=""><text:tab/><text:tab/>x =<text:s text:c="1"/></text:span><text:span text:style-name="a1408" text:class-names="">abs</text:span><text:span text:style-name="a1409" text:class-names="">;</text:span><text:span text:style-name="a1410" text:class-names=""/></text:p>
            <text:p text:style-name="a1416" text:class-names="" text:cond-style-name=""><text:span text:style-name="a1412" text:class-names=""><text:tab/><text:tab/>y =<text:s text:c="1"/></text:span><text:span text:style-name="a1413" text:class-names="">ord</text:span><text:span text:style-name="a1414" text:class-names="">; }</text:span><text:span text:style-name="a1415" text:class-names=""/></text:p>
            <text:p text:style-name="a1429" text:class-names="" text:cond-style-name=""><text:span text:style-name="a1417" text:class-names=""><text:tab/></text:span><text:span text:style-name="a1418" text:class-names="">public</text:span><text:span text:style-name="a1419" text:class-names=""><text:s text:c="1"/></text:span><text:span text:style-name="a1420" text:class-names="">double</text:span><text:span text:style-name="a1421" text:class-names=""><text:s text:c="1"/></text:span><text:span text:style-name="a1422" text:class-names="">getX</text:span><text:span text:style-name="a1423" text:class-names="">() {<text:s text:c="1"/></text:span><text:span text:style-name="a1424" text:class-names="">return</text:span><text:span text:style-name="a1425" text:class-names=""><text:s text:c="1"/></text:span><text:span text:style-name="a1426" text:class-names="">x</text:span><text:span text:style-name="a1427" text:class-names="">; }</text:span><text:span text:style-name="a1428" text:class-names=""/></text:p>
            <text:p text:style-name="a1440" text:class-names="" text:cond-style-name=""><text:span text:style-name="a1430" text:class-names=""><text:tab/></text:span><text:span text:style-name="a1431" text:class-names="">public</text:span><text:span text:style-name="a1432" text:class-names=""><text:s text:c="1"/></text:span><text:span text:style-name="a1433" text:class-names="">double</text:span><text:span text:style-name="a1434" text:class-names=""><text:s text:c="1"/></text:span><text:span text:style-name="a1435" text:class-names="">getY</text:span><text:span text:style-name="a1436" text:class-names="">() {<text:s text:c="1"/></text:span><text:span text:style-name="a1437" text:class-names="">return</text:span><text:span text:style-name="a1438" text:class-names=""><text:s text:c="1"/>y; }</text:span><text:span text:style-name="a1439" text:class-names=""/></text:p>
            <text:p text:style-name="a1451" text:class-names="" text:cond-style-name=""><text:span text:style-name="a1441" text:class-names=""><text:tab/></text:span><text:span text:style-name="a1442" text:class-names="">public</text:span><text:span text:style-name="a1443" text:class-names=""><text:s text:c="1"/></text:span><text:span text:style-name="a1444" text:class-names="">String</text:span><text:span text:style-name="a1445" text:class-names=""><text:s text:c="1"/></text:span><text:span text:style-name="a1446" text:class-names="">toString</text:span><text:span text:style-name="a1447" text:class-names="">(){<text:s text:c="1"/></text:span><text:span text:style-name="a1448" text:class-names="">return</text:span><text:span text:style-name="a1449" text:class-names=""><text:s text:c="1"/>“(“+x+”, “+y+”)”; }</text:span><text:span text:style-name="a1450" text:class-names=""/></text:p>
            <text:p text:style-name="a1464" text:class-names="" text:cond-style-name=""><text:span text:style-name="a1452" text:class-names=""><text:tab/></text:span><text:span text:style-name="a1453" text:class-names="">public</text:span><text:span text:style-name="a1454" text:class-names=""><text:s text:c="1"/></text:span><text:span text:style-name="a1455" text:class-names="">void</text:span><text:span text:style-name="a1456" text:class-names=""><text:s text:c="1"/></text:span><text:span text:style-name="a1457" text:class-names="">setX</text:span><text:span text:style-name="a1458" text:class-names="">(</text:span><text:span text:style-name="a1459" text:class-names="">double</text:span><text:span text:style-name="a1460" text:class-names=""><text:s text:c="1"/>x) {<text:s text:c="1"/></text:span><text:span text:style-name="a1461" text:class-names="">this.x</text:span><text:span text:style-name="a1462" text:class-names="">=x; }</text:span><text:span text:style-name="a1463" text:class-names=""/></text:p>
            <text:p text:style-name="a1477" text:class-names="" text:cond-style-name=""><text:span text:style-name="a1465" text:class-names=""><text:tab/></text:span><text:span text:style-name="a1466" text:class-names="">public</text:span><text:span text:style-name="a1467" text:class-names=""><text:s text:c="1"/></text:span><text:span text:style-name="a1468" text:class-names="">void</text:span><text:span text:style-name="a1469" text:class-names=""><text:s text:c="1"/></text:span><text:span text:style-name="a1470" text:class-names="">setY</text:span><text:span text:style-name="a1471" text:class-names="">(</text:span><text:span text:style-name="a1472" text:class-names="">double</text:span><text:span text:style-name="a1473" text:class-names=""><text:s text:c="1"/>y) {<text:s text:c="1"/></text:span><text:span text:style-name="a1474" text:class-names="">this.y</text:span><text:span text:style-name="a1475" text:class-names="">=y; }</text:span><text:span text:style-name="a1476" text:class-names=""/></text:p>
            <text:p text:style-name="a1484" text:class-names="" text:cond-style-name=""><text:span text:style-name="a1478" text:class-names=""><text:tab/>public void<text:s text:c="1"/></text:span><text:span text:style-name="a1479" text:class-names="">setXY</text:span><text:span text:style-name="a1480" text:class-names="">(double abs, double<text:s text:c="1"/></text:span><text:span text:style-name="a1481" text:class-names="">ord</text:span><text:span text:style-name="a1482" text:class-names="">) {</text:span><text:span text:style-name="a1483" text:class-names=""/></text:p>
            <text:p text:style-name="a1489" text:class-names="" text:cond-style-name=""><text:span text:style-name="a1485" text:class-names=""><text:tab/><text:tab/></text:span><text:span text:style-name="a1486" text:class-names="">x = abs; <text:s text:c="1"/>y =<text:s text:c="1"/></text:span><text:span text:style-name="a1487" text:class-names="">ord</text:span><text:span text:style-name="a1488" text:class-names="">; }</text:span></text:p>
            <text:p text:style-name="a1498" text:class-names="" text:cond-style-name=""><text:span text:style-name="a1490" text:class-names=""><text:tab/>public double<text:s text:c="1"/></text:span><text:span text:style-name="a1491" text:class-names="">distOrigin</text:span><text:span text:style-name="a1492" text:class-names="">() { <text:s text:c="1"/></text:span><text:span text:style-name="a1493" text:class-names="">return</text:span><text:span text:style-name="a1494" text:class-names="">(</text:span><text:span text:style-name="a1495" text:class-names="">Math.sqrt</text:span><text:span text:style-name="a1496" text:class-names="">(x*x + y*y));<text:s text:c="1"/></text:span><text:span text:style-name="a1497" text:class-names="">}</text:span></text:p>
            <text:p text:style-name="a1510" text:class-names="" text:cond-style-name=""><text:span text:style-name="a1499" text:class-names=""><text:line-break/></text:span><text:span text:style-name="a1500" text:class-names="">}<text:s text:c="1"/></text:span><text:span text:style-name="a1501" text:class-names="">//<text:s text:c="1"/></text:span><text:span text:style-name="a1502" text:class-names="">end</text:span><text:span text:style-name="a1503" text:class-names=""><text:s text:c="1"/></text:span><text:span text:style-name="a1504" text:class-names="">of</text:span><text:span text:style-name="a1505" text:class-names=""><text:s text:c="1"/></text:span><text:span text:style-name="a1506" text:class-names="">the</text:span><text:span text:style-name="a1507" text:class-names=""><text:s text:c="1"/></text:span><text:span text:style-name="a1508" text:class-names="">class</text:span><text:span text:style-name="a1509" text:class-names=""/></text:p>
          </draw:text-box>
          <svg:title/>
          <svg:desc/>
        </draw:frame>
        <presentation:notes draw:style-name="a1517">
          <draw:frame draw:id="id204" draw:style-name="a1514" draw:name="Marcador de número de diapositiva 6" svg:x="4.67953in" svg:y="11.10827in" svg:width="3.5878in" svg:height="0.58425in">
            <draw:text-box>
              <text:p text:style-name="a1513" text:class-names="" text:cond-style-name=""><text:span text:style-name="a1512" text:class-names=""><text:page-number style:num-format="1" text:fixed="false">10</text:page-number></text:span></text:p>
            </draw:text-box>
            <svg:title/>
            <svg:desc/>
          </draw:frame>
          <draw:page-thumbnail draw:page-number="10" svg:x="1.21181in" svg:y="0.89063in" svg:width="5.84722in" svg:height="4.38542in" presentation:class="page" draw:id="id205" presentation:style-name="a1515" draw:name="Marcador de imagen de diapositiva 1">
            <svg:title/>
            <svg:desc/>
          </draw:page-thumbnail>
          <draw:frame draw:id="id206" presentation:style-name="a151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518" draw:master-page-name="Master2-Layout7-blank-En-blanco" presentation:presentation-page-layout-name="Master2-PPL7" draw:id="Slide-265">
        <draw:frame draw:id="id207" presentation:style-name="a1525" draw:name="Título 1" svg:x="0.55118in" svg:y="0.32953in" svg:width="8.97638in" svg:height="0.75709in" presentation:class="title" presentation:placeholder="false">
          <draw:text-box>
            <text:p text:style-name="a1524" text:class-names="" text:cond-style-name=""><text:span text:style-name="a1519" text:class-names="">4.<text:s text:c="1"/></text:span><text:span text:style-name="a1520" text:class-names="">Extending</text:span><text:span text:style-name="a1521" text:class-names=""><text:s text:c="1"/>a<text:s text:c="1"/></text:span><text:span text:style-name="a1522" text:class-names="">class</text:span><text:span text:style-name="a1523" text:class-names=""/></text:p>
          </draw:text-box>
          <svg:title/>
          <svg:desc/>
        </draw:frame>
        <draw:frame draw:id="id208" draw:style-name="a1629" draw:name="Marcador de texto 2" svg:x="0.87891in" svg:y="1.3638in" svg:width="9.26648in" svg:height="5.53976in">
          <draw:text-box>
            <text:p text:style-name="a1529" text:class-names="" text:cond-style-name=""><text:span text:style-name="a1526" text:class-names="">c</text:span><text:span text:style-name="a1527" text:class-names="">lass Point3D extends Point {</text:span><text:span text:style-name="a1528" text:class-names=""/></text:p>
            <text:p text:style-name="a1532" text:class-names="" text:cond-style-name=""><text:span text:style-name="a1530" text:class-names="">private double z;</text:span><text:span text:style-name="a1531" text:class-names=""/></text:p>
            <text:p text:style-name="a1535" text:class-names="" text:cond-style-name=""><text:span text:style-name="a1533" text:class-names=""> </text:span><text:span text:style-name="a1534" text:class-names="">//constructor</text:span></text:p>
            <text:p text:style-name="a1538" text:class-names="" text:cond-style-name=""><text:span text:style-name="a1536" text:class-names="">public Point3D(double x, double y, double z) {</text:span><text:span text:style-name="a1537" text:class-names=""/></text:p>
            <text:p text:style-name="a1565" text:class-names="" text:cond-style-name=""><text:span text:style-name="a1539" text:class-names=""><text:tab/></text:span><text:span text:style-name="a1540" text:class-names="">super(</text:span><text:span text:style-name="a1541" text:class-names="">x,y</text:span><text:span text:style-name="a1542" text:class-names="">); //</text:span><text:span text:style-name="a1543" text:class-names="">call</text:span><text:span text:style-name="a1544" text:class-names="">ing</text:span><text:span text:style-name="a1545" text:class-names=""><text:s text:c="1"/></text:span><text:span text:style-name="a1546" text:class-names="">the</text:span><text:span text:style-name="a1547" text:class-names=""><text:s text:c="1"/>constructor<text:s text:c="1"/></text:span><text:span text:style-name="a1548" text:class-names="">of</text:span><text:span text:style-name="a1549" text:class-names=""><text:s text:c="1"/></text:span><text:span text:style-name="a1550" text:class-names="">the</text:span><text:span text:style-name="a1551" text:class-names=""><text:s text:c="1"/></text:span><text:span text:style-name="a1552" text:class-names="">parent</text:span><text:span text:style-name="a1553" text:class-names=""><text:s text:c="1"/></text:span><text:span text:style-name="a1554" text:class-names="">class</text:span><text:span text:style-name="a1555" text:class-names="">. //<text:s text:c="1"/></text:span><text:span text:style-name="a1556" text:class-names="">It</text:span><text:span text:style-name="a1557" text:class-names=""><text:s text:c="1"/></text:span><text:span text:style-name="a1558" text:class-names="">must</text:span><text:span text:style-name="a1559" text:class-names=""><text:s text:c="1"/>be<text:s text:c="1"/></text:span><text:span text:style-name="a1560" text:class-names="">the</text:span><text:span text:style-name="a1561" text:class-names=""><text:s text:c="1"/></text:span><text:span text:style-name="a1562" text:class-names="">first</text:span><text:span text:style-name="a1563" text:class-names=""><text:s text:c="1"/>line</text:span><text:span text:style-name="a1564" text:class-names=""/></text:p>
            <text:p text:style-name="a1570" text:class-names="" text:cond-style-name=""><text:span text:style-name="a1566" text:class-names=""><text:tab/></text:span><text:span text:style-name="a1567" text:class-names="">this.z</text:span><text:span text:style-name="a1568" text:class-names="">=z;}</text:span><text:span text:style-name="a1569" text:class-names=""/></text:p>
            <text:p text:style-name="a1575" text:class-names="" text:cond-style-name=""><text:span text:style-name="a1571" text:class-names="">public double<text:s text:c="1"/></text:span><text:span text:style-name="a1572" text:class-names="">getZ</text:span><text:span text:style-name="a1573" text:class-names="">() {</text:span><text:span text:style-name="a1574" text:class-names=""/></text:p>
            <text:p text:style-name="a1580" text:class-names="" text:cond-style-name=""><text:span text:style-name="a1576" text:class-names=""><text:tab/>return (</text:span><text:span text:style-name="a1577" text:class-names="">this.z</text:span><text:span text:style-name="a1578" text:class-names="">);}</text:span><text:span text:style-name="a1579" text:class-names=""/></text:p>
            <text:p text:style-name="a1599" text:class-names="" text:cond-style-name=""><text:span text:style-name="a1581" text:class-names=""> </text:span><text:span text:style-name="a1582" text:class-names="">//<text:s text:c="1"/></text:span><text:span text:style-name="a1583" text:class-names="">method</text:span><text:span text:style-name="a1584" text:class-names=""><text:s text:c="1"/></text:span><text:span text:style-name="a1585" text:class-names="">distOrigin</text:span><text:span text:style-name="a1586" text:class-names=""><text:s text:c="1"/></text:span><text:span text:style-name="a1587" text:class-names="">overrides</text:span><text:span text:style-name="a1588" text:class-names=""><text:s text:c="1"/></text:span><text:span text:style-name="a1589" text:class-names="">the</text:span><text:span text:style-name="a1590" text:class-names=""><text:s text:c="1"/></text:span><text:span text:style-name="a1591" text:class-names="">method</text:span><text:span text:style-name="a1592" text:class-names=""><text:s text:c="1"/>in<text:s text:c="1"/></text:span><text:span text:style-name="a1593" text:class-names="">the</text:span><text:span text:style-name="a1594" text:class-names=""><text:s text:c="1"/></text:span><text:span text:style-name="a1595" text:class-names="">parent</text:span><text:span text:style-name="a1596" text:class-names=""><text:s text:c="1"/></text:span><text:span text:style-name="a1597" text:class-names="">class</text:span><text:span text:style-name="a1598" text:class-names=""/></text:p>
            <text:p text:style-name="a1607" text:class-names="" text:cond-style-name=""><text:span text:style-name="a1600" text:class-names="">public</text:span><text:span text:style-name="a1601" text:class-names=""><text:s text:c="1"/></text:span><text:span text:style-name="a1602" text:class-names="">double</text:span><text:span text:style-name="a1603" text:class-names=""><text:s text:c="1"/></text:span><text:span text:style-name="a1604" text:class-names="">distOrigin</text:span><text:span text:style-name="a1605" text:class-names="">() {</text:span><text:span text:style-name="a1606" text:class-names=""/></text:p>
            <text:p text:style-name="a1618" text:class-names="" text:cond-style-name=""><text:span text:style-name="a1608" text:class-names=""><text:tab/></text:span><text:span text:style-name="a1609" text:class-names="">return</text:span><text:span text:style-name="a1610" text:class-names=""><text:s text:c="1"/>(</text:span><text:span text:style-name="a1611" text:class-names="">Math.sqrt</text:span><text:span text:style-name="a1612" text:class-names="">(x*</text:span><text:span text:style-name="a1613" text:class-names="">x+y</text:span><text:span text:style-name="a1614" text:class-names="">*</text:span><text:span text:style-name="a1615" text:class-names="">y+z</text:span><text:span text:style-name="a1616" text:class-names="">*z));}</text:span><text:span text:style-name="a1617" text:class-names=""/></text:p>
            <text:p text:style-name="a1628" text:class-names="" text:cond-style-name=""><text:span text:style-name="a1619" text:class-names="">} //</text:span><text:span text:style-name="a1620" text:class-names="">end</text:span><text:span text:style-name="a1621" text:class-names=""><text:s text:c="1"/></text:span><text:span text:style-name="a1622" text:class-names="">of</text:span><text:span text:style-name="a1623" text:class-names=""><text:s text:c="1"/></text:span><text:span text:style-name="a1624" text:class-names="">the</text:span><text:span text:style-name="a1625" text:class-names=""><text:s text:c="1"/></text:span><text:span text:style-name="a1626" text:class-names="">class</text:span><text:span text:style-name="a1627" text:class-names=""/></text:p>
          </draw:text-box>
          <svg:title/>
          <svg:desc/>
        </draw:frame>
        <presentation:notes draw:style-name="a1635">
          <draw:frame draw:id="id209" draw:style-name="a1632" draw:name="Marcador de número de diapositiva 6" svg:x="4.67953in" svg:y="11.10827in" svg:width="3.5878in" svg:height="0.58425in">
            <draw:text-box>
              <text:p text:style-name="a1631" text:class-names="" text:cond-style-name=""><text:span text:style-name="a1630" text:class-names=""><text:page-number style:num-format="1" text:fixed="false">11</text:page-number></text:span></text:p>
            </draw:text-box>
            <svg:title/>
            <svg:desc/>
          </draw:frame>
          <draw:page-thumbnail draw:page-number="11" svg:x="1.21181in" svg:y="0.89063in" svg:width="5.84722in" svg:height="4.38542in" presentation:class="page" draw:id="id210" presentation:style-name="a1633" draw:name="Marcador de imagen de diapositiva 1">
            <svg:title/>
            <svg:desc/>
          </draw:page-thumbnail>
          <draw:frame draw:id="id211" presentation:style-name="a163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636" draw:master-page-name="Master2-Layout7-blank-En-blanco" presentation:presentation-page-layout-name="Master2-PPL7" draw:id="Slide-267">
        <draw:frame draw:id="id212" presentation:style-name="a1643" draw:name="Título 1" svg:x="0.55118in" svg:y="0.32953in" svg:width="8.97638in" svg:height="0.75709in" presentation:class="title" presentation:placeholder="false">
          <draw:text-box>
            <text:p text:style-name="a1642" text:class-names="" text:cond-style-name=""><text:span text:style-name="a1637" text:class-names="">4.a.<text:s text:c="1"/></text:span><text:span text:style-name="a1638" text:class-names="">Overriding</text:span><text:span text:style-name="a1639" text:class-names=""><text:s text:c="1"/></text:span><text:span text:style-name="a1640" text:class-names="">methods</text:span><text:span text:style-name="a1641" text:class-names=""/></text:p>
          </draw:text-box>
          <svg:title/>
          <svg:desc/>
        </draw:frame>
        <draw:frame draw:id="id213" draw:style-name="a1675" draw:name="Marcador de texto 2" svg:x="0.87891in" svg:y="1.3638in" svg:width="9.26648in" svg:height="5.53976in">
          <draw:text-box>
            <text:p text:style-name="a1645" text:class-names="" text:cond-style-name=""><text:span text:style-name="a1644" text:class-names="">Although a derived class inherits methods from the base class, it can change or override an inherited method if necessary.</text:span></text:p>
            <text:p text:style-name="a1647" text:class-names="" text:cond-style-name=""><text:span text:style-name="a1646" text:class-names="">In order to override a method definition, a new definition of the method is simply placed in the class definition, just like any other method that is added to the derived class.</text:span></text:p>
            <text:p text:style-name="a1649" text:class-names="" text:cond-style-name=""><text:span text:style-name="a1648" text:class-names="">This is exactly what we do in the method<text:s text:c="1"/></text:span></text:p>
            <text:p text:style-name="a1657" text:class-names="" text:cond-style-name=""><text:span text:style-name="a1650" text:class-names="">public</text:span><text:span text:style-name="a1651" text:class-names=""><text:s text:c="1"/></text:span><text:span text:style-name="a1652" text:class-names="">double</text:span><text:span text:style-name="a1653" text:class-names=""><text:s text:c="1"/></text:span><text:span text:style-name="a1654" text:class-names="">distOrigin</text:span><text:span text:style-name="a1655" text:class-names="">() {</text:span><text:span text:style-name="a1656" text:class-names=""/></text:p>
            <text:p text:style-name="a1668" text:class-names="" text:cond-style-name=""><text:span text:style-name="a1658" text:class-names=""><text:tab/></text:span><text:span text:style-name="a1659" text:class-names="">return</text:span><text:span text:style-name="a1660" text:class-names=""><text:s text:c="1"/>(</text:span><text:span text:style-name="a1661" text:class-names="">Math.sqrt</text:span><text:span text:style-name="a1662" text:class-names="">(x*</text:span><text:span text:style-name="a1663" text:class-names="">x+y</text:span><text:span text:style-name="a1664" text:class-names="">*</text:span><text:span text:style-name="a1665" text:class-names="">y+z</text:span><text:span text:style-name="a1666" text:class-names="">*z));}</text:span><text:span text:style-name="a1667" text:class-names=""/></text:p>
            <text:p text:style-name="a1671" text:class-names="" text:cond-style-name=""><text:span text:style-name="a1669" text:class-names="">}</text:span><text:span text:style-name="a1670" text:class-names=""/></text:p>
            <text:p text:style-name="a1674" text:class-names="" text:cond-style-name=""><text:span text:style-name="a1672" text:class-names="">Of Point3D class</text:span><text:span text:style-name="a1673" text:class-names=""/></text:p>
          </draw:text-box>
          <svg:title/>
          <svg:desc/>
        </draw:frame>
        <presentation:notes draw:style-name="a1681">
          <draw:frame draw:id="id214" draw:style-name="a1678" draw:name="Marcador de número de diapositiva 6" svg:x="4.67953in" svg:y="11.10827in" svg:width="3.5878in" svg:height="0.58425in">
            <draw:text-box>
              <text:p text:style-name="a1677" text:class-names="" text:cond-style-name=""><text:span text:style-name="a1676" text:class-names=""><text:page-number style:num-format="1" text:fixed="false">12</text:page-number></text:span></text:p>
            </draw:text-box>
            <svg:title/>
            <svg:desc/>
          </draw:frame>
          <draw:page-thumbnail draw:page-number="12" svg:x="1.21181in" svg:y="0.89063in" svg:width="5.84722in" svg:height="4.38542in" presentation:class="page" draw:id="id215" presentation:style-name="a1679" draw:name="Marcador de imagen de diapositiva 1">
            <svg:title/>
            <svg:desc/>
          </draw:page-thumbnail>
          <draw:frame draw:id="id216" presentation:style-name="a168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682" draw:master-page-name="Master2-Layout7-blank-En-blanco" presentation:presentation-page-layout-name="Master2-PPL7" draw:id="Slide-268">
        <draw:frame draw:id="id217" presentation:style-name="a1689" draw:name="Título 1" svg:x="0.55118in" svg:y="0.32953in" svg:width="8.97638in" svg:height="0.75709in" presentation:class="title" presentation:placeholder="false">
          <draw:text-box>
            <text:p text:style-name="a1688" text:class-names="" text:cond-style-name=""><text:span text:style-name="a1683" text:class-names="">4.b.<text:s text:c="1"/></text:span><text:span text:style-name="a1684" text:class-names="">protected</text:span><text:span text:style-name="a1685" text:class-names=""><text:s text:c="1"/></text:span><text:span text:style-name="a1686" text:class-names="">access</text:span><text:span text:style-name="a1687" text:class-names=""/></text:p>
          </draw:text-box>
          <svg:title/>
          <svg:desc/>
        </draw:frame>
        <draw:frame draw:id="id218" draw:style-name="a1758" draw:name="Marcador de texto 2" svg:x="0.87891in" svg:y="1.3638in" svg:width="9.26648in" svg:height="5.53976in">
          <draw:text-box>
            <text:p text:style-name="a1716" text:class-names="" text:cond-style-name=""><text:span text:style-name="a1690" text:class-names="">The</text:span><text:span text:style-name="a1691" text:class-names=""><text:s text:c="1"/></text:span><text:span text:style-name="a1692" text:class-names="">access</text:span><text:span text:style-name="a1693" text:class-names=""><text:s text:c="1"/></text:span><text:span text:style-name="a1694" text:class-names="">modifier</text:span><text:span text:style-name="a1695" text:class-names=""><text:s text:c="1"/></text:span><text:span text:style-name="a1696" text:class-names="">protected</text:span><text:span text:style-name="a1697" text:class-names=""><text:s text:c="1"/></text:span><text:span text:style-name="a1698" text:class-names="">is</text:span><text:span text:style-name="a1699" text:class-names=""><text:s text:c="1"/></text:span><text:span text:style-name="a1700" text:class-names="">used</text:span><text:span text:style-name="a1701" text:class-names=""><text:s text:c="1"/></text:span><text:span text:style-name="a1702" text:class-names="">to</text:span><text:span text:style-name="a1703" text:class-names=""><text:s text:c="1"/></text:span><text:span text:style-name="a1704" text:class-names="">let</text:span><text:span text:style-name="a1705" text:class-names=""><text:s text:c="1"/></text:span><text:span text:style-name="a1706" text:class-names="">the</text:span><text:span text:style-name="a1707" text:class-names=""><text:s text:c="1"/></text:span><text:span text:style-name="a1708" text:class-names="">child</text:span><text:span text:style-name="a1709" text:class-names=""><text:s text:c="1"/></text:span><text:span text:style-name="a1710" text:class-names="">classes</text:span><text:span text:style-name="a1711" text:class-names=""><text:s text:c="1"/>use<text:s text:c="1"/></text:span><text:span text:style-name="a1712" text:class-names="">that</text:span><text:span text:style-name="a1713" text:class-names=""><text:s text:c="1"/></text:span><text:span text:style-name="a1714" text:class-names="">members</text:span><text:span text:style-name="a1715" text:class-names="">.</text:span></text:p>
            <text:p text:style-name="a1720" text:class-names="" text:cond-style-name=""><text:span text:style-name="a1717" text:class-names="">c</text:span><text:span text:style-name="a1718" text:class-names="">lass Point {</text:span><text:span text:style-name="a1719" text:class-names=""/></text:p>
            <text:p text:style-name="a1723" text:class-names="" text:cond-style-name=""><text:span text:style-name="a1721" text:class-names=""><text:tab/>protected double x;</text:span><text:span text:style-name="a1722" text:class-names=""/></text:p>
            <text:p text:style-name="a1730" text:class-names="" text:cond-style-name=""><text:span text:style-name="a1724" text:class-names=""><text:tab/></text:span><text:span text:style-name="a1725" text:class-names="">protected</text:span><text:span text:style-name="a1726" text:class-names=""><text:s text:c="1"/></text:span><text:span text:style-name="a1727" text:class-names="">double</text:span><text:span text:style-name="a1728" text:class-names=""><text:s text:c="1"/>y;</text:span><text:span text:style-name="a1729" text:class-names=""/></text:p>
            <text:p text:style-name="a1732" text:class-names="" text:cond-style-name=""><text:span text:style-name="a1731" text:class-names="">...}</text:span></text:p>
            <text:p text:style-name="a1735" text:class-names="" text:cond-style-name=""><text:span text:style-name="a1733" text:class-names="">class</text:span><text:span text:style-name="a1734" text:class-names=""><text:s text:c="1"/>Point3D {</text:span></text:p>
            <text:p text:style-name="a1741" text:class-names="" text:cond-style-name=""><text:span text:style-name="a1736" text:class-names=""><text:tab/></text:span><text:span text:style-name="a1737" text:class-names="">protected</text:span><text:span text:style-name="a1738" text:class-names=""><text:s text:c="1"/></text:span><text:span text:style-name="a1739" text:class-names="">double</text:span><text:span text:style-name="a1740" text:class-names=""><text:s text:c="1"/>z;</text:span></text:p>
            <text:p text:style-name="a1743" text:class-names="" text:cond-style-name=""><text:span text:style-name="a1742" text:class-names="">…}</text:span></text:p>
            <text:p text:style-name="a1755" text:class-names="" text:cond-style-name=""><text:span text:style-name="a1744" text:class-names="">Now</text:span><text:span text:style-name="a1745" text:class-names="">,<text:s text:c="1"/></text:span><text:span text:style-name="a1746" text:class-names="">f</text:span><text:span text:style-name="a1747" text:class-names="">rom</text:span><text:span text:style-name="a1748" text:class-names=""><text:s text:c="1"/></text:span><text:span text:style-name="a1749" text:class-names="">the</text:span><text:span text:style-name="a1750" text:class-names=""><text:s text:c="1"/></text:span><text:span text:style-name="a1751" text:class-names="">child</text:span><text:span text:style-name="a1752" text:class-names=""><text:s text:c="1"/></text:span><text:span text:style-name="a1753" text:class-names="">class</text:span><text:span text:style-name="a1754" text:class-names=""><text:s text:c="1"/>I can use x, y and z</text:span></text:p>
            <text:p text:style-name="a1757" text:class-names="" text:cond-style-name=""><text:span text:style-name="a1756" text:class-names=""/></text:p>
          </draw:text-box>
          <svg:title/>
          <svg:desc/>
        </draw:frame>
        <presentation:notes draw:style-name="a1764">
          <draw:frame draw:id="id219" draw:style-name="a1761" draw:name="Marcador de número de diapositiva 6" svg:x="4.67953in" svg:y="11.10827in" svg:width="3.5878in" svg:height="0.58425in">
            <draw:text-box>
              <text:p text:style-name="a1760" text:class-names="" text:cond-style-name=""><text:span text:style-name="a1759" text:class-names=""><text:page-number style:num-format="1" text:fixed="false">13</text:page-number></text:span></text:p>
            </draw:text-box>
            <svg:title/>
            <svg:desc/>
          </draw:frame>
          <draw:page-thumbnail draw:page-number="13" svg:x="1.21181in" svg:y="0.89063in" svg:width="5.84722in" svg:height="4.38542in" presentation:class="page" draw:id="id220" presentation:style-name="a1762" draw:name="Marcador de imagen de diapositiva 1">
            <svg:title/>
            <svg:desc/>
          </draw:page-thumbnail>
          <draw:frame draw:id="id221" presentation:style-name="a176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765" draw:master-page-name="Master2-Layout7-blank-En-blanco" presentation:presentation-page-layout-name="Master2-PPL7" draw:id="Slide-269">
        <draw:frame draw:id="id222" presentation:style-name="a1772" draw:name="Título 1" svg:x="0.55118in" svg:y="0.32953in" svg:width="8.97638in" svg:height="0.75709in" presentation:class="title" presentation:placeholder="false">
          <draw:text-box>
            <text:p text:style-name="a1771" text:class-names="" text:cond-style-name=""><text:span text:style-name="a1766" text:class-names="">5.<text:s text:c="1"/></text:span><text:span text:style-name="a1767" text:class-names="">Abstract</text:span><text:span text:style-name="a1768" text:class-names=""><text:s text:c="1"/></text:span><text:span text:style-name="a1769" text:class-names="">methods</text:span><text:span text:style-name="a1770" text:class-names=""/></text:p>
          </draw:text-box>
          <svg:title/>
          <svg:desc/>
        </draw:frame>
        <draw:frame draw:id="id223" draw:style-name="a1861" draw:name="Marcador de texto 2" svg:x="0.87891in" svg:y="1.3638in" svg:width="9.26648in" svg:height="5.53976in">
          <draw:text-box>
            <text:p text:style-name="a1801" text:class-names="" text:cond-style-name=""><text:span text:style-name="a1773" text:class-names="">An</text:span><text:span text:style-name="a1774" text:class-names=""><text:s text:c="1"/></text:span><text:span text:style-name="a1775" text:class-names="">abstract</text:span><text:span text:style-name="a1776" text:class-names=""><text:s text:c="1"/></text:span><text:span text:style-name="a1777" text:class-names="">method</text:span><text:span text:style-name="a1778" text:class-names=""><text:s text:c="1"/></text:span><text:span text:style-name="a1779" text:class-names="">is</text:span><text:span text:style-name="a1780" text:class-names=""><text:s text:c="1"/>a<text:s text:c="1"/></text:span><text:span text:style-name="a1781" text:class-names="">method</text:span><text:span text:style-name="a1782" text:class-names=""><text:s text:c="1"/></text:span><text:span text:style-name="a1783" text:class-names="">without</text:span><text:span text:style-name="a1784" text:class-names=""><text:s text:c="1"/>a<text:s text:c="1"/></text:span><text:span text:style-name="a1785" text:class-names="">body</text:span><text:span text:style-name="a1786" text:class-names=""><text:s text:c="1"/>(</text:span><text:span text:style-name="a1787" text:class-names="">with</text:span><text:span text:style-name="a1788" text:class-names=""><text:s text:c="1"/>no<text:s text:c="1"/></text:span><text:span text:style-name="a1789" text:class-names="">implementation</text:span><text:span text:style-name="a1790" text:class-names="">).<text:s text:c="1"/></text:span><text:span text:style-name="a1791" text:class-names="">The</text:span><text:span text:style-name="a1792" text:class-names=""><text:s text:c="1"/></text:span><text:span text:style-name="a1793" text:class-names="">method</text:span><text:span text:style-name="a1794" text:class-names=""><text:s text:c="1"/>has<text:s text:c="1"/></text:span><text:span text:style-name="a1795" text:class-names="">only</text:span><text:span text:style-name="a1796" text:class-names=""><text:s text:c="1"/></text:span><text:span text:style-name="a1797" text:class-names="">the</text:span><text:span text:style-name="a1798" text:class-names=""><text:s text:c="1"/></text:span><text:span text:style-name="a1799" text:class-names="">signature</text:span><text:span text:style-name="a1800" text:class-names="">.</text:span></text:p>
            <text:p text:style-name="a1824" text:class-names="" text:cond-style-name=""><text:span text:style-name="a1802" text:class-names="">If</text:span><text:span text:style-name="a1803" text:class-names=""><text:s text:c="1"/></text:span><text:span text:style-name="a1804" text:class-names="">you</text:span><text:span text:style-name="a1805" text:class-names=""><text:s text:c="1"/>declare a<text:s text:c="1"/></text:span><text:span text:style-name="a1806" text:class-names="">method</text:span><text:span text:style-name="a1807" text:class-names=""><text:s text:c="1"/>as<text:s text:c="1"/></text:span><text:span text:style-name="a1808" text:class-names="">abstract</text:span><text:span text:style-name="a1809" text:class-names=""><text:s text:c="1"/></text:span><text:span text:style-name="a1810" text:class-names="">then</text:span><text:span text:style-name="a1811" text:class-names=""><text:s text:c="1"/></text:span><text:span text:style-name="a1812" text:class-names="">the</text:span><text:span text:style-name="a1813" text:class-names=""><text:s text:c="1"/></text:span><text:span text:style-name="a1814" text:class-names="">class</text:span><text:span text:style-name="a1815" text:class-names=""><text:s text:c="1"/></text:span><text:span text:style-name="a1816" text:class-names="">must</text:span><text:span text:style-name="a1817" text:class-names=""><text:s text:c="1"/></text:span><text:span text:style-name="a1818" text:class-names="">also</text:span><text:span text:style-name="a1819" text:class-names=""><text:s text:c="1"/>be<text:s text:c="1"/></text:span><text:span text:style-name="a1820" text:class-names="">declared</text:span><text:span text:style-name="a1821" text:class-names=""><text:s text:c="1"/>as<text:s text:c="1"/></text:span><text:span text:style-name="a1822" text:class-names="">abstract</text:span><text:span text:style-name="a1823" text:class-names="">.</text:span></text:p>
            <text:p text:style-name="a1849" text:class-names="" text:cond-style-name=""><text:span text:style-name="a1825" text:class-names="">The</text:span><text:span text:style-name="a1826" text:class-names=""><text:s text:c="1"/></text:span><text:span text:style-name="a1827" text:class-names="">class</text:span><text:span text:style-name="a1828" text:class-names=""><text:s text:c="1"/></text:span><text:span text:style-name="a1829" text:class-names="">that</text:span><text:span text:style-name="a1830" text:class-names=""><text:s text:c="1"/></text:span><text:span text:style-name="a1831" text:class-names="">extends</text:span><text:span text:style-name="a1832" text:class-names=""><text:s text:c="1"/></text:span><text:span text:style-name="a1833" text:class-names="">an</text:span><text:span text:style-name="a1834" text:class-names=""><text:s text:c="1"/></text:span><text:span text:style-name="a1835" text:class-names="">abstract</text:span><text:span text:style-name="a1836" text:class-names=""><text:s text:c="1"/></text:span><text:span text:style-name="a1837" text:class-names="">class</text:span><text:span text:style-name="a1838" text:class-names=""><text:s text:c="1"/></text:span><text:span text:style-name="a1839" text:class-names="">must</text:span><text:span text:style-name="a1840" text:class-names=""><text:s text:c="1"/></text:span><text:span text:style-name="a1841" text:class-names="">implement</text:span><text:span text:style-name="a1842" text:class-names=""><text:s text:c="1"/></text:span><text:span text:style-name="a1843" text:class-names="">the</text:span><text:span text:style-name="a1844" text:class-names=""><text:s text:c="1"/></text:span><text:span text:style-name="a1845" text:class-names="">abstract</text:span><text:span text:style-name="a1846" text:class-names=""><text:s text:c="1"/></text:span><text:span text:style-name="a1847" text:class-names="">methods</text:span><text:span text:style-name="a1848" text:class-names="">.</text:span></text:p>
            <text:p text:style-name="a1860" text:class-names="" text:cond-style-name=""><text:span text:style-name="a1850" text:class-names="">An</text:span><text:span text:style-name="a1851" text:class-names=""><text:s text:c="1"/></text:span><text:span text:style-name="a1852" text:class-names="">abstract</text:span><text:span text:style-name="a1853" text:class-names=""><text:s text:c="1"/></text:span><text:span text:style-name="a1854" text:class-names="">class</text:span><text:span text:style-name="a1855" text:class-names=""><text:s text:c="1"/></text:span><text:span text:style-name="a1856" text:class-names="">cannot</text:span><text:span text:style-name="a1857" text:class-names=""><text:s text:c="1"/>be<text:s text:c="1"/></text:span><text:span text:style-name="a1858" text:class-names="">instantiated</text:span><text:span text:style-name="a1859" text:class-names="">.</text:span></text:p>
          </draw:text-box>
          <svg:title/>
          <svg:desc/>
        </draw:frame>
        <presentation:notes draw:style-name="a1867">
          <draw:frame draw:id="id224" draw:style-name="a1864" draw:name="Marcador de número de diapositiva 6" svg:x="4.67953in" svg:y="11.10827in" svg:width="3.5878in" svg:height="0.58425in">
            <draw:text-box>
              <text:p text:style-name="a1863" text:class-names="" text:cond-style-name=""><text:span text:style-name="a1862" text:class-names=""><text:page-number style:num-format="1" text:fixed="false">14</text:page-number></text:span></text:p>
            </draw:text-box>
            <svg:title/>
            <svg:desc/>
          </draw:frame>
          <draw:page-thumbnail draw:page-number="14" svg:x="1.21181in" svg:y="0.89063in" svg:width="5.84722in" svg:height="4.38542in" presentation:class="page" draw:id="id225" presentation:style-name="a1865" draw:name="Marcador de imagen de diapositiva 1">
            <svg:title/>
            <svg:desc/>
          </draw:page-thumbnail>
          <draw:frame draw:id="id226" presentation:style-name="a186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868" draw:master-page-name="Master2-Layout7-blank-En-blanco" presentation:presentation-page-layout-name="Master2-PPL7" draw:id="Slide-270">
        <draw:frame draw:id="id227" presentation:style-name="a1875" draw:name="Título 1" svg:x="0.55118in" svg:y="0.32953in" svg:width="8.97638in" svg:height="0.75709in" presentation:class="title" presentation:placeholder="false">
          <draw:text-box>
            <text:p text:style-name="a1874" text:class-names="" text:cond-style-name=""><text:span text:style-name="a1869" text:class-names="">5.<text:s text:c="1"/></text:span><text:span text:style-name="a1870" text:class-names="">Abstract</text:span><text:span text:style-name="a1871" text:class-names=""><text:s text:c="1"/></text:span><text:span text:style-name="a1872" text:class-names="">methods</text:span><text:span text:style-name="a1873" text:class-names=""/></text:p>
          </draw:text-box>
          <svg:title/>
          <svg:desc/>
        </draw:frame>
        <draw:frame draw:id="id228" draw:style-name="a1955" draw:name="Marcador de texto 2" svg:x="0.40613in" svg:y="1.08661in" svg:width="5.39387in" svg:height="5.53976in">
          <draw:text-box>
            <text:p text:style-name="a1880" text:class-names="" text:cond-style-name=""><text:span text:style-name="a1876" text:class-names="">abstract</text:span><text:span text:style-name="a1877" text:class-names=""><text:s text:c="1"/></text:span><text:span text:style-name="a1878" text:class-names="">class</text:span><text:span text:style-name="a1879" text:class-names=""><text:s text:c="1"/>A {</text:span></text:p>
            <text:p text:style-name="a1886" text:class-names="" text:cond-style-name=""><text:span text:style-name="a1881" text:class-names=""><text:tab/>//<text:s text:c="1"/></text:span><text:span text:style-name="a1882" text:class-names="">abstract</text:span><text:span text:style-name="a1883" text:class-names=""><text:s text:c="1"/></text:span><text:span text:style-name="a1884" text:class-names="">method</text:span><text:span text:style-name="a1885" text:class-names=""/></text:p>
            <text:p text:style-name="a1892" text:class-names="" text:cond-style-name=""><text:span text:style-name="a1887" text:class-names=""><text:tab/></text:span><text:span text:style-name="a1888" text:class-names="">abstract</text:span><text:span text:style-name="a1889" text:class-names=""><text:s text:c="1"/></text:span><text:span text:style-name="a1890" text:class-names="">void</text:span><text:span text:style-name="a1891" text:class-names=""><text:s text:c="1"/>m1();</text:span></text:p>
            <text:p text:style-name="a1902" text:class-names="" text:cond-style-name=""><text:span text:style-name="a1893" text:class-names=""><text:tab/>//<text:s text:c="1"/></text:span><text:span text:style-name="a1894" text:class-names="">regular</text:span><text:span text:style-name="a1895" text:class-names=""><text:s text:c="1"/></text:span><text:span text:style-name="a1896" text:class-names="">method</text:span><text:span text:style-name="a1897" text:class-names=""><text:s text:c="1"/>in<text:s text:c="1"/></text:span><text:span text:style-name="a1898" text:class-names="">abstract</text:span><text:span text:style-name="a1899" text:class-names=""><text:s text:c="1"/></text:span><text:span text:style-name="a1900" text:class-names="">class</text:span><text:span text:style-name="a1901" text:class-names=""/></text:p>
            <text:p text:style-name="a1906" text:class-names="" text:cond-style-name=""><text:span text:style-name="a1903" text:class-names=""><text:tab/></text:span><text:span text:style-name="a1904" text:class-names="">void</text:span><text:span text:style-name="a1905" text:class-names=""><text:s text:c="1"/>m2() {</text:span></text:p>
            <text:p text:style-name="a1912" text:class-names="" text:cond-style-name=""><text:span text:style-name="a1907" text:class-names=""><text:tab/> <text:s text:c="1"/></text:span><text:span text:style-name="a1908" text:class-names="">System.out.println</text:span><text:span text:style-name="a1909" text:class-names="">(“Regular<text:s text:c="1"/></text:span><text:span text:style-name="a1910" text:class-names="">method</text:span><text:span text:style-name="a1911" text:class-names="">“);</text:span></text:p>
            <text:p text:style-name="a1914" text:class-names="" text:cond-style-name=""><text:span text:style-name="a1913" text:class-names=""><text:tab/>}</text:span></text:p>
            <text:p text:style-name="a1916" text:class-names="" text:cond-style-name=""><text:span text:style-name="a1915" text:class-names="">}</text:span></text:p>
            <text:p text:style-name="a1920" text:class-names="" text:cond-style-name=""><text:span text:style-name="a1917" text:class-names="">// regular<text:s text:c="1"/></text:span><text:span text:style-name="a1918" text:class-names="">class</text:span><text:span text:style-name="a1919" text:class-names=""><text:s text:c="1"/>B</text:span></text:p>
            <text:p text:style-name="a1925" text:class-names="" text:cond-style-name=""><text:span text:style-name="a1921" text:class-names="">class</text:span><text:span text:style-name="a1922" text:class-names=""><text:s text:c="1"/>B<text:s text:c="1"/></text:span><text:span text:style-name="a1923" text:class-names="">extends</text:span><text:span text:style-name="a1924" text:class-names=""><text:s text:c="1"/>A {</text:span></text:p>
            <text:p text:style-name="a1935" text:class-names="" text:cond-style-name=""><text:span text:style-name="a1926" text:class-names="">//<text:s text:c="1"/></text:span><text:span text:style-name="a1927" text:class-names="">class</text:span><text:span text:style-name="a1928" text:class-names=""><text:s text:c="1"/>B<text:s text:c="1"/></text:span><text:span text:style-name="a1929" text:class-names="">must</text:span><text:span text:style-name="a1930" text:class-names=""><text:s text:c="1"/></text:span><text:span text:style-name="a1931" text:class-names="">override</text:span><text:span text:style-name="a1932" text:class-names=""><text:s text:c="1"/>m1()<text:s text:c="1"/></text:span><text:span text:style-name="a1933" text:class-names="">method</text:span><text:span text:style-name="a1934" text:class-names=""/></text:p>
            <text:p text:style-name="a1938" text:class-names="" text:cond-style-name=""><text:span text:style-name="a1936" text:class-names="">void</text:span><text:span text:style-name="a1937" text:class-names=""><text:s text:c="1"/>m1() {</text:span></text:p>
            <text:p text:style-name="a1948" text:class-names="" text:cond-style-name=""><text:span text:style-name="a1939" text:class-names=""><text:tab/></text:span><text:span text:style-name="a1940" text:class-names="">System.out.println</text:span><text:span text:style-name="a1941" text:class-names="">("</text:span><text:span text:style-name="a1942" text:class-names="">implementation</text:span><text:span text:style-name="a1943" text:class-names=""><text:s text:c="1"/></text:span><text:span text:style-name="a1944" text:class-names="">of</text:span><text:span text:style-name="a1945" text:class-names=""><text:s text:c="1"/>m1 in B<text:s text:c="1"/></text:span><text:span text:style-name="a1946" text:class-names="">class</text:span><text:span text:style-name="a1947" text:class-names="">");</text:span></text:p>
            <text:p text:style-name="a1950" text:class-names="" text:cond-style-name=""><text:span text:style-name="a1949" text:class-names=""><text:tab/>}</text:span></text:p>
            <text:p text:style-name="a1952" text:class-names="" text:cond-style-name=""><text:span text:style-name="a1951" text:class-names="">}</text:span></text:p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229" draw:style-name="a2003" draw:name="CuadroTexto 7" svg:x="5.73877in" svg:y="2.00526in" svg:width="5.28554in" svg:height="3.70247in">
          <draw:text-box>
            <text:p text:style-name="a1957" text:class-names="" text:cond-style-name=""><text:span text:style-name="a1956" text:class-names=""/></text:p>
            <text:p text:style-name="a1959" text:class-names="" text:cond-style-name=""><text:span text:style-name="a1958" text:class-names=""/></text:p>
            <text:p text:style-name="a1965" text:class-names="" text:cond-style-name=""><text:span text:style-name="a1960" text:class-names="">//<text:s text:c="1"/></text:span><text:span text:style-name="a1961" text:class-names="">Tester</text:span><text:span text:style-name="a1962" text:class-names=""><text:s text:c="1"/></text:span><text:span text:style-name="a1963" text:class-names="">class</text:span><text:span text:style-name="a1964" text:class-names=""/></text:p>
            <text:p text:style-name="a1972" text:class-names="" text:cond-style-name=""><text:span text:style-name="a1966" text:class-names="">public</text:span><text:span text:style-name="a1967" text:class-names=""><text:s text:c="1"/></text:span><text:span text:style-name="a1968" text:class-names="">class</text:span><text:span text:style-name="a1969" text:class-names=""><text:s text:c="1"/></text:span><text:span text:style-name="a1970" text:class-names="">BTest</text:span><text:span text:style-name="a1971" text:class-names="">{</text:span></text:p>
            <text:p text:style-name="a1986" text:class-names="" text:cond-style-name=""><text:span text:style-name="a1973" text:class-names=""><text:tab/></text:span><text:span text:style-name="a1974" text:class-names="">public</text:span><text:span text:style-name="a1975" text:class-names=""><text:s text:c="1"/></text:span><text:span text:style-name="a1976" text:class-names="">static</text:span><text:span text:style-name="a1977" text:class-names=""><text:s text:c="1"/></text:span><text:span text:style-name="a1978" text:class-names="">void</text:span><text:span text:style-name="a1979" text:class-names=""><text:s text:c="1"/></text:span><text:span text:style-name="a1980" text:class-names="">main</text:span><text:span text:style-name="a1981" text:class-names="">(</text:span><text:span text:style-name="a1982" text:class-names="">String</text:span><text:span text:style-name="a1983" text:class-names=""><text:s text:c="1"/></text:span><text:span text:style-name="a1984" text:class-names="">args</text:span><text:span text:style-name="a1985" text:class-names="">[])</text:span></text:p>
            <text:p text:style-name="a1988" text:class-names="" text:cond-style-name=""><text:span text:style-name="a1987" text:class-names=""><text:tab/>{</text:span></text:p>
            <text:p text:style-name="a1992" text:class-names="" text:cond-style-name=""><text:span text:style-name="a1989" text:class-names=""><text:tab/><text:tab/>B<text:s text:c="1"/></text:span><text:span text:style-name="a1990" text:class-names="">b</text:span><text:span text:style-name="a1991" text:class-names=""><text:s text:c="1"/>= new B();</text:span></text:p>
            <text:p text:style-name="a1994" text:class-names="" text:cond-style-name=""><text:span text:style-name="a1993" text:class-names=""><text:tab/><text:tab/>b.m1();</text:span></text:p>
            <text:p text:style-name="a1996" text:class-names="" text:cond-style-name=""><text:span text:style-name="a1995" text:class-names=""><text:tab/><text:tab/>b.m2();</text:span></text:p>
            <text:p text:style-name="a1998" text:class-names="" text:cond-style-name=""><text:span text:style-name="a1997" text:class-names=""><text:tab/>}</text:span></text:p>
            <text:p text:style-name="a2000" text:class-names="" text:cond-style-name=""><text:span text:style-name="a1999" text:class-names="">}</text:span></text:p>
            <text:p text:style-name="a2002" text:class-names="" text:cond-style-name=""><text:span text:style-name="a2001" text:class-names=""/></text:p>
          </draw:text-box>
          <svg:title/>
          <svg:desc/>
        </draw:frame>
        <presentation:notes draw:style-name="a2009">
          <draw:frame draw:id="id230" draw:style-name="a2006" draw:name="Marcador de número de diapositiva 6" svg:x="4.67953in" svg:y="11.10827in" svg:width="3.5878in" svg:height="0.58425in">
            <draw:text-box>
              <text:p text:style-name="a2005" text:class-names="" text:cond-style-name=""><text:span text:style-name="a2004" text:class-names=""><text:page-number style:num-format="1" text:fixed="false">15</text:page-number></text:span></text:p>
            </draw:text-box>
            <svg:title/>
            <svg:desc/>
          </draw:frame>
          <draw:page-thumbnail draw:page-number="15" svg:x="1.21181in" svg:y="0.89063in" svg:width="5.84722in" svg:height="4.38542in" presentation:class="page" draw:id="id231" presentation:style-name="a2007" draw:name="Marcador de imagen de diapositiva 1">
            <svg:title/>
            <svg:desc/>
          </draw:page-thumbnail>
          <draw:frame draw:id="id232" presentation:style-name="a200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010" draw:master-page-name="Master2-Layout7-blank-En-blanco" presentation:presentation-page-layout-name="Master2-PPL7" draw:id="Slide-271">
        <draw:frame draw:id="id233" presentation:style-name="a2017" draw:name="Título 1" svg:x="0.55118in" svg:y="0.32953in" svg:width="8.97638in" svg:height="0.75709in" presentation:class="title" presentation:placeholder="false">
          <draw:text-box>
            <text:p text:style-name="a2016" text:class-names="" text:cond-style-name=""><text:span text:style-name="a2011" text:class-names="">5.<text:s text:c="1"/></text:span><text:span text:style-name="a2012" text:class-names="">Abstract</text:span><text:span text:style-name="a2013" text:class-names=""><text:s text:c="1"/></text:span><text:span text:style-name="a2014" text:class-names="">methods</text:span><text:span text:style-name="a2015" text:class-names=""/></text:p>
          </draw:text-box>
          <svg:title/>
          <svg:desc/>
        </draw:frame>
        <draw:frame draw:id="id234" draw:style-name="a2130" draw:name="Marcador de texto 2" svg:x="0.55118in" svg:y="1.08661in" svg:width="4.36549in" svg:height="5.40505in">
          <draw:text-box>
            <text:p text:style-name="a2026" text:class-names="" text:cond-style-name=""><text:span text:style-name="a2018" text:class-names="">public</text:span><text:span text:style-name="a2019" text:class-names=""><text:s text:c="1"/></text:span><text:span text:style-name="a2020" text:class-names="">abstract</text:span><text:span text:style-name="a2021" text:class-names=""><text:s text:c="1"/></text:span><text:span text:style-name="a2022" text:class-names="">class</text:span><text:span text:style-name="a2023" text:class-names=""><text:s text:c="1"/></text:span><text:span text:style-name="a2024" text:class-names="">Person</text:span><text:span text:style-name="a2025" text:class-names=""><text:s text:c="1"/>{<text:s text:c="1"/></text:span></text:p>
            <text:list text:style-name="a2034">
              <text:list-item>
                <text:list text:style-name="a2034">
                  <text:list-item>
                    <text:p text:style-name="a2033" text:class-names="" text:cond-style-name=""><text:span text:style-name="a2027" text:class-names="">private</text:span><text:span text:style-name="a2028" text:class-names=""><text:s text:c="1"/></text:span><text:span text:style-name="a2029" text:class-names="">String</text:span><text:span text:style-name="a2030" text:class-names=""><text:s text:c="1"/></text:span><text:span text:style-name="a2031" text:class-names="">name</text:span><text:span text:style-name="a2032" text:class-names="">;<text:s text:c="1"/>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35" text:class-names="">private</text:span><text:span text:style-name="a2036" text:class-names=""><text:s text:c="1"/></text:span><text:span text:style-name="a2037" text:class-names="">String</text:span><text:span text:style-name="a2038" text:class-names=""><text:s text:c="1"/></text:span><text:span text:style-name="a2039" text:class-names="">gender</text:span><text:span text:style-name="a2040" text:class-names="">;<text:s text:c="1"/></text:span></text:p>
                  </text:list-item>
                </text:list>
              </text:list-item>
            </text:list>
            <text:p text:style-name="a2052" text:class-names="" text:cond-style-name=""><text:span text:style-name="a2043" text:class-names="">public</text:span><text:span text:style-name="a2044" text:class-names=""><text:s text:c="1"/></text:span><text:span text:style-name="a2045" text:class-names="">Person</text:span><text:span text:style-name="a2046" text:class-names="">(</text:span><text:span text:style-name="a2047" text:class-names="">String</text:span><text:span text:style-name="a2048" text:class-names=""><text:s text:c="1"/>nm,<text:s text:c="1"/></text:span><text:span text:style-name="a2049" text:class-names="">String</text:span><text:span text:style-name="a2050" text:class-names=""><text:s text:c="1"/>gen)</text:span><text:span text:style-name="a2051" text:class-names="">{</text:span></text:p>
            <text:list text:style-name="a2057">
              <text:list-item>
                <text:list text:style-name="a2057">
                  <text:list-item>
                    <text:p text:style-name="a2056" text:class-names="" text:cond-style-name=""><text:span text:style-name="a2053" text:class-names=""><text:s text:c="1"/></text:span><text:span text:style-name="a2054" text:class-names="">this</text:span><text:span text:style-name="a2055" text:class-names="">.name=nm;</text:span></text:p>
                  </text:list-item>
                </text:list>
              </text:list-item>
            </text:list>
            <text:list text:style-name="a2064">
              <text:list-item>
                <text:list text:style-name="a2064">
                  <text:list-item>
                    <text:p text:style-name="a2063" text:class-names="" text:cond-style-name=""><text:span text:style-name="a2058" text:class-names=""><text:s text:c="1"/></text:span><text:span text:style-name="a2059" text:class-names="">this</text:span><text:span text:style-name="a2060" text:class-names="">.gender</text:span><text:span text:style-name="a2061" text:class-names="">=gen</text:span><text:span text:style-name="a2062" text:class-names="">; }<text:s text:c="1"/></text:span></text:p>
                  </text:list-item>
                </text:list>
              </text:list-item>
            </text:list>
            <text:p text:style-name="a2070" text:class-names="" text:cond-style-name=""><text:span text:style-name="a2065" text:class-names="">//</text:span><text:span text:style-name="a2066" text:class-names="">abstract</text:span><text:span text:style-name="a2067" text:class-names=""><text:s text:c="1"/></text:span><text:span text:style-name="a2068" text:class-names="">method</text:span><text:span text:style-name="a2069" text:class-names=""><text:s text:c="1"/></text:span></text:p>
            <text:p text:style-name="a2080" text:class-names="" text:cond-style-name=""><text:span text:style-name="a2071" text:class-names="">public</text:span><text:span text:style-name="a2072" text:class-names=""><text:s text:c="1"/></text:span><text:span text:style-name="a2073" text:class-names="">abstract</text:span><text:span text:style-name="a2074" text:class-names=""><text:s text:c="1"/></text:span><text:span text:style-name="a2075" text:class-names="">void</text:span><text:span text:style-name="a2076" text:class-names=""><text:s text:c="1"/></text:span><text:span text:style-name="a2077" text:class-names="">work</text:span><text:span text:style-name="a2078" text:class-names="">()</text:span><text:span text:style-name="a2079" text:class-names="">;<text:s text:c="1"/></text:span></text:p>
            <text:p text:style-name="a2083" text:class-names="" text:cond-style-name=""><text:span text:style-name="a2081" text:class-names="">@Override</text:span><text:span text:style-name="a2082" text:class-names=""><text:s text:c="1"/></text:span></text:p>
            <text:p text:style-name="a2091" text:class-names="" text:cond-style-name=""><text:span text:style-name="a2084" text:class-names="">public</text:span><text:span text:style-name="a2085" text:class-names=""><text:s text:c="1"/></text:span><text:span text:style-name="a2086" text:class-names="">String</text:span><text:span text:style-name="a2087" text:class-names=""><text:s text:c="1"/></text:span><text:span text:style-name="a2088" text:class-names="">toString</text:span><text:span text:style-name="a2089" text:class-names="">()</text:span><text:span text:style-name="a2090" text:class-names="">{<text:s text:c="1"/></text:span></text:p>
            <text:p text:style-name="a2101" text:class-names="" text:cond-style-name=""><text:span text:style-name="a2092" text:class-names=""><text:tab/></text:span><text:span text:style-name="a2093" text:class-names="">return</text:span><text:span text:style-name="a2094" text:class-names=""><text:s text:c="1"/></text:span><text:span text:style-name="a2095" text:class-names="">"</text:span><text:span text:style-name="a2096" text:class-names="">Name</text:span><text:span text:style-name="a2097" text:class-names="">="</text:span><text:span text:style-name="a2098" text:class-names="">+</text:span><text:span text:style-name="a2099" text:class-names="">this</text:span><text:span text:style-name="a2100" text:class-names="">.name+</text:span></text:p>
            <text:p text:style-name="a2109" text:class-names="" text:cond-style-name=""><text:span text:style-name="a2102" text:class-names=""><text:tab/>“<text:s text:c="1"/></text:span><text:span text:style-name="a2103" text:class-names="">Gender</text:span><text:span text:style-name="a2104" text:class-names="">="</text:span><text:span text:style-name="a2105" text:class-names="">+</text:span><text:span text:style-name="a2106" text:class-names="">this</text:span><text:span text:style-name="a2107" text:class-names="">.gender</text:span><text:span text:style-name="a2108" text:class-names="">; }<text:s text:c="1"/></text:span></text:p>
            <text:p text:style-name="a2121" text:class-names="" text:cond-style-name=""><text:span text:style-name="a2110" text:class-names="">public</text:span><text:span text:style-name="a2111" text:class-names=""><text:s text:c="1"/></text:span><text:span text:style-name="a2112" text:class-names="">void</text:span><text:span text:style-name="a2113" text:class-names=""><text:s text:c="1"/></text:span><text:span text:style-name="a2114" text:class-names="">changeName</text:span><text:span text:style-name="a2115" text:class-names="">(</text:span><text:span text:style-name="a2116" text:class-names="">String</text:span><text:span text:style-name="a2117" text:class-names=""><text:s text:c="1"/></text:span><text:span text:style-name="a2118" text:class-names="">newName</text:span><text:span text:style-name="a2119" text:class-names="">)</text:span><text:span text:style-name="a2120" text:class-names=""><text:s text:c="1"/>{<text:s text:c="1"/></text:span></text:p>
            <text:p text:style-name="a2126" text:class-names="" text:cond-style-name=""><text:span text:style-name="a2122" text:class-names=""><text:tab/>this</text:span><text:span text:style-name="a2123" text:class-names="">.name =<text:s text:c="1"/></text:span><text:span text:style-name="a2124" text:class-names="">newName</text:span><text:span text:style-name="a2125" text:class-names="">;</text:span></text:p>
            <text:p text:style-name="a2129" text:class-names="" text:cond-style-name=""><text:span text:style-name="a2127" text:class-names=""><text:s text:c="1"/>} }</text:span><text:span text:style-name="a2128" text:class-names=""/></text:p>
          </draw:text-box>
          <svg:title/>
          <svg:desc/>
        </draw:frame>
        <draw:frame draw:id="id235" draw:style-name="a2282" draw:name="CuadroTexto 2" svg:x="4.75in" svg:y="1.08661in" svg:width="6.43333in" svg:height="5.55371in">
          <draw:text-box>
            <text:p text:style-name="a2141" text:class-names="" text:cond-style-name=""><text:span text:style-name="a2131" text:class-names="">public</text:span><text:span text:style-name="a2132" text:class-names=""><text:s text:c="1"/></text:span><text:span text:style-name="a2133" text:class-names="">class</text:span><text:span text:style-name="a2134" text:class-names=""><text:s text:c="1"/></text:span><text:span text:style-name="a2135" text:class-names="">Employee</text:span><text:span text:style-name="a2136" text:class-names=""><text:s text:c="1"/></text:span><text:span text:style-name="a2137" text:class-names="">extends</text:span><text:span text:style-name="a2138" text:class-names=""><text:s text:c="1"/></text:span><text:span text:style-name="a2139" text:class-names="">Person</text:span><text:span text:style-name="a2140" text:class-names=""><text:s text:c="1"/>{</text:span></text:p>
            <text:p text:style-name="a2149" text:class-names="" text:cond-style-name=""><text:span text:style-name="a2142" text:class-names=""><text:s text:c="1"/><text:tab/></text:span><text:span text:style-name="a2143" text:class-names="">private</text:span><text:span text:style-name="a2144" text:class-names=""><text:s text:c="1"/></text:span><text:span text:style-name="a2145" text:class-names="">int</text:span><text:span text:style-name="a2146" text:class-names=""><text:s text:c="1"/></text:span><text:span text:style-name="a2147" text:class-names="">empId</text:span><text:span text:style-name="a2148" text:class-names="">;<text:s text:c="1"/></text:span></text:p>
            <text:p text:style-name="a2161" text:class-names="" text:cond-style-name=""><text:span text:style-name="a2150" text:class-names="">public</text:span><text:span text:style-name="a2151" text:class-names=""><text:s text:c="1"/></text:span><text:span text:style-name="a2152" text:class-names="">Employee</text:span><text:span text:style-name="a2153" text:class-names="">(</text:span><text:span text:style-name="a2154" text:class-names="">String</text:span><text:span text:style-name="a2155" text:class-names=""><text:s text:c="1"/>nm,<text:s text:c="1"/></text:span><text:span text:style-name="a2156" text:class-names="">String</text:span><text:span text:style-name="a2157" text:class-names=""><text:s text:c="1"/>gen,<text:s text:c="1"/></text:span><text:span text:style-name="a2158" text:class-names="">int</text:span><text:span text:style-name="a2159" text:class-names=""><text:s text:c="1"/>id)</text:span><text:span text:style-name="a2160" text:class-names=""><text:s text:c="1"/>{ <text:tab/><text:tab/></text:span></text:p>
            <text:p text:style-name="a2167" text:class-names="" text:cond-style-name=""><text:span text:style-name="a2162" text:class-names=""><text:tab/>super</text:span><text:span text:style-name="a2163" text:class-names="">(nm, gen);<text:s text:c="1"/></text:span><text:span text:style-name="a2164" text:class-names="">this</text:span><text:span text:style-name="a2165" text:class-names="">.empId</text:span><text:span text:style-name="a2166" text:class-names="">=id; }<text:s text:c="1"/></text:span></text:p>
            <text:p text:style-name="a2170" text:class-names="" text:cond-style-name=""><text:span text:style-name="a2168" text:class-names="">@Override</text:span><text:span text:style-name="a2169" text:class-names=""><text:s text:c="1"/></text:span></text:p>
            <text:p text:style-name="a2178" text:class-names="" text:cond-style-name=""><text:span text:style-name="a2171" text:class-names="">public</text:span><text:span text:style-name="a2172" text:class-names=""><text:s text:c="1"/></text:span><text:span text:style-name="a2173" text:class-names="">void</text:span><text:span text:style-name="a2174" text:class-names=""><text:s text:c="1"/></text:span><text:span text:style-name="a2175" text:class-names="">work</text:span><text:span text:style-name="a2176" text:class-names="">()</text:span><text:span text:style-name="a2177" text:class-names=""><text:s text:c="1"/>{<text:s text:c="1"/></text:span></text:p>
            <text:p text:style-name="a2186" text:class-names="" text:cond-style-name=""><text:span text:style-name="a2179" text:class-names=""><text:tab/></text:span><text:span text:style-name="a2180" text:class-names="">if</text:span><text:span text:style-name="a2181" text:class-names="">(</text:span><text:span text:style-name="a2182" text:class-names="">empId</text:span><text:span text:style-name="a2183" text:class-names=""><text:s text:c="1"/>==<text:s text:c="1"/></text:span><text:span text:style-name="a2184" text:class-names="">0</text:span><text:span text:style-name="a2185" text:class-names="">){<text:s text:c="1"/></text:span></text:p>
            <text:p text:style-name="a2198" text:class-names="" text:cond-style-name=""><text:span text:style-name="a2187" text:class-names=""><text:tab/><text:tab/></text:span><text:span text:style-name="a2188" text:class-names="">System.out.println</text:span><text:span text:style-name="a2189" text:class-names="">(</text:span><text:span text:style-name="a2190" text:class-names="">"</text:span><text:span text:style-name="a2191" text:class-names="">Not</text:span><text:span text:style-name="a2192" text:class-names=""><text:s text:c="1"/></text:span><text:span text:style-name="a2193" text:class-names="">working</text:span><text:span text:style-name="a2194" text:class-names="">"</text:span><text:span text:style-name="a2195" text:class-names="">); <text:tab/>}</text:span><text:span text:style-name="a2196" text:class-names="">else</text:span><text:span text:style-name="a2197" text:class-names="">{<text:s text:c="1"/></text:span></text:p>
            <text:p text:style-name="a2206" text:class-names="" text:cond-style-name=""><text:span text:style-name="a2199" text:class-names=""><text:tab/><text:tab/></text:span><text:span text:style-name="a2200" text:class-names="">System.out.println</text:span><text:span text:style-name="a2201" text:class-names="">(</text:span><text:span text:style-name="a2202" text:class-names="">"</text:span><text:span text:style-name="a2203" text:class-names="">Working</text:span><text:span text:style-name="a2204" text:class-names="">!!"</text:span><text:span text:style-name="a2205" text:class-names="">);<text:s text:c="1"/></text:span></text:p>
            <text:p text:style-name="a2208" text:class-names="" text:cond-style-name=""><text:span text:style-name="a2207" text:class-names="">} }<text:s text:c="1"/></text:span></text:p>
            <text:p text:style-name="a2222" text:class-names="" text:cond-style-name=""><text:span text:style-name="a2209" text:class-names="">public</text:span><text:span text:style-name="a2210" text:class-names=""><text:s text:c="1"/></text:span><text:span text:style-name="a2211" text:class-names="">static</text:span><text:span text:style-name="a2212" text:class-names=""><text:s text:c="1"/></text:span><text:span text:style-name="a2213" text:class-names="">void</text:span><text:span text:style-name="a2214" text:class-names=""><text:s text:c="1"/></text:span><text:span text:style-name="a2215" text:class-names="">main</text:span><text:span text:style-name="a2216" text:class-names="">(</text:span><text:span text:style-name="a2217" text:class-names="">String</text:span><text:span text:style-name="a2218" text:class-names=""><text:s text:c="1"/></text:span><text:span text:style-name="a2219" text:class-names="">args</text:span><text:span text:style-name="a2220" text:class-names="">[])</text:span><text:span text:style-name="a2221" text:class-names="">{</text:span></text:p>
            <text:p text:style-name="a2238" text:class-names="" text:cond-style-name=""><text:span text:style-name="a2223" text:class-names=""><text:s text:c="5"/></text:span><text:span text:style-name="a2224" text:class-names="">Person</text:span><text:span text:style-name="a2225" text:class-names=""><text:s text:c="1"/></text:span><text:span text:style-name="a2226" text:class-names="">student</text:span><text:span text:style-name="a2227" text:class-names=""><text:s text:c="1"/>=<text:s text:c="1"/></text:span><text:span text:style-name="a2228" text:class-names="">new</text:span><text:span text:style-name="a2229" text:class-names=""><text:s text:c="1"/></text:span><text:span text:style-name="a2230" text:class-names="">Employee</text:span><text:span text:style-name="a2231" text:class-names="">(</text:span><text:span text:style-name="a2232" text:class-names="">"Dove"</text:span><text:span text:style-name="a2233" text:class-names="">,</text:span><text:span text:style-name="a2234" text:class-names="">"Female"</text:span><text:span text:style-name="a2235" text:class-names="">,</text:span><text:span text:style-name="a2236" text:class-names="">0</text:span><text:span text:style-name="a2237" text:class-names="">);<text:s text:c="1"/></text:span></text:p>
            <text:p text:style-name="a2254" text:class-names="" text:cond-style-name=""><text:span text:style-name="a2239" text:class-names=""><text:s text:c="5"/></text:span><text:span text:style-name="a2240" text:class-names="">Person</text:span><text:span text:style-name="a2241" text:class-names=""><text:s text:c="1"/></text:span><text:span text:style-name="a2242" text:class-names="">employee</text:span><text:span text:style-name="a2243" text:class-names=""><text:s text:c="1"/>=<text:s text:c="1"/></text:span><text:span text:style-name="a2244" text:class-names="">new</text:span><text:span text:style-name="a2245" text:class-names=""><text:s text:c="1"/></text:span><text:span text:style-name="a2246" text:class-names="">Employee</text:span><text:span text:style-name="a2247" text:class-names="">(</text:span><text:span text:style-name="a2248" text:class-names="">"Pankaj"</text:span><text:span text:style-name="a2249" text:class-names="">,</text:span><text:span text:style-name="a2250" text:class-names="">"Male"</text:span><text:span text:style-name="a2251" text:class-names="">,</text:span><text:span text:style-name="a2252" text:class-names="">123</text:span><text:span text:style-name="a2253" text:class-names="">);</text:span></text:p>
            <text:p text:style-name="a2260" text:class-names="" text:cond-style-name=""><text:span text:style-name="a2255" text:class-names=""><text:s text:c="5"/></text:span><text:span text:style-name="a2256" text:class-names="">student.work</text:span><text:span text:style-name="a2257" text:class-names="">();<text:s text:c="1"/></text:span><text:span text:style-name="a2258" text:class-names="">employee.work</text:span><text:span text:style-name="a2259" text:class-names="">();</text:span></text:p>
            <text:p text:style-name="a2266" text:class-names="" text:cond-style-name=""><text:span text:style-name="a2261" text:class-names=""><text:s text:c="5"/></text:span><text:span text:style-name="a2262" text:class-names="">employee.changeName</text:span><text:span text:style-name="a2263" text:class-names="">(</text:span><text:span text:style-name="a2264" text:class-names="">"Pankaj Kumar"</text:span><text:span text:style-name="a2265" text:class-names="">);</text:span></text:p>
            <text:p text:style-name="a2273" text:class-names="" text:cond-style-name=""><text:span text:style-name="a2267" text:class-names=""><text:s text:c="4"/></text:span><text:span text:style-name="a2268" text:class-names=""><text:s text:c="1"/></text:span><text:span text:style-name="a2269" text:class-names="">System.out.println</text:span><text:span text:style-name="a2270" text:class-names="">(</text:span><text:span text:style-name="a2271" text:class-names="">employee.toString</text:span><text:span text:style-name="a2272" text:class-names="">());<text:s text:c="1"/></text:span></text:p>
            <text:p text:style-name="a2281" text:class-names="" text:cond-style-name=""><text:span text:style-name="a2274" text:class-names="">} } <text:s text:c="1"/>//<text:s text:c="1"/></text:span><text:span text:style-name="a2275" text:class-names="">example</text:span><text:span text:style-name="a2276" text:class-names=""><text:s text:c="1"/></text:span><text:span text:style-name="a2277" text:class-names="">of</text:span><text:span text:style-name="a2278" text:class-names=""><text:s text:c="1"/></text:span><text:span text:style-name="a2279" text:class-names="">journaldev</text:span><text:span text:style-name="a2280" text:class-names=""/></text:p>
          </draw:text-box>
          <svg:title/>
          <svg:desc/>
        </draw:frame>
        <presentation:notes draw:style-name="a2288">
          <draw:frame draw:id="id236" draw:style-name="a2285" draw:name="Marcador de número de diapositiva 6" svg:x="4.67953in" svg:y="11.10827in" svg:width="3.5878in" svg:height="0.58425in">
            <draw:text-box>
              <text:p text:style-name="a2284" text:class-names="" text:cond-style-name=""><text:span text:style-name="a2283" text:class-names=""><text:page-number style:num-format="1" text:fixed="false">16</text:page-number></text:span></text:p>
            </draw:text-box>
            <svg:title/>
            <svg:desc/>
          </draw:frame>
          <draw:page-thumbnail draw:page-number="16" svg:x="1.21181in" svg:y="0.89063in" svg:width="5.84722in" svg:height="4.38542in" presentation:class="page" draw:id="id237" presentation:style-name="a2286" draw:name="Marcador de imagen de diapositiva 1">
            <svg:title/>
            <svg:desc/>
          </draw:page-thumbnail>
          <draw:frame draw:id="id238" presentation:style-name="a228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2289" draw:master-page-name="Master2-Layout7-blank-En-blanco" presentation:presentation-page-layout-name="Master2-PPL7" draw:id="Slide-272">
        <draw:frame draw:id="id239" presentation:style-name="a2294" draw:name="Título 1" svg:x="0.55118in" svg:y="0.32953in" svg:width="8.97638in" svg:height="0.75709in" presentation:class="title" presentation:placeholder="false">
          <draw:text-box>
            <text:p text:style-name="a2293" text:class-names="" text:cond-style-name=""><text:span text:style-name="a2290" text:class-names="">6.<text:s text:c="1"/></text:span><text:span text:style-name="a2291" text:class-names="">Interfaces</text:span><text:span text:style-name="a2292" text:class-names=""/></text:p>
          </draw:text-box>
          <svg:title/>
          <svg:desc/>
        </draw:frame>
        <draw:frame draw:id="id240" draw:style-name="a2419" draw:name="Marcador de texto 2" svg:x="0.92618in" svg:y="1.19495in" svg:width="8.60138in" svg:height="5.40505in">
          <draw:text-box>
            <text:p text:style-name="a2307" text:class-names="" text:cond-style-name=""><text:span text:style-name="a2295" text:class-names="">There</text:span><text:span text:style-name="a2296" text:class-names=""><text:s text:c="1"/>can be<text:s text:c="1"/></text:span><text:span text:style-name="a2297" text:class-names="">only</text:span><text:span text:style-name="a2298" text:class-names=""><text:s text:c="1"/></text:span><text:span text:style-name="a2299" text:class-names="">abstract</text:span><text:span text:style-name="a2300" text:class-names=""><text:s text:c="1"/></text:span><text:span text:style-name="a2301" text:class-names="">methods</text:span><text:span text:style-name="a2302" text:class-names=""><text:s text:c="1"/>in<text:s text:c="1"/></text:span><text:span text:style-name="a2303" text:class-names="">an</text:span><text:span text:style-name="a2304" text:class-names=""><text:s text:c="1"/></text:span><text:span text:style-name="a2305" text:class-names="">interface</text:span><text:span text:style-name="a2306" text:class-names="">.</text:span></text:p>
            <text:p text:style-name="a2325" text:class-names="" text:cond-style-name=""><text:span text:style-name="a2308" text:class-names="">We</text:span><text:span text:style-name="a2309" text:class-names=""><text:s text:c="1"/>can<text:s text:c="1"/></text:span><text:span text:style-name="a2310" text:class-names="">say</text:span><text:span text:style-name="a2311" text:class-names=""><text:s text:c="1"/></text:span><text:span text:style-name="a2312" text:class-names="">t</text:span><text:span text:style-name="a2313" text:class-names="">hat</text:span><text:span text:style-name="a2314" text:class-names=""><text:s text:c="1"/></text:span><text:span text:style-name="a2315" text:class-names="">an</text:span><text:span text:style-name="a2316" text:class-names=""><text:s text:c="1"/>interface<text:s text:c="1"/></text:span><text:span text:style-name="a2317" text:class-names="">is</text:span><text:span text:style-name="a2318" text:class-names=""><text:s text:c="1"/>a<text:s text:c="1"/></text:span><text:span text:style-name="a2319" text:class-names="">completely</text:span><text:span text:style-name="a2320" text:class-names=""><text:s text:c="1"/></text:span><text:span text:style-name="a2321" text:class-names="">abstract</text:span><text:span text:style-name="a2322" text:class-names=""><text:s text:c="1"/></text:span><text:span text:style-name="a2323" text:class-names="">class</text:span><text:span text:style-name="a2324" text:class-names="">.</text:span></text:p>
            <text:p text:style-name="a2343" text:class-names="" text:cond-style-name=""><text:span text:style-name="a2326" text:class-names="">Interfaces are<text:s text:c="1"/></text:span><text:span text:style-name="a2327" text:class-names="">used</text:span><text:span text:style-name="a2328" text:class-names=""><text:s text:c="1"/></text:span><text:span text:style-name="a2329" text:class-names="">to</text:span><text:span text:style-name="a2330" text:class-names=""><text:s text:c="1"/></text:span><text:span text:style-name="a2331" text:class-names="">group</text:span><text:span text:style-name="a2332" text:class-names=""><text:s text:c="1"/></text:span><text:span text:style-name="a2333" text:class-names="">related</text:span><text:span text:style-name="a2334" text:class-names=""><text:s text:c="1"/></text:span><text:span text:style-name="a2335" text:class-names="">methods</text:span><text:span text:style-name="a2336" text:class-names=""><text:s text:c="1"/></text:span><text:span text:style-name="a2337" text:class-names="">with</text:span><text:span text:style-name="a2338" text:class-names=""><text:s text:c="1"/></text:span><text:span text:style-name="a2339" text:class-names="">empty</text:span><text:span text:style-name="a2340" text:class-names=""><text:s text:c="1"/></text:span><text:span text:style-name="a2341" text:class-names="">bodies</text:span><text:span text:style-name="a2342" text:class-names="">.</text:span></text:p>
            <text:p text:style-name="a2360" text:class-names="" text:cond-style-name=""><text:span text:style-name="a2344" text:class-names="">They</text:span><text:span text:style-name="a2345" text:class-names=""><text:s text:c="1"/></text:span><text:span text:style-name="a2346" text:class-names="">cannot</text:span><text:span text:style-name="a2347" text:class-names=""><text:s text:c="1"/>be<text:s text:c="1"/></text:span><text:span text:style-name="a2348" text:class-names="">instantiated</text:span><text:span text:style-name="a2349" text:class-names="">,<text:s text:c="1"/></text:span><text:span text:style-name="a2350" text:class-names="">just</text:span><text:span text:style-name="a2351" text:class-names=""><text:s text:c="1"/></text:span><text:span text:style-name="a2352" text:class-names="">like</text:span><text:span text:style-name="a2353" text:class-names=""><text:s text:c="1"/></text:span><text:span text:style-name="a2354" text:class-names="">the</text:span><text:span text:style-name="a2355" text:class-names=""><text:s text:c="1"/></text:span><text:span text:style-name="a2356" text:class-names="">abstract</text:span><text:span text:style-name="a2357" text:class-names=""><text:s text:c="1"/></text:span><text:span text:style-name="a2358" text:class-names="">classes</text:span><text:span text:style-name="a2359" text:class-names="">.</text:span></text:p>
            <text:p text:style-name="a2363" text:class-names="" text:cond-style-name=""><text:span text:style-name="a2361" text:class-names="">Why</text:span><text:span text:style-name="a2362" text:class-names=""><text:s text:c="1"/>use Java interfaces?</text:span></text:p>
            <text:list text:style-name="a2377">
              <text:list-item>
                <text:list text:style-name="a2377">
                  <text:list-item>
                    <text:p text:style-name="a2376" text:class-names="" text:cond-style-name=""><text:span text:style-name="a2364" text:class-names="">It</text:span><text:span text:style-name="a2365" text:class-names=""><text:s text:c="1"/></text:span><text:span text:style-name="a2366" text:class-names="">is</text:span><text:span text:style-name="a2367" text:class-names=""><text:s text:c="1"/></text:span><text:span text:style-name="a2368" text:class-names="">used</text:span><text:span text:style-name="a2369" text:class-names=""><text:s text:c="1"/></text:span><text:span text:style-name="a2370" text:class-names="">to</text:span><text:span text:style-name="a2371" text:class-names=""><text:s text:c="1"/></text:span><text:span text:style-name="a2372" text:class-names="">achieve</text:span><text:span text:style-name="a2373" text:class-names=""><text:s text:c="1"/></text:span><text:span text:style-name="a2374" text:class-names="">abstraction</text:span><text:span text:style-name="a2375" text:class-names="">.</text:span></text:p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p text:style-name="a2388" text:class-names="" text:cond-style-name=""><text:span text:style-name="a2378" text:class-names="">With</text:span><text:span text:style-name="a2379" text:class-names=""><text:s text:c="1"/>interfaces<text:s text:c="1"/></text:span><text:span text:style-name="a2380" text:class-names="">we</text:span><text:span text:style-name="a2381" text:class-names=""><text:s text:c="1"/>can<text:s text:c="1"/></text:span><text:span text:style-name="a2382" text:class-names="">support</text:span><text:span text:style-name="a2383" text:class-names=""><text:s text:c="1"/></text:span><text:span text:style-name="a2384" text:class-names="">multiple</text:span><text:span text:style-name="a2385" text:class-names=""><text:s text:c="1"/></text:span><text:span text:style-name="a2386" text:class-names="">inheritance</text:span><text:span text:style-name="a2387" text:class-names="">.</text:span></text:p>
                  </text:list-item>
                </text:list>
              </text:list-item>
            </text:list>
            <text:p text:style-name="a2391" text:class-names="" text:cond-style-name=""><text:span text:style-name="a2390" text:class-names=""/></text:p>
            <text:p text:style-name="a2393" text:class-names="" text:cond-style-name=""><text:span text:style-name="a2392" text:class-names="">Syntax:</text:span></text:p>
            <text:p text:style-name="a2398" text:class-names="" text:cond-style-name=""><text:span text:style-name="a2394" text:class-names="">interface</text:span><text:span text:style-name="a2395" text:class-names=""> &lt;</text:span><text:span text:style-name="a2396" text:class-names="">interface_name</text:span><text:span text:style-name="a2397" text:class-names="">&gt;{  </text:span></text:p>
            <text:p text:style-name="a2402" text:class-names="" text:cond-style-name=""><text:span text:style-name="a2399" text:class-names="">        </text:span><text:span text:style-name="a2400" text:class-names="">// declare constant fields</text:span><text:span text:style-name="a2401" text:class-names="">  </text:span></text:p>
            <text:p text:style-name="a2406" text:class-names="" text:cond-style-name=""><text:span text:style-name="a2403" text:class-names="">    </text:span><text:span text:style-name="a2404" text:class-names="">// declare methods that abstract </text:span><text:span text:style-name="a2405" text:class-names="">  </text:span></text:p>
            <text:p text:style-name="a2410" text:class-names="" text:cond-style-name=""><text:span text:style-name="a2407" text:class-names="">    </text:span><text:span text:style-name="a2408" text:class-names="">// by default</text:span><text:span text:style-name="a2409" text:class-names=""/></text:p>
            <text:p text:style-name="a2414" text:class-names="" text:cond-style-name=""><text:span text:style-name="a2411" text:class-names="">  </text:span><text:span text:style-name="a2412" text:class-names="">.</text:span><text:span text:style-name="a2413" text:class-names="">  </text:span></text:p>
            <text:p text:style-name="a2416" text:class-names="" text:cond-style-name=""><text:span text:style-name="a2415" text:class-names="">}  </text:span></text:p>
            <text:p text:style-name="a2418" text:class-names="" text:cond-style-name=""><text:span text:style-name="a2417" text:class-names=""/></text:p>
          </draw:text-box>
          <svg:title/>
          <svg:desc/>
        </draw:frame>
        <presentation:notes draw:style-name="a2425">
          <draw:frame draw:id="id241" draw:style-name="a2422" draw:name="Marcador de número de diapositiva 6" svg:x="4.67953in" svg:y="11.10827in" svg:width="3.5878in" svg:height="0.58425in">
            <draw:text-box>
              <text:p text:style-name="a2421" text:class-names="" text:cond-style-name=""><text:span text:style-name="a2420" text:class-names=""><text:page-number style:num-format="1" text:fixed="false">17</text:page-number></text:span></text:p>
            </draw:text-box>
            <svg:title/>
            <svg:desc/>
          </draw:frame>
          <draw:page-thumbnail draw:page-number="17" svg:x="1.21181in" svg:y="0.89063in" svg:width="5.84722in" svg:height="4.38542in" presentation:class="page" draw:id="id242" presentation:style-name="a2423" draw:name="Marcador de imagen de diapositiva 1">
            <svg:title/>
            <svg:desc/>
          </draw:page-thumbnail>
          <draw:frame draw:id="id243" presentation:style-name="a242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426" draw:master-page-name="Master2-Layout7-blank-En-blanco" presentation:presentation-page-layout-name="Master2-PPL7" draw:id="Slide-273">
        <draw:frame draw:id="id244" presentation:style-name="a2431" draw:name="Título 1" svg:x="0.55118in" svg:y="0.32953in" svg:width="8.97638in" svg:height="0.75709in" presentation:class="title" presentation:placeholder="false">
          <draw:text-box>
            <text:p text:style-name="a2430" text:class-names="" text:cond-style-name=""><text:span text:style-name="a2427" text:class-names="">6.<text:s text:c="1"/></text:span><text:span text:style-name="a2428" text:class-names="">Interfaces</text:span><text:span text:style-name="a2429" text:class-names=""/></text:p>
          </draw:text-box>
          <svg:title/>
          <svg:desc/>
        </draw:frame>
        <draw:frame draw:id="id245" draw:style-name="a2437" draw:name="Marcador de texto 2" svg:x="1.60304in" svg:y="1.46161in" svg:width="8.60138in" svg:height="5.40505in">
          <draw:text-box>
            <text:p text:style-name="a2434" text:class-names="" text:cond-style-name=""><text:span text:style-name="a2432" text:class-names="">Interface fields are public, static and final by default, and the methods are public and abstract</text:span><text:span text:style-name="a2433" text:class-names="">.</text:span></text:p>
            <text:p text:style-name="a2436" text:class-names="" text:cond-style-name=""><text:span text:style-name="a2435" text:class-names=""/></text:p>
          </draw:text-box>
          <svg:title/>
          <svg:desc/>
        </draw:frame>
        <draw:frame draw:id="id246" draw:style-name="a2438" draw:name="Picture 6" svg:x="2.17361in" svg:y="2.66493in" svg:width="6.67708in" svg:height="1.46875in" style:rel-width="scale" style:rel-height="scale">
          <draw:image xlink:href="media/image8.png" xlink:type="simple" xlink:show="embed" xlink:actuate="onLoad"/>
          <svg:title/>
          <svg:desc>interface in java</svg:desc>
        </draw:frame>
        <presentation:notes draw:style-name="a2444">
          <draw:frame draw:id="id247" draw:style-name="a2441" draw:name="Marcador de número de diapositiva 6" svg:x="4.67953in" svg:y="11.10827in" svg:width="3.5878in" svg:height="0.58425in">
            <draw:text-box>
              <text:p text:style-name="a2440" text:class-names="" text:cond-style-name=""><text:span text:style-name="a2439" text:class-names=""><text:page-number style:num-format="1" text:fixed="false">18</text:page-number></text:span></text:p>
            </draw:text-box>
            <svg:title/>
            <svg:desc/>
          </draw:frame>
          <draw:page-thumbnail draw:page-number="18" svg:x="1.21181in" svg:y="0.89063in" svg:width="5.84722in" svg:height="4.38542in" presentation:class="page" draw:id="id248" presentation:style-name="a2442" draw:name="Marcador de imagen de diapositiva 1">
            <svg:title/>
            <svg:desc/>
          </draw:page-thumbnail>
          <draw:frame draw:id="id249" presentation:style-name="a24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445" draw:master-page-name="Master2-Layout7-blank-En-blanco" presentation:presentation-page-layout-name="Master2-PPL7" draw:id="Slide-274">
        <draw:frame draw:id="id250" presentation:style-name="a2450" draw:name="Título 1" svg:x="0.55118in" svg:y="0.32953in" svg:width="8.97638in" svg:height="0.75709in" presentation:class="title" presentation:placeholder="false">
          <draw:text-box>
            <text:p text:style-name="a2449" text:class-names="" text:cond-style-name=""><text:span text:style-name="a2446" text:class-names="">6.<text:s text:c="1"/></text:span><text:span text:style-name="a2447" text:class-names="">Interfaces</text:span><text:span text:style-name="a2448" text:class-names=""/></text:p>
          </draw:text-box>
          <svg:title/>
          <svg:desc/>
        </draw:frame>
        <draw:frame draw:id="id251" draw:style-name="a2520" draw:name="Marcador de texto 2" svg:x="1.60304in" svg:y="1.46161in" svg:width="8.60138in" svg:height="5.40505in">
          <draw:text-box>
            <text:p text:style-name="a2454" text:class-names="" text:cond-style-name=""><text:span text:style-name="a2451" text:class-names="">//<text:s text:c="1"/></text:span><text:span text:style-name="a2452" text:class-names="">Example</text:span><text:span text:style-name="a2453" text:class-names=""/></text:p>
            <text:p text:style-name="a2459" text:class-names="" text:cond-style-name=""><text:span text:style-name="a2455" text:class-names="">interface</text:span><text:span text:style-name="a2456" text:class-names=""> </text:span><text:span text:style-name="a2457" text:class-names="">printable</text:span><text:span text:style-name="a2458" text:class-names="">{  </text:span></text:p>
            <text:p text:style-name="a2465" text:class-names="" text:cond-style-name=""><text:span text:style-name="a2460" text:class-names=""><text:tab/></text:span><text:span text:style-name="a2461" text:class-names="">void</text:span><text:span text:style-name="a2462" text:class-names=""> </text:span><text:span text:style-name="a2463" text:class-names="">print</text:span><text:span text:style-name="a2464" text:class-names="">();  </text:span></text:p>
            <text:p text:style-name="a2467" text:class-names="" text:cond-style-name=""><text:span text:style-name="a2466" text:class-names="">}  </text:span></text:p>
            <text:p text:style-name="a2474" text:class-names="" text:cond-style-name=""><text:span text:style-name="a2468" text:class-names="">class</text:span><text:span text:style-name="a2469" text:class-names=""> A6 </text:span><text:span text:style-name="a2470" text:class-names="">implements</text:span><text:span text:style-name="a2471" text:class-names=""> </text:span><text:span text:style-name="a2472" text:class-names="">printable</text:span><text:span text:style-name="a2473" text:class-names="">{  </text:span></text:p>
            <text:p text:style-name="a2488" text:class-names="" text:cond-style-name=""><text:span text:style-name="a2475" text:class-names=""><text:tab/></text:span><text:span text:style-name="a2476" text:class-names="">public</text:span><text:span text:style-name="a2477" text:class-names=""> </text:span><text:span text:style-name="a2478" text:class-names="">void</text:span><text:span text:style-name="a2479" text:class-names=""> </text:span><text:span text:style-name="a2480" text:class-names="">print</text:span><text:span text:style-name="a2481" text:class-names="">(){</text:span><text:span text:style-name="a2482" text:class-names="">System.out.println</text:span><text:span text:style-name="a2483" text:class-names="">(</text:span><text:span text:style-name="a2484" text:class-names="">"</text:span><text:span text:style-name="a2485" text:class-names="">Hello</text:span><text:span text:style-name="a2486" text:class-names="">"</text:span><text:span text:style-name="a2487" text:class-names="">);}  </text:span></text:p>
            <text:p text:style-name="a2490" text:class-names="" text:cond-style-name=""><text:span text:style-name="a2489" text:class-names="">  </text:span></text:p>
            <text:p text:style-name="a2503" text:class-names="" text:cond-style-name=""><text:span text:style-name="a2491" text:class-names="">public</text:span><text:span text:style-name="a2492" text:class-names=""> </text:span><text:span text:style-name="a2493" text:class-names="">static</text:span><text:span text:style-name="a2494" text:class-names=""> </text:span><text:span text:style-name="a2495" text:class-names="">void</text:span><text:span text:style-name="a2496" text:class-names=""> </text:span><text:span text:style-name="a2497" text:class-names="">main</text:span><text:span text:style-name="a2498" text:class-names="">(</text:span><text:span text:style-name="a2499" text:class-names="">String</text:span><text:span text:style-name="a2500" text:class-names=""> </text:span><text:span text:style-name="a2501" text:class-names="">args</text:span><text:span text:style-name="a2502" text:class-names="">[]){  </text:span></text:p>
            <text:p text:style-name="a2509" text:class-names="" text:cond-style-name=""><text:span text:style-name="a2504" text:class-names=""><text:tab/>A6 </text:span><text:span text:style-name="a2505" text:class-names="">obj</text:span><text:span text:style-name="a2506" text:class-names=""> = </text:span><text:span text:style-name="a2507" text:class-names="">new</text:span><text:span text:style-name="a2508" text:class-names=""> A6();  </text:span></text:p>
            <text:p text:style-name="a2513" text:class-names="" text:cond-style-name=""><text:span text:style-name="a2510" text:class-names=""><text:tab/></text:span><text:span text:style-name="a2511" text:class-names="">obj.print</text:span><text:span text:style-name="a2512" text:class-names="">();  </text:span></text:p>
            <text:p text:style-name="a2515" text:class-names="" text:cond-style-name=""><text:span text:style-name="a2514" text:class-names=""> }  </text:span></text:p>
            <text:p text:style-name="a2517" text:class-names="" text:cond-style-name=""><text:span text:style-name="a2516" text:class-names="">}  </text:span></text:p>
            <text:p text:style-name="a2519" text:class-names="" text:cond-style-name=""><text:span text:style-name="a2518" text:class-names=""/></text:p>
          </draw:text-box>
          <svg:title/>
          <svg:desc/>
        </draw:frame>
        <presentation:notes draw:style-name="a2526">
          <draw:frame draw:id="id252" draw:style-name="a2523" draw:name="Marcador de número de diapositiva 6" svg:x="4.67953in" svg:y="11.10827in" svg:width="3.5878in" svg:height="0.58425in">
            <draw:text-box>
              <text:p text:style-name="a2522" text:class-names="" text:cond-style-name=""><text:span text:style-name="a2521" text:class-names=""><text:page-number style:num-format="1" text:fixed="false">19</text:page-number></text:span></text:p>
            </draw:text-box>
            <svg:title/>
            <svg:desc/>
          </draw:frame>
          <draw:page-thumbnail draw:page-number="19" svg:x="1.21181in" svg:y="0.89063in" svg:width="5.84722in" svg:height="4.38542in" presentation:class="page" draw:id="id253" presentation:style-name="a2524" draw:name="Marcador de imagen de diapositiva 1">
            <svg:title/>
            <svg:desc/>
          </draw:page-thumbnail>
          <draw:frame draw:id="id254" presentation:style-name="a252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527" draw:master-page-name="Master2-Layout7-blank-En-blanco" presentation:presentation-page-layout-name="Master2-PPL7" draw:id="Slide-275">
        <draw:frame draw:id="id255" presentation:style-name="a2532" draw:name="Título 1" svg:x="0.55118in" svg:y="0.32953in" svg:width="8.97638in" svg:height="0.75709in" presentation:class="title" presentation:placeholder="false">
          <draw:text-box>
            <text:p text:style-name="a2531" text:class-names="" text:cond-style-name=""><text:span text:style-name="a2528" text:class-names="">6.<text:s text:c="1"/></text:span><text:span text:style-name="a2529" text:class-names="">Interfaces</text:span><text:span text:style-name="a2530" text:class-names=""/></text:p>
          </draw:text-box>
          <svg:title/>
          <svg:desc/>
        </draw:frame>
        <draw:frame draw:id="id256" draw:style-name="a2533" draw:name="Imagen 4" svg:x="0.43182in" svg:y="1.51547in" svg:width="9.98864in" svg:height="5.5378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539">
          <draw:frame draw:id="id257" draw:style-name="a2536" draw:name="Marcador de número de diapositiva 6" svg:x="4.67953in" svg:y="11.10827in" svg:width="3.5878in" svg:height="0.58425in">
            <draw:text-box>
              <text:p text:style-name="a2535" text:class-names="" text:cond-style-name=""><text:span text:style-name="a2534" text:class-names=""><text:page-number style:num-format="1" text:fixed="false">20</text:page-number></text:span></text:p>
            </draw:text-box>
            <svg:title/>
            <svg:desc/>
          </draw:frame>
          <draw:page-thumbnail draw:page-number="20" svg:x="1.21181in" svg:y="0.89063in" svg:width="5.84722in" svg:height="4.38542in" presentation:class="page" draw:id="id258" presentation:style-name="a2537" draw:name="Marcador de imagen de diapositiva 1">
            <svg:title/>
            <svg:desc/>
          </draw:page-thumbnail>
          <draw:frame draw:id="id259" presentation:style-name="a253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ítulo y objetos">
      <presentation:placeholder presentation:object="title" svg:x="0.55118in" svg:y="2.34803in" svg:width="8.63898in" svg:height="1.38031in"/>
      <presentation:placeholder presentation:object="object" svg:x="0.55118in" svg:y="4.57244in" svg:width="9.92087in" svg:height="3.26811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Dos objetos">
      <presentation:placeholder presentation:object="title" svg:x="0.55118in" svg:y="2.34803in" svg:width="8.63898in" svg:height="1.38031in"/>
      <presentation:placeholder presentation:object="object" svg:x="0.55035in" svg:y="4.57292in" svg:width="4.87674in" svg:height="3.26736in"/>
      <presentation:placeholder presentation:object="object" svg:x="5.59375in" svg:y="4.57292in" svg:width="4.87847in" svg:height="3.26736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Solo el título">
      <presentation:placeholder presentation:object="title" svg:x="0.55118in" svg:y="2.34803in" svg:width="8.63898in" svg:height="1.38031in"/>
    </style:presentation-page-layout>
    <style:presentation-page-layout style:name="Master1-PPL7" style:display-name="En blanco"/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ítulo y texto vertical">
      <presentation:placeholder presentation:object="title" svg:x="0.55118in" svg:y="2.34803in" svg:width="8.63898in" svg:height="1.38031in"/>
      <presentation:placeholder presentation:object="outline" svg:x="0.55118in" svg:y="4.57244in" svg:width="9.92087in" svg:height="3.26811in"/>
    </style:presentation-page-layout>
    <style:presentation-page-layout style:name="Master1-PPL11" style:display-name="Título vertical y texto">
      <presentation:placeholder presentation:object="title" svg:x="7.99306in" svg:y="2.34722in" svg:width="2.47917in" svg:height="5.49306in"/>
      <presentation:placeholder presentation:object="outline" svg:x="0.55035in" svg:y="2.34722in" svg:width="7.27604in" svg:height="5.49306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2" style:display-name="Título y objetos">
      <presentation:placeholder presentation:object="title" svg:x="0.55118in" svg:y="0.32953in" svg:width="8.97638in" svg:height="0.81496in"/>
      <presentation:placeholder presentation:object="object" svg:x="0.55118in" svg:y="1.93465in" svg:width="9.92087in" svg:height="5.5397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4" style:display-name="Dos objetos">
      <presentation:placeholder presentation:object="title" svg:x="0.55118in" svg:y="0.32953in" svg:width="8.97638in" svg:height="0.81496in"/>
      <presentation:placeholder presentation:object="object" svg:x="0.55035in" svg:y="1.93403in" svg:width="4.87674in" svg:height="5.53993in"/>
      <presentation:placeholder presentation:object="object" svg:x="5.59375in" svg:y="1.93403in" svg:width="4.87847in" svg:height="5.53993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6" style:display-name="Solo el título">
      <presentation:placeholder presentation:object="title" svg:x="0.55118in" svg:y="0.32953in" svg:width="8.97638in" svg:height="0.8149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7" style:display-name="En blanco"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10" style:display-name="Título y texto vertical">
      <presentation:placeholder presentation:object="title" svg:x="0.55118in" svg:y="0.32953in" svg:width="8.97638in" svg:height="0.81496in"/>
      <presentation:placeholder presentation:object="outline" svg:x="0.55118in" svg:y="1.93465in" svg:width="9.92087in" svg:height="5.5397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1441in"/>
      <presentation:placeholder presentation:object="outline" svg:x="0.55035in" svg:y="0.32986in" svg:width="7.27604in" svg:height="7.1441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non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2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8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draw:fill="none" draw:stroke="non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drawing-page" style:name="a26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7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6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non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non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81" style:parent-style-name="Graphics">
      <style:graphic-properties draw:fill="none" fo:clip="rect(0in, 0in, 0in, 0in)" draw:stroke="none" draw:luminance="0%" draw:contrast="0%" draw:image-opacity="100%"/>
    </style:style>
    <style:style style:family="text" style:name="a48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draw:fill="none" draw:stroke="non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draw:fill="none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non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in)" draw:stroke="none" draw:luminance="0%" draw:contrast="0%" draw:imag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9">
      <style:graphic-properties draw:fill="none" draw:stroke="non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 style:parent-style-name="Graphics">
      <style:graphic-properties draw:fill="none" fo:clip="rect(0in, 0in, 0in, 0in)" draw:stroke="none" draw:luminance="0%" draw:contrast="0%" draw:imag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none" draw:stroke="non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draw:fill="none" draw:stroke="non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draw:fill="none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graphic" style:name="a1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Marcador de título 1" svg:x="0.55118in" svg:y="2.34803in" svg:width="8.63898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Marcador de texto 2" svg:x="0.55118in" svg:y="4.57244in" svg:width="9.92087in" svg:height="3.2681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presentation:notes style:page-layout-name="pageLayout2" draw:style-name="a37">
        <draw:page-thumbnail svg:x="1.21063in" svg:y="0.88858in" svg:width="5.84567in" svg:height="4.38425in" presentation:class="page" draw:id="id3" presentation:style-name="a21" draw:name="Marcador de imagen de diapositiva 1">
          <svg:title/>
          <svg:desc/>
        </draw:page-thumbnail>
        <draw:frame draw:id="id4" presentation:style-name="a24" draw:name="Marcador de notas 2" svg:x="0.82677in" svg:y="5.55394in" svg:width="6.61378in" svg:height="5.26142in" presentation:class="notes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5" presentation:style-name="a27" draw:name="Marcador de encabezado 3" svg:x="0in" svg:y="0in" svg:width="3.5878in" svg:height="0.58425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0" draw:name="Marcador de fecha 4" svg:x="4.67953in" svg:y="0in" svg:width="3.5878in" svg:height="0.58425in" presentation:class="date-time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7" presentation:style-name="a33" draw:name="Marcador de pie de página 5" svg:x="0in" svg:y="11.10827in" svg:width="3.5878in" svg:height="0.58425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Marcador de número de diapositiva 6" svg:x="4.67953in" svg:y="11.10827in" svg:width="3.5878in" svg:height="0.58425in" presentation:class="page-number" presentation:placeholder="false">
          <draw:text-box>
            <text:p text:style-name="a35" text:class-names="" text:cond-style-name=""><text:span text:style-name="a3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8">
      <draw:frame draw:id="id9" draw:layer="Master1-bg" draw:style-name="a39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10" presentation:style-name="a42" draw:name="Título 1" svg:x="1.37847in" svg:y="1.35243in" svg:width="8.26736in" svg:height="2.87847in" presentation:class="title" presentation:placeholder="false">
        <draw:text-box>
          <text:p text:style-name="a41" text:class-names="" text:cond-style-name=""><text:span text:style-name="a40" text:class-names="">Haga clic para modificar el estilo de título del patrón</text:span></text:p>
        </draw:text-box>
        <svg:title/>
        <svg:desc/>
      </draw:frame>
      <draw:frame draw:id="id11" presentation:style-name="a45" draw:name="Subtítulo 2" svg:x="1.37847in" svg:y="4.34201in" svg:width="8.26736in" svg:height="1.99653in" presentation:class="subtitle" presentation:placeholder="false">
        <draw:text-box>
          <text:p text:style-name="a44" text:class-names="" text:cond-style-name=""><text:span text:style-name="a43" text:class-names="">Haga clic para modificar el estilo de subtítulo del patrón</text:span></text:p>
        </draw:text-box>
        <svg:title/>
        <svg:desc/>
      </draw:frame>
      <presentation:notes style:page-layout-name="pageLayout2" draw:style-name="a62">
        <draw:page-thumbnail svg:x="1.21063in" svg:y="0.88858in" svg:width="5.84567in" svg:height="4.38425in" presentation:class="page" draw:id="id3" presentation:style-name="a46" draw:name="Marcador de imagen de diapositiva 1">
          <svg:title/>
          <svg:desc/>
        </draw:page-thumbnail>
        <draw:frame draw:id="id4" presentation:style-name="a49" draw:name="Marcador de notas 2" svg:x="0.82677in" svg:y="5.55394in" svg:width="6.61378in" svg:height="5.26142in" presentation:class="notes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5" presentation:style-name="a52" draw:name="Marcador de encabezado 3" svg:x="0in" svg:y="0in" svg:width="3.5878in" svg:height="0.58425in" presentation:class="head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6" presentation:style-name="a55" draw:name="Marcador de fecha 4" svg:x="4.67953in" svg:y="0in" svg:width="3.5878in" svg:height="0.58425in" presentation:class="date-time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7" presentation:style-name="a58" draw:name="Marcador de pie de página 5" svg:x="0in" svg:y="11.10827in" svg:width="3.5878in" svg:height="0.5842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8" presentation:style-name="a61" draw:name="Marcador de número de diapositiva 6" svg:x="4.67953in" svg:y="11.10827in" svg:width="3.5878in" svg:height="0.5842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3">
      <draw:frame draw:id="id12" draw:layer="Master1-bg" draw:style-name="a64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13" presentation:style-name="a67" draw:name="Título 1" svg:x="0.55118in" svg:y="2.34803in" svg:width="8.63898in" svg:height="1.38031in" presentation:class="title" presentation:placeholder="false">
        <draw:text-box>
          <text:p text:style-name="a66" text:class-names="" text:cond-style-name=""><text:span text:style-name="a65" text:class-names="">Haga clic para modificar el estilo de título del patrón</text:span></text:p>
        </draw:text-box>
        <svg:title/>
        <svg:desc/>
      </draw:frame>
      <draw:frame draw:id="id14" presentation:style-name="a82" draw:name="Marcador de contenido 2" svg:x="0.55118in" svg:y="4.57244in" svg:width="9.92087in" svg:height="3.26811in" presentation:class="object" presentation:placeholder="false">
        <draw:text-box>
          <text:p text:style-name="a69" text:class-names="" text:cond-style-name=""><text:span text:style-name="a68" text:class-names="">Haga clic para modificar los estilos de texto del patrón</text:span></text:p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gundo ni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9">
        <draw:page-thumbnail svg:x="1.21063in" svg:y="0.88858in" svg:width="5.84567in" svg:height="4.38425in" presentation:class="page" draw:id="id3" presentation:style-name="a83" draw:name="Marcador de imagen de diapositiva 1">
          <svg:title/>
          <svg:desc/>
        </draw:page-thumbnail>
        <draw:frame draw:id="id4" presentation:style-name="a86" draw:name="Marcador de notas 2" svg:x="0.82677in" svg:y="5.55394in" svg:width="6.61378in" svg:height="5.26142in" presentation:class="notes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5" presentation:style-name="a89" draw:name="Marcador de encabezado 3" svg:x="0in" svg:y="0in" svg:width="3.5878in" svg:height="0.5842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2" draw:name="Marcador de fecha 4" svg:x="4.67953in" svg:y="0in" svg:width="3.5878in" svg:height="0.58425in" presentation:class="date-time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5" draw:name="Marcador de pie de página 5" svg:x="0in" svg:y="11.10827in" svg:width="3.5878in" svg:height="0.58425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8" draw:name="Marcador de número de diapositiva 6" svg:x="4.67953in" svg:y="11.10827in" svg:width="3.5878in" svg:height="0.58425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00">
      <draw:frame draw:id="id15" draw:layer="Master1-bg" draw:style-name="a101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16" presentation:style-name="a104" draw:name="Título 1" svg:x="0.75174in" svg:y="2.06076in" svg:width="9.50868in" svg:height="3.43924in" presentation:class="title" presentation:placeholder="false">
        <draw:text-box>
          <text:p text:style-name="a103" text:class-names="" text:cond-style-name=""><text:span text:style-name="a102" text:class-names="">Haga clic para modificar el estilo de título del patrón</text:span></text:p>
        </draw:text-box>
        <svg:title/>
        <svg:desc/>
      </draw:frame>
      <draw:frame draw:id="id17" presentation:style-name="a108" draw:name="Marcador de texto 2" svg:x="0.75174in" svg:y="5.53299in" svg:width="9.50868in" svg:height="1.80729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125">
        <draw:page-thumbnail svg:x="1.21063in" svg:y="0.88858in" svg:width="5.84567in" svg:height="4.38425in" presentation:class="page" draw:id="id3" presentation:style-name="a109" draw:name="Marcador de imagen de diapositiva 1">
          <svg:title/>
          <svg:desc/>
        </draw:page-thumbnail>
        <draw:frame draw:id="id4" presentation:style-name="a112" draw:name="Marcador de notas 2" svg:x="0.82677in" svg:y="5.55394in" svg:width="6.61378in" svg:height="5.26142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5" presentation:style-name="a115" draw:name="Marcador de encabezado 3" svg:x="0in" svg:y="0in" svg:width="3.5878in" svg:height="0.5842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6" presentation:style-name="a118" draw:name="Marcador de fecha 4" svg:x="4.67953in" svg:y="0in" svg:width="3.5878in" svg:height="0.58425in" presentation:class="date-time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Marcador de pie de página 5" svg:x="0in" svg:y="11.10827in" svg:width="3.5878in" svg:height="0.58425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Marcador de número de diapositiva 6" svg:x="4.67953in" svg:y="11.10827in" svg:width="3.5878in" svg:height="0.58425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26">
      <draw:frame draw:id="id18" draw:layer="Master1-bg" draw:style-name="a127" draw:name="Imagen 4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19" presentation:style-name="a130" draw:name="Título 1" svg:x="0.55118in" svg:y="2.34803in" svg:width="8.63898in" svg:height="1.38031in" presentation:class="title" presentation:placeholder="false">
        <draw:text-box>
          <text:p text:style-name="a129" text:class-names="" text:cond-style-name=""><text:span text:style-name="a128" text:class-names="">Haga clic para modificar el estilo de título del patrón</text:span></text:p>
        </draw:text-box>
        <svg:title/>
        <svg:desc/>
      </draw:frame>
      <draw:frame draw:id="id20" presentation:style-name="a145" draw:name="Marcador de contenido 2" svg:x="0.55035in" svg:y="4.57292in" svg:width="4.87674in" svg:height="3.26736in" presentation:class="object" presentation:placeholder="false">
        <draw:text-box>
          <text:p text:style-name="a132" text:class-names="" text:cond-style-name=""><text:span text:style-name="a131" text:class-names="">Haga clic para modificar los estilos de texto del patrón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gundo ni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0" draw:name="Marcador de contenido 3" svg:x="5.59375in" svg:y="4.57292in" svg:width="4.87847in" svg:height="3.26736in" presentation:class="object" presentation:placeholder="false">
        <draw:text-box>
          <text:p text:style-name="a147" text:class-names="" text:cond-style-name=""><text:span text:style-name="a146" text:class-names="">Haga clic para modificar los estilos de texto del patrón</text:span></text:p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gundo ni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3" presentation:style-name="a161" draw:name="Marcador de imagen de diapositiva 1">
          <svg:title/>
          <svg:desc/>
        </draw:page-thumbnail>
        <draw:frame draw:id="id4" presentation:style-name="a164" draw:name="Marcador de notas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7" draw:name="Marcador de encabezado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0" draw:name="Marcador de fecha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7" presentation:style-name="a173" draw:name="Marcador de pie de página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Marcador de número de diapositiva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78">
      <draw:frame draw:id="id22" draw:layer="Master1-bg" draw:style-name="a179" draw:name="Imagen 6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23" presentation:style-name="a182" draw:name="Título 1" svg:x="0.75868in" svg:y="0.44097in" svg:width="9.50868in" svg:height="1.59722in" presentation:class="title" presentation:placeholder="false">
        <draw:text-box>
          <text:p text:style-name="a181" text:class-names="" text:cond-style-name=""><text:span text:style-name="a180" text:class-names="">Haga clic para modificar el estilo de título del patrón</text:span></text:p>
        </draw:text-box>
        <svg:title/>
        <svg:desc/>
      </draw:frame>
      <draw:frame draw:id="id24" presentation:style-name="a186" draw:name="Marcador de texto 2" svg:x="0.75868in" svg:y="2.02604in" svg:width="4.66493in" svg:height="0.99306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</draw:text-box>
        <svg:title/>
        <svg:desc/>
      </draw:frame>
      <draw:frame draw:id="id25" presentation:style-name="a201" draw:name="Marcador de contenido 3" svg:x="0.75868in" svg:y="3.0191in" svg:width="4.66493in" svg:height="4.44271in" presentation:class="object" presentation:placeholder="false">
        <draw:text-box>
          <text:p text:style-name="a188" text:class-names="" text:cond-style-name=""><text:span text:style-name="a187" text:class-names="">Haga clic para modificar los estilos de texto del patró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gundo ni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05" draw:name="Marcador de texto 4" svg:x="5.5816in" svg:y="2.02604in" svg:width="4.68576in" svg:height="0.99306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</draw:text-box>
        <svg:title/>
        <svg:desc/>
      </draw:frame>
      <draw:frame draw:id="id27" presentation:style-name="a220" draw:name="Marcador de contenido 5" svg:x="5.5816in" svg:y="3.0191in" svg:width="4.68576in" svg:height="4.44271in" presentation:class="object" presentation:placeholder="false">
        <draw:text-box>
          <text:p text:style-name="a207" text:class-names="" text:cond-style-name=""><text:span text:style-name="a206" text:class-names="">Haga clic para modificar los estilos de texto del patrón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gundo ni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3" presentation:style-name="a221" draw:name="Marcador de imagen de diapositiva 1">
          <svg:title/>
          <svg:desc/>
        </draw:page-thumbnail>
        <draw:frame draw:id="id4" presentation:style-name="a224" draw:name="Marcador de notas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7" draw:name="Marcador de encabezado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6" presentation:style-name="a230" draw:name="Marcador de fecha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7" presentation:style-name="a233" draw:name="Marcador de pie de página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Marcador de número de diapositiva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38">
      <draw:frame draw:id="id28" draw:layer="Master1-bg" draw:style-name="a239" draw:name="Imagen 2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29" presentation:style-name="a242" draw:name="Título 1" svg:x="0.55118in" svg:y="2.34803in" svg:width="8.63898in" svg:height="1.38031in" presentation:class="title" presentation:placeholder="false">
        <draw:text-box>
          <text:p text:style-name="a241" text:class-names="" text:cond-style-name=""><text:span text:style-name="a240" text:class-names="">Haga clic para modificar el estilo de título del patrón</text:span></text:p>
        </draw:text-box>
        <svg:title/>
        <svg:desc/>
      </draw:frame>
      <presentation:notes style:page-layout-name="pageLayout2" draw:style-name="a259">
        <draw:page-thumbnail svg:x="1.21063in" svg:y="0.88858in" svg:width="5.84567in" svg:height="4.38425in" presentation:class="page" draw:id="id3" presentation:style-name="a243" draw:name="Marcador de imagen de diapositiva 1">
          <svg:title/>
          <svg:desc/>
        </draw:page-thumbnail>
        <draw:frame draw:id="id4" presentation:style-name="a246" draw:name="Marcador de notas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5" presentation:style-name="a249" draw:name="Marcador de encabezado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6" presentation:style-name="a252" draw:name="Marcador de fecha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7" presentation:style-name="a255" draw:name="Marcador de pie de página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8" presentation:style-name="a258" draw:name="Marcador de número de diapositiva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60">
      <draw:frame draw:id="id30" draw:layer="Master1-bg" draw:style-name="a261" draw:name="Imagen 1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3" presentation:style-name="a262" draw:name="Marcador de imagen de diapositiva 1">
          <svg:title/>
          <svg:desc/>
        </draw:page-thumbnail>
        <draw:frame draw:id="id4" presentation:style-name="a265" draw:name="Marcador de notas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5" presentation:style-name="a268" draw:name="Marcador de encabezado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1" draw:name="Marcador de fecha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7" presentation:style-name="a274" draw:name="Marcador de pie de página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8" presentation:style-name="a277" draw:name="Marcador de número de diapositiva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279">
      <draw:frame draw:id="id31" draw:layer="Master1-bg" draw:style-name="a280" draw:name="Imagen 4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32" presentation:style-name="a283" draw:name="Título 1" svg:x="0.75868in" svg:y="0.55035in" svg:width="3.55556in" svg:height="1.93056in" presentation:class="title" presentation:placeholder="false">
        <draw:text-box>
          <text:p text:style-name="a282" text:class-names="" text:cond-style-name=""><text:span text:style-name="a281" text:class-names="">Haga clic para modificar el estilo de título del patrón</text:span></text:p>
        </draw:text-box>
        <svg:title/>
        <svg:desc/>
      </draw:frame>
      <draw:frame draw:id="id33" presentation:style-name="a298" draw:name="Marcador de contenido 2" svg:x="4.6875in" svg:y="1.19097in" svg:width="5.57986in" svg:height="5.875in" presentation:class="object" presentation:placeholder="false">
        <draw:text-box>
          <text:p text:style-name="a285" text:class-names="" text:cond-style-name=""><text:span text:style-name="a284" text:class-names="">Haga clic para modificar los estilos de texto del patrón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gundo ni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2" draw:name="Marcador de texto 3" svg:x="0.75868in" svg:y="2.4809in" svg:width="3.55556in" svg:height="4.5937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319">
        <draw:page-thumbnail svg:x="1.21063in" svg:y="0.88858in" svg:width="5.84567in" svg:height="4.38425in" presentation:class="page" draw:id="id3" presentation:style-name="a303" draw:name="Marcador de imagen de diapositiva 1">
          <svg:title/>
          <svg:desc/>
        </draw:page-thumbnail>
        <draw:frame draw:id="id4" presentation:style-name="a306" draw:name="Marcador de notas 2" svg:x="0.82677in" svg:y="5.55394in" svg:width="6.61378in" svg:height="5.26142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5" presentation:style-name="a309" draw:name="Marcador de encabezado 3" svg:x="0in" svg:y="0in" svg:width="3.5878in" svg:height="0.5842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6" presentation:style-name="a312" draw:name="Marcador de fecha 4" svg:x="4.67953in" svg:y="0in" svg:width="3.5878in" svg:height="0.58425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7" presentation:style-name="a315" draw:name="Marcador de pie de página 5" svg:x="0in" svg:y="11.10827in" svg:width="3.5878in" svg:height="0.5842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8" presentation:style-name="a318" draw:name="Marcador de número de diapositiva 6" svg:x="4.67953in" svg:y="11.10827in" svg:width="3.5878in" svg:height="0.5842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20">
      <draw:frame draw:id="id35" draw:layer="Master1-bg" draw:style-name="a321" draw:name="Imagen 4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36" presentation:style-name="a324" draw:name="Título 1" svg:x="0.75868in" svg:y="0.55035in" svg:width="3.55556in" svg:height="1.93056in" presentation:class="title" presentation:placeholder="false">
        <draw:text-box>
          <text:p text:style-name="a323" text:class-names="" text:cond-style-name=""><text:span text:style-name="a322" text:class-names="">Haga clic para modificar el estilo de título del patrón</text:span></text:p>
        </draw:text-box>
        <svg:title/>
        <svg:desc/>
      </draw:frame>
      <draw:frame draw:id="id37" presentation:style-name="a327" draw:name="Marcador de posición de imagen 2" svg:x="4.6875in" svg:y="1.19097in" svg:width="5.57986in" svg:height="5.875in" presentation:class="graphic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8" presentation:style-name="a331" draw:name="Marcador de texto 3" svg:x="0.75868in" svg:y="2.4809in" svg:width="3.55556in" svg:height="4.5937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348">
        <draw:page-thumbnail svg:x="1.21063in" svg:y="0.88858in" svg:width="5.84567in" svg:height="4.38425in" presentation:class="page" draw:id="id3" presentation:style-name="a332" draw:name="Marcador de imagen de diapositiva 1">
          <svg:title/>
          <svg:desc/>
        </draw:page-thumbnail>
        <draw:frame draw:id="id4" presentation:style-name="a335" draw:name="Marcador de notas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5" presentation:style-name="a338" draw:name="Marcador de encabezado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6" presentation:style-name="a341" draw:name="Marcador de fecha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Marcador de pie de página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Marcador de número de diapositiva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49">
      <draw:frame draw:id="id39" draw:layer="Master1-bg" draw:style-name="a350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40" presentation:style-name="a353" draw:name="Título 1" svg:x="0.55118in" svg:y="2.34803in" svg:width="8.63898in" svg:height="1.38031in" presentation:class="title" presentation:placeholder="false">
        <draw:text-box>
          <text:p text:style-name="a352" text:class-names="" text:cond-style-name=""><text:span text:style-name="a351" text:class-names="">Haga clic para modificar el estilo de título del patrón</text:span></text:p>
        </draw:text-box>
        <svg:title/>
        <svg:desc/>
      </draw:frame>
      <draw:frame draw:id="id41" presentation:style-name="a369" draw:name="Marcador de texto vertical 2" svg:x="0.55118in" svg:y="4.57244in" svg:width="9.92087in" svg:height="3.26811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Haga clic para modificar los estilos de texto del patrón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gundo ni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3" presentation:style-name="a370" draw:name="Marcador de imagen de diapositiva 1">
          <svg:title/>
          <svg:desc/>
        </draw:page-thumbnail>
        <draw:frame draw:id="id4" presentation:style-name="a373" draw:name="Marcador de notas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5" presentation:style-name="a376" draw:name="Marcador de encabezado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6" presentation:style-name="a379" draw:name="Marcador de fecha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pie de página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número de diapositiva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387">
      <draw:frame draw:id="id42" draw:layer="Master1-bg" draw:style-name="a388" draw:name="Imagen 3" svg:x="0.53386in" svg:y="2.45276in" svg:width="9.92638in" svg:height="1.56693in" style:rel-width="scale" style:rel-height="scale">
        <draw:image xlink:href="media/image10.png" xlink:type="simple" xlink:show="embed" xlink:actuate="onLoad"/>
        <svg:title/>
        <svg:desc/>
      </draw:frame>
      <draw:frame draw:id="id43" presentation:style-name="a391" draw:name="Título vertical 1" svg:x="7.99306in" svg:y="2.34722in" svg:width="2.47917in" svg:height="5.49306in" presentation:class="title" presentation:placeholder="false">
        <draw:text-box>
          <text:p text:style-name="a390" text:class-names="" text:cond-style-name=""><text:span text:style-name="a389" text:class-names="">Haga clic para modificar el estilo de título del patrón</text:span></text:p>
        </draw:text-box>
        <svg:title/>
        <svg:desc/>
      </draw:frame>
      <draw:frame draw:id="id44" presentation:style-name="a407" draw:name="Marcador de texto vertical 2" svg:x="0.55035in" svg:y="2.34722in" svg:width="7.27604in" svg:height="5.49306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Haga clic para modificar los estilos de texto del patrón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gundo ni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24">
        <draw:page-thumbnail svg:x="1.21063in" svg:y="0.88858in" svg:width="5.84567in" svg:height="4.38425in" presentation:class="page" draw:id="id3" presentation:style-name="a408" draw:name="Marcador de imagen de diapositiva 1">
          <svg:title/>
          <svg:desc/>
        </draw:page-thumbnail>
        <draw:frame draw:id="id4" presentation:style-name="a411" draw:name="Marcador de notas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5" presentation:style-name="a414" draw:name="Marcador de encabezado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7" draw:name="Marcador de fecha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pie de página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número de diapositiva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Pencil1" style:page-layout-name="pageLayout1" draw:style-name="a425">
      <draw:custom-shape svg:x="0in" svg:y="-0.01299in" svg:width="11.02362in" svg:height="1.32244in" draw:id="id45" draw:style-name="a428" draw:name="Forma libre: forma 1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31" draw:name="Marcador de título 2" svg:x="0.55118in" svg:y="0.32953in" svg:width="8.97638in" svg:height="0.81496in" presentation:class="titl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7" presentation:style-name="a447" draw:name="Marcador de texto 3" svg:x="0.55118in" svg:y="1.93465in" svg:width="9.92087in" svg:height="5.53976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Haga clic para modificar los estilos de texto del patrón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gundo ni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50" draw:name="Marcador de fecha 4" svg:x="0.55118in" svg:y="8.00945in" svg:width="2.56811in" svg:height="0.25827in" presentation:class="date-tim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9" presentation:style-name="a453" draw:name="Marcador de pie de página 5" svg:x="3.77008in" svg:y="7.93976in" svg:width="3.49409in" svg:height="0.32795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0" presentation:style-name="a456" draw:name="Marcador de número de diapositiva 6" svg:x="7.90394in" svg:y="7.93976in" svg:width="2.56811in" svg:height="0.32795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>‹Nº›</text:page-number></text:span></text:p>
        </draw:text-box>
        <svg:title/>
        <svg:desc/>
      </draw:frame>
      <draw:frame draw:id="id51" draw:style-name="a457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52" draw:style-name="a458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3" presentation:style-name="a459" draw:name="Marcador de imagen de diapositiva 1">
          <svg:title/>
          <svg:desc/>
        </draw:page-thumbnail>
        <draw:frame draw:id="id4" presentation:style-name="a462" draw:name="Marcador de nota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5" draw:name="Marcador de encabezado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68" draw:name="Marcador de fecha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Marcador de pie de página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Marcador de número de diapositiva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476">
      <draw:custom-shape svg:x="0in" svg:y="-0.01299in" svg:width="11.02362in" svg:height="1.32244in" draw:id="id53" draw:layer="Master2-bg" draw:style-name="a479" draw:name="Forma libre: forma 1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draw:layer="Master2-bg" draw:style-name="a480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55" draw:layer="Master2-bg" draw:style-name="a481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56" presentation:style-name="a484" draw:name="Título 1" svg:x="1.37847in" svg:y="1.35243in" svg:width="8.26736in" svg:height="2.87847in" presentation:class="title" presentation:placeholder="false">
        <draw:text-box>
          <text:p text:style-name="a483" text:class-names="" text:cond-style-name=""><text:span text:style-name="a482" text:class-names="">Haga clic para modificar el estilo de título del patrón</text:span></text:p>
        </draw:text-box>
        <svg:title/>
        <svg:desc/>
      </draw:frame>
      <draw:frame draw:id="id57" presentation:style-name="a487" draw:name="Subtítulo 2" svg:x="1.37847in" svg:y="4.34201in" svg:width="8.26736in" svg:height="1.99653in" presentation:class="subtitle" presentation:placeholder="false">
        <draw:text-box>
          <text:p text:style-name="a486" text:class-names="" text:cond-style-name=""><text:span text:style-name="a485" text:class-names="">Haga clic para modificar el estilo de subtítulo del patrón</text:span></text:p>
        </draw:text-box>
        <svg:title/>
        <svg:desc/>
      </draw:frame>
      <draw:frame draw:id="id58" presentation:style-name="a490" draw:name="Marcador de fecha 3" svg:x="0.55118in" svg:y="8.00945in" svg:width="2.56811in" svg:height="0.25827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9" presentation:style-name="a493" draw:name="Marcador de pie de página 4" svg:x="3.77008in" svg:y="7.93976in" svg:width="3.49409in" svg:height="0.3279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6" draw:name="Marcador de número de diapositiva 5" svg:x="7.90394in" svg:y="7.93976in" svg:width="2.56811in" svg:height="0.32795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3" presentation:style-name="a497" draw:name="Marcador de imagen de diapositiva 1">
          <svg:title/>
          <svg:desc/>
        </draw:page-thumbnail>
        <draw:frame draw:id="id4" presentation:style-name="a500" draw:name="Marcador de nota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5" presentation:style-name="a503" draw:name="Marcador de encabezad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6" draw:name="Marcador de fech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7" presentation:style-name="a509" draw:name="Marcador de pie de página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8" presentation:style-name="a512" draw:name="Marcador de número de diapositiva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514">
      <draw:custom-shape svg:x="0in" svg:y="-0.01299in" svg:width="11.02362in" svg:height="1.32244in" draw:id="id61" draw:layer="Master2-bg" draw:style-name="a517" draw:name="Forma libre: forma 1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2-bg" draw:style-name="a518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63" draw:layer="Master2-bg" draw:style-name="a519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64" presentation:style-name="a522" draw:name="Título 1" svg:x="0.55118in" svg:y="0.32953in" svg:width="8.97638in" svg:height="0.81496in" presentation:class="title" presentation:placeholder="false">
        <draw:text-box>
          <text:p text:style-name="a521" text:class-names="" text:cond-style-name=""><text:span text:style-name="a520" text:class-names="">Haga clic para modificar el estilo de título del patrón</text:span></text:p>
        </draw:text-box>
        <svg:title/>
        <svg:desc/>
      </draw:frame>
      <draw:frame draw:id="id65" presentation:style-name="a537" draw:name="Marcador de contenido 2" svg:x="0.55118in" svg:y="1.93465in" svg:width="9.92087in" svg:height="5.53976in" presentation:class="object" presentation:placeholder="false">
        <draw:text-box>
          <text:p text:style-name="a524" text:class-names="" text:cond-style-name=""><text:span text:style-name="a523" text:class-names="">Haga clic para modificar los estilos de texto del patrón</text:span></text:p>
          <text:list text:style-name="a527">
            <text:list-item>
              <text:list text:style-name="a527">
                <text:list-item>
                  <text:p text:style-name="a526" text:class-names="" text:cond-style-name=""><text:span text:style-name="a525" text:class-names="">Segundo nivel</text:span></text:p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p text:style-name="a529" text:class-names="" text:cond-style-name=""><text:span text:style-name="a5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p text:style-name="a532" text:class-names="" text:cond-style-name=""><text:span text:style-name="a5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0" draw:name="Marcador de fecha 3" svg:x="0.55118in" svg:y="8.00945in" svg:width="2.56811in" svg:height="0.25827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7" presentation:style-name="a543" draw:name="Marcador de pie de página 4" svg:x="3.77008in" svg:y="7.93976in" svg:width="3.49409in" svg:height="0.32795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8" presentation:style-name="a546" draw:name="Marcador de número de diapositiva 5" svg:x="7.90394in" svg:y="7.93976in" svg:width="2.56811in" svg:height="0.3279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3" presentation:style-name="a547" draw:name="Marcador de imagen de diapositiva 1">
          <svg:title/>
          <svg:desc/>
        </draw:page-thumbnail>
        <draw:frame draw:id="id4" presentation:style-name="a550" draw:name="Marcador de nota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5" presentation:style-name="a553" draw:name="Marcador de encabezad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6" draw:name="Marcador de fech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59" draw:name="Marcador de pie de página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8" presentation:style-name="a562" draw:name="Marcador de número de diapositiva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564">
      <draw:custom-shape svg:x="0in" svg:y="-0.01299in" svg:width="11.02362in" svg:height="1.32244in" draw:id="id69" draw:layer="Master2-bg" draw:style-name="a567" draw:name="Forma libre: forma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draw:layer="Master2-bg" draw:style-name="a568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71" draw:layer="Master2-bg" draw:style-name="a569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72" presentation:style-name="a572" draw:name="Título 1" svg:x="0.75174in" svg:y="2.06076in" svg:width="9.50868in" svg:height="3.43924in" presentation:class="title" presentation:placeholder="false">
        <draw:text-box>
          <text:p text:style-name="a571" text:class-names="" text:cond-style-name=""><text:span text:style-name="a570" text:class-names="">Haga clic para modificar el estilo de título del patrón</text:span></text:p>
        </draw:text-box>
        <svg:title/>
        <svg:desc/>
      </draw:frame>
      <draw:frame draw:id="id73" presentation:style-name="a576" draw:name="Marcador de texto 2" svg:x="0.75174in" svg:y="5.53299in" svg:width="9.50868in" svg:height="1.80729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579" draw:name="Marcador de fecha 3" svg:x="0.55118in" svg:y="8.00945in" svg:width="2.56811in" svg:height="0.25827in" presentation:class="date-time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5" presentation:style-name="a582" draw:name="Marcador de pie de página 4" svg:x="3.77008in" svg:y="7.93976in" svg:width="3.49409in" svg:height="0.32795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76" presentation:style-name="a585" draw:name="Marcador de número de diapositiva 5" svg:x="7.90394in" svg:y="7.93976in" svg:width="2.56811in" svg:height="0.32795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02">
        <draw:page-thumbnail svg:x="1.21063in" svg:y="0.88858in" svg:width="5.84567in" svg:height="4.38425in" presentation:class="page" draw:id="id3" presentation:style-name="a586" draw:name="Marcador de imagen de diapositiva 1">
          <svg:title/>
          <svg:desc/>
        </draw:page-thumbnail>
        <draw:frame draw:id="id4" presentation:style-name="a589" draw:name="Marcador de notas 2" svg:x="0.82677in" svg:y="5.55394in" svg:width="6.61378in" svg:height="5.26142in" presentation:class="notes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5" presentation:style-name="a592" draw:name="Marcador de encabezado 3" svg:x="0in" svg:y="0in" svg:width="3.5878in" svg:height="0.58425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6" presentation:style-name="a595" draw:name="Marcador de fecha 4" svg:x="4.67953in" svg:y="0in" svg:width="3.5878in" svg:height="0.58425in" presentation:class="date-time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pie de página 5" svg:x="0in" svg:y="11.10827in" svg:width="3.5878in" svg:height="0.58425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número de diapositiva 6" svg:x="4.67953in" svg:y="11.10827in" svg:width="3.5878in" svg:height="0.58425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03">
      <draw:custom-shape svg:x="0in" svg:y="-0.01299in" svg:width="11.02362in" svg:height="1.32244in" draw:id="id77" draw:layer="Master2-bg" draw:style-name="a606" draw:name="Forma libre: forma 1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draw:layer="Master2-bg" draw:style-name="a607" draw:name="Imagen 8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79" draw:layer="Master2-bg" draw:style-name="a608" draw:name="Imagen 9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80" presentation:style-name="a611" draw:name="Título 1" svg:x="0.55118in" svg:y="0.32953in" svg:width="8.97638in" svg:height="0.81496in" presentation:class="title" presentation:placeholder="false">
        <draw:text-box>
          <text:p text:style-name="a610" text:class-names="" text:cond-style-name=""><text:span text:style-name="a609" text:class-names="">Haga clic para modificar el estilo de título del patrón</text:span></text:p>
        </draw:text-box>
        <svg:title/>
        <svg:desc/>
      </draw:frame>
      <draw:frame draw:id="id81" presentation:style-name="a626" draw:name="Marcador de contenido 2" svg:x="0.55035in" svg:y="1.93403in" svg:width="4.87674in" svg:height="5.53993in" presentation:class="object" presentation:placeholder="false">
        <draw:text-box>
          <text:p text:style-name="a613" text:class-names="" text:cond-style-name=""><text:span text:style-name="a612" text:class-names="">Haga clic para modificar los estilos de texto del patrón</text:span></text:p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Segundo nivel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41" draw:name="Marcador de contenido 3" svg:x="5.59375in" svg:y="1.93403in" svg:width="4.87847in" svg:height="5.53993in" presentation:class="object" presentation:placeholder="false">
        <draw:text-box>
          <text:p text:style-name="a628" text:class-names="" text:cond-style-name=""><text:span text:style-name="a627" text:class-names="">Haga clic para modificar los estilos de texto del patrón</text:span></text:p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gundo ni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44" draw:name="Marcador de fecha 4" svg:x="0.55118in" svg:y="8.00945in" svg:width="2.56811in" svg:height="0.25827in" presentation:class="date-time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84" presentation:style-name="a647" draw:name="Marcador de pie de página 5" svg:x="3.77008in" svg:y="7.93976in" svg:width="3.49409in" svg:height="0.32795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85" presentation:style-name="a650" draw:name="Marcador de número de diapositiva 6" svg:x="7.90394in" svg:y="7.93976in" svg:width="2.56811in" svg:height="0.32795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67">
        <draw:page-thumbnail svg:x="1.21063in" svg:y="0.88858in" svg:width="5.84567in" svg:height="4.38425in" presentation:class="page" draw:id="id3" presentation:style-name="a651" draw:name="Marcador de imagen de diapositiva 1">
          <svg:title/>
          <svg:desc/>
        </draw:page-thumbnail>
        <draw:frame draw:id="id4" presentation:style-name="a654" draw:name="Marcador de notas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5" presentation:style-name="a657" draw:name="Marcador de encabezado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0" draw:name="Marcador de fecha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3" draw:name="Marcador de pie de página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Marcador de número de diapositiva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668">
      <draw:custom-shape svg:x="0in" svg:y="-0.01299in" svg:width="11.02362in" svg:height="1.32244in" draw:id="id86" draw:layer="Master2-bg" draw:style-name="a671" draw:name="Forma libre: forma 1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7" draw:layer="Master2-bg" draw:style-name="a672" draw:name="Imagen 10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88" draw:layer="Master2-bg" draw:style-name="a673" draw:name="Imagen 11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89" presentation:style-name="a676" draw:name="Título 1" svg:x="0.75868in" svg:y="0.44097in" svg:width="9.50868in" svg:height="1.59722in" presentation:class="title" presentation:placeholder="false">
        <draw:text-box>
          <text:p text:style-name="a675" text:class-names="" text:cond-style-name=""><text:span text:style-name="a674" text:class-names="">Haga clic para modificar el estilo de título del patrón</text:span></text:p>
        </draw:text-box>
        <svg:title/>
        <svg:desc/>
      </draw:frame>
      <draw:frame draw:id="id90" presentation:style-name="a680" draw:name="Marcador de texto 2" svg:x="0.75868in" svg:y="2.02604in" svg:width="4.66493in" svg:height="0.99306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695" draw:name="Marcador de contenido 3" svg:x="0.75868in" svg:y="3.0191in" svg:width="4.66493in" svg:height="4.44271in" presentation:class="object" presentation:placeholder="false">
        <draw:text-box>
          <text:p text:style-name="a682" text:class-names="" text:cond-style-name=""><text:span text:style-name="a681" text:class-names="">Haga clic para modificar los estilos de texto del patrón</text:span></text:p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gundo ni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699" draw:name="Marcador de texto 4" svg:x="5.5816in" svg:y="2.02604in" svg:width="4.68576in" svg:height="0.99306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Haga clic para modificar los estilos de texto del patrón</text:span></text:p>
            </text:list-item>
          </text:list>
        </draw:text-box>
        <svg:title/>
        <svg:desc/>
      </draw:frame>
      <draw:frame draw:id="id93" presentation:style-name="a714" draw:name="Marcador de contenido 5" svg:x="5.5816in" svg:y="3.0191in" svg:width="4.68576in" svg:height="4.44271in" presentation:class="object" presentation:placeholder="false">
        <draw:text-box>
          <text:p text:style-name="a701" text:class-names="" text:cond-style-name=""><text:span text:style-name="a700" text:class-names="">Haga clic para modificar los estilos de texto del patrón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gundo ni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17" draw:name="Marcador de fecha 6" svg:x="0.55118in" svg:y="8.00945in" svg:width="2.56811in" svg:height="0.25827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5" presentation:style-name="a720" draw:name="Marcador de pie de página 7" svg:x="3.77008in" svg:y="7.93976in" svg:width="3.49409in" svg:height="0.32795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6" presentation:style-name="a723" draw:name="Marcador de número de diapositiva 8" svg:x="7.90394in" svg:y="7.93976in" svg:width="2.56811in" svg:height="0.32795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40">
        <draw:page-thumbnail svg:x="1.21063in" svg:y="0.88858in" svg:width="5.84567in" svg:height="4.38425in" presentation:class="page" draw:id="id3" presentation:style-name="a724" draw:name="Marcador de imagen de diapositiva 1">
          <svg:title/>
          <svg:desc/>
        </draw:page-thumbnail>
        <draw:frame draw:id="id4" presentation:style-name="a727" draw:name="Marcador de notas 2" svg:x="0.82677in" svg:y="5.55394in" svg:width="6.61378in" svg:height="5.26142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5" presentation:style-name="a730" draw:name="Marcador de encabezado 3" svg:x="0in" svg:y="0in" svg:width="3.5878in" svg:height="0.58425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6" presentation:style-name="a733" draw:name="Marcador de fecha 4" svg:x="4.67953in" svg:y="0in" svg:width="3.5878in" svg:height="0.58425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7" presentation:style-name="a736" draw:name="Marcador de pie de página 5" svg:x="0in" svg:y="11.10827in" svg:width="3.5878in" svg:height="0.5842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8" presentation:style-name="a739" draw:name="Marcador de número de diapositiva 6" svg:x="4.67953in" svg:y="11.10827in" svg:width="3.5878in" svg:height="0.5842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741">
      <draw:custom-shape svg:x="0in" svg:y="-0.01299in" svg:width="11.02362in" svg:height="1.32244in" draw:id="id97" draw:layer="Master2-bg" draw:style-name="a744" draw:name="Forma libre: forma 1">
        <svg:title/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8" draw:layer="Master2-bg" draw:style-name="a745" draw:name="Imagen 6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99" draw:layer="Master2-bg" draw:style-name="a746" draw:name="Imagen 7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00" presentation:style-name="a749" draw:name="Título 1" svg:x="0.55118in" svg:y="0.32953in" svg:width="8.97638in" svg:height="0.81496in" presentation:class="title" presentation:placeholder="false">
        <draw:text-box>
          <text:p text:style-name="a748" text:class-names="" text:cond-style-name=""><text:span text:style-name="a747" text:class-names="">Haga clic para modificar el estilo de título del patrón</text:span></text:p>
        </draw:text-box>
        <svg:title/>
        <svg:desc/>
      </draw:frame>
      <draw:frame draw:id="id101" presentation:style-name="a752" draw:name="Marcador de fecha 2" svg:x="0.55118in" svg:y="8.00945in" svg:width="2.56811in" svg:height="0.25827in" presentation:class="date-time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02" presentation:style-name="a755" draw:name="Marcador de pie de página 3" svg:x="3.77008in" svg:y="7.93976in" svg:width="3.49409in" svg:height="0.32795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03" presentation:style-name="a758" draw:name="Marcador de número de diapositiva 4" svg:x="7.90394in" svg:y="7.93976in" svg:width="2.56811in" svg:height="0.32795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75">
        <draw:page-thumbnail svg:x="1.21063in" svg:y="0.88858in" svg:width="5.84567in" svg:height="4.38425in" presentation:class="page" draw:id="id3" presentation:style-name="a759" draw:name="Marcador de imagen de diapositiva 1">
          <svg:title/>
          <svg:desc/>
        </draw:page-thumbnail>
        <draw:frame draw:id="id4" presentation:style-name="a762" draw:name="Marcador de notas 2" svg:x="0.82677in" svg:y="5.55394in" svg:width="6.61378in" svg:height="5.26142in" presentation:class="notes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5" presentation:style-name="a765" draw:name="Marcador de encabezado 3" svg:x="0in" svg:y="0in" svg:width="3.5878in" svg:height="0.58425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6" presentation:style-name="a768" draw:name="Marcador de fecha 4" svg:x="4.67953in" svg:y="0in" svg:width="3.5878in" svg:height="0.58425in" presentation:class="date-time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7" presentation:style-name="a771" draw:name="Marcador de pie de página 5" svg:x="0in" svg:y="11.10827in" svg:width="3.5878in" svg:height="0.5842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8" presentation:style-name="a774" draw:name="Marcador de número de diapositiva 6" svg:x="4.67953in" svg:y="11.10827in" svg:width="3.5878in" svg:height="0.58425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776">
      <draw:custom-shape svg:x="0in" svg:y="-0.01299in" svg:width="11.02362in" svg:height="1.32244in" draw:id="id104" draw:layer="Master2-bg" draw:style-name="a779" draw:name="Forma libre: forma 1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780" draw:name="Imagen 5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106" draw:layer="Master2-bg" draw:style-name="a781" draw:name="Imagen 6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07" presentation:style-name="a784" draw:name="Marcador de fecha 1" svg:x="0.55118in" svg:y="8.00945in" svg:width="2.56811in" svg:height="0.25827in" presentation:class="date-time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08" presentation:style-name="a787" draw:name="Marcador de pie de página 2" svg:x="3.77008in" svg:y="7.93976in" svg:width="3.49409in" svg:height="0.32795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09" presentation:style-name="a790" draw:name="Marcador de número de diapositiva 3" svg:x="7.90394in" svg:y="7.93976in" svg:width="2.56811in" svg:height="0.32795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807">
        <draw:page-thumbnail svg:x="1.21063in" svg:y="0.88858in" svg:width="5.84567in" svg:height="4.38425in" presentation:class="page" draw:id="id3" presentation:style-name="a791" draw:name="Marcador de imagen de diapositiva 1">
          <svg:title/>
          <svg:desc/>
        </draw:page-thumbnail>
        <draw:frame draw:id="id4" presentation:style-name="a794" draw:name="Marcador de notas 2" svg:x="0.82677in" svg:y="5.55394in" svg:width="6.61378in" svg:height="5.26142in" presentation:class="notes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5" presentation:style-name="a797" draw:name="Marcador de encabezado 3" svg:x="0in" svg:y="0in" svg:width="3.5878in" svg:height="0.58425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6" presentation:style-name="a800" draw:name="Marcador de fecha 4" svg:x="4.67953in" svg:y="0in" svg:width="3.5878in" svg:height="0.58425in" presentation:class="date-time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7" presentation:style-name="a803" draw:name="Marcador de pie de página 5" svg:x="0in" svg:y="11.10827in" svg:width="3.5878in" svg:height="0.58425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8" presentation:style-name="a806" draw:name="Marcador de número de diapositiva 6" svg:x="4.67953in" svg:y="11.10827in" svg:width="3.5878in" svg:height="0.58425in" presentation:class="page-number" presentation:placeholder="false">
          <draw:text-box>
            <text:p text:style-name="a805" text:class-names="" text:cond-style-name=""><text:span text:style-name="a80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08">
      <draw:custom-shape svg:x="0in" svg:y="-0.01299in" svg:width="11.02362in" svg:height="1.32244in" draw:id="id110" draw:layer="Master2-bg" draw:style-name="a811" draw:name="Forma libre: forma 1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draw:layer="Master2-bg" draw:style-name="a812" draw:name="Imagen 8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112" draw:layer="Master2-bg" draw:style-name="a813" draw:name="Imagen 9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13" presentation:style-name="a816" draw:name="Título 1" svg:x="0.75868in" svg:y="0.55035in" svg:width="3.55556in" svg:height="1.93056in" presentation:class="title" presentation:placeholder="false">
        <draw:text-box>
          <text:p text:style-name="a815" text:class-names="" text:cond-style-name=""><text:span text:style-name="a814" text:class-names="">Haga clic para modificar el estilo de título del patrón</text:span></text:p>
        </draw:text-box>
        <svg:title/>
        <svg:desc/>
      </draw:frame>
      <draw:frame draw:id="id114" presentation:style-name="a831" draw:name="Marcador de contenido 2" svg:x="4.6875in" svg:y="1.19097in" svg:width="5.57986in" svg:height="5.875in" presentation:class="object" presentation:placeholder="false">
        <draw:text-box>
          <text:p text:style-name="a818" text:class-names="" text:cond-style-name=""><text:span text:style-name="a817" text:class-names="">Haga clic para modificar los estilos de texto del patrón</text:span></text:p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gundo nivel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list text:style-name="a830">
                            <text:list-item>
                              <text:p text:style-name="a829" text:class-names="" text:cond-style-name=""><text:span text:style-name="a82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35" draw:name="Marcador de texto 3" svg:x="0.75868in" svg:y="2.4809in" svg:width="3.55556in" svg:height="4.59375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Haga clic para modificar los estilos de texto del patrón</text:span></text:p>
            </text:list-item>
          </text:list>
        </draw:text-box>
        <svg:title/>
        <svg:desc/>
      </draw:frame>
      <draw:frame draw:id="id116" presentation:style-name="a838" draw:name="Marcador de fecha 4" svg:x="0.55118in" svg:y="8.00945in" svg:width="2.56811in" svg:height="0.25827in" presentation:class="date-time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17" presentation:style-name="a841" draw:name="Marcador de pie de página 5" svg:x="3.77008in" svg:y="7.93976in" svg:width="3.49409in" svg:height="0.32795in" presentation:class="footer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118" presentation:style-name="a844" draw:name="Marcador de número de diapositiva 6" svg:x="7.90394in" svg:y="7.93976in" svg:width="2.56811in" svg:height="0.32795in" presentation:class="page-number" presentation:placeholder="false">
        <draw:text-box>
          <text:p text:style-name="a843" text:class-names="" text:cond-style-name=""><text:span text:style-name="a84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861">
        <draw:page-thumbnail svg:x="1.21063in" svg:y="0.88858in" svg:width="5.84567in" svg:height="4.38425in" presentation:class="page" draw:id="id3" presentation:style-name="a845" draw:name="Marcador de imagen de diapositiva 1">
          <svg:title/>
          <svg:desc/>
        </draw:page-thumbnail>
        <draw:frame draw:id="id4" presentation:style-name="a848" draw:name="Marcador de notas 2" svg:x="0.82677in" svg:y="5.55394in" svg:width="6.61378in" svg:height="5.26142in" presentation:class="notes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5" presentation:style-name="a851" draw:name="Marcador de encabezado 3" svg:x="0in" svg:y="0in" svg:width="3.5878in" svg:height="0.58425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6" presentation:style-name="a854" draw:name="Marcador de fecha 4" svg:x="4.67953in" svg:y="0in" svg:width="3.5878in" svg:height="0.58425in" presentation:class="date-time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7" presentation:style-name="a857" draw:name="Marcador de pie de página 5" svg:x="0in" svg:y="11.10827in" svg:width="3.5878in" svg:height="0.58425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Marcador de número de diapositiva 6" svg:x="4.67953in" svg:y="11.10827in" svg:width="3.5878in" svg:height="0.58425in" presentation:class="page-number" presentation:placeholder="false">
          <draw:text-box>
            <text:p text:style-name="a859" text:class-names="" text:cond-style-name=""><text:span text:style-name="a85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862">
      <draw:custom-shape svg:x="0in" svg:y="-0.01299in" svg:width="11.02362in" svg:height="1.32244in" draw:id="id119" draw:layer="Master2-bg" draw:style-name="a865" draw:name="Forma libre: forma 1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0" draw:layer="Master2-bg" draw:style-name="a866" draw:name="Imagen 8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121" draw:layer="Master2-bg" draw:style-name="a867" draw:name="Imagen 9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22" presentation:style-name="a870" draw:name="Título 1" svg:x="0.75868in" svg:y="0.55035in" svg:width="3.55556in" svg:height="1.93056in" presentation:class="title" presentation:placeholder="false">
        <draw:text-box>
          <text:p text:style-name="a869" text:class-names="" text:cond-style-name=""><text:span text:style-name="a868" text:class-names="">Haga clic para modificar el estilo de título del patrón</text:span></text:p>
        </draw:text-box>
        <svg:title/>
        <svg:desc/>
      </draw:frame>
      <draw:frame draw:id="id123" presentation:style-name="a873" draw:name="Marcador de posición de imagen 2" svg:x="4.6875in" svg:y="1.19097in" svg:width="5.57986in" svg:height="5.875in" presentation:class="graphic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24" presentation:style-name="a877" draw:name="Marcador de texto 3" svg:x="0.75868in" svg:y="2.4809in" svg:width="3.55556in" svg:height="4.59375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Haga clic para modificar los estilos de texto del patrón</text:span></text:p>
            </text:list-item>
          </text:list>
        </draw:text-box>
        <svg:title/>
        <svg:desc/>
      </draw:frame>
      <draw:frame draw:id="id125" presentation:style-name="a880" draw:name="Marcador de fecha 4" svg:x="0.55118in" svg:y="8.00945in" svg:width="2.56811in" svg:height="0.25827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26" presentation:style-name="a883" draw:name="Marcador de pie de página 5" svg:x="3.77008in" svg:y="7.93976in" svg:width="3.49409in" svg:height="0.32795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27" presentation:style-name="a886" draw:name="Marcador de número de diapositiva 6" svg:x="7.90394in" svg:y="7.93976in" svg:width="2.56811in" svg:height="0.32795in" presentation:class="page-number" presentation:placeholder="false">
        <draw:text-box>
          <text:p text:style-name="a885" text:class-names="" text:cond-style-name=""><text:span text:style-name="a88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03">
        <draw:page-thumbnail svg:x="1.21063in" svg:y="0.88858in" svg:width="5.84567in" svg:height="4.38425in" presentation:class="page" draw:id="id3" presentation:style-name="a887" draw:name="Marcador de imagen de diapositiva 1">
          <svg:title/>
          <svg:desc/>
        </draw:page-thumbnail>
        <draw:frame draw:id="id4" presentation:style-name="a890" draw:name="Marcador de notas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5" presentation:style-name="a893" draw:name="Marcador de encabezado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6" presentation:style-name="a896" draw:name="Marcador de fecha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7" presentation:style-name="a899" draw:name="Marcador de pie de página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8" presentation:style-name="a902" draw:name="Marcador de número de diapositiva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04">
      <draw:custom-shape svg:x="0in" svg:y="-0.01299in" svg:width="11.02362in" svg:height="1.32244in" draw:id="id128" draw:layer="Master2-bg" draw:style-name="a907" draw:name="Forma libre: forma 1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draw:layer="Master2-bg" draw:style-name="a908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130" draw:layer="Master2-bg" draw:style-name="a909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31" presentation:style-name="a912" draw:name="Título 1" svg:x="0.55118in" svg:y="0.32953in" svg:width="8.97638in" svg:height="0.81496in" presentation:class="title" presentation:placeholder="false">
        <draw:text-box>
          <text:p text:style-name="a911" text:class-names="" text:cond-style-name=""><text:span text:style-name="a910" text:class-names="">Haga clic para modificar el estilo de título del patrón</text:span></text:p>
        </draw:text-box>
        <svg:title/>
        <svg:desc/>
      </draw:frame>
      <draw:frame draw:id="id132" presentation:style-name="a928" draw:name="Marcador de texto vertical 2" svg:x="0.55118in" svg:y="1.93465in" svg:width="9.92087in" svg:height="5.53976in" presentation:class="outline" presentation:placeholder="false">
        <draw:text-box>
          <text:list text:style-name="a915">
            <text:list-item>
              <text:p text:style-name="a914" text:class-names="" text:cond-style-name=""><text:span text:style-name="a913" text:class-names="">Haga clic para modificar los estilos de texto del patrón</text:span></text:p>
            </text:list-item>
          </text:list>
          <text:list text:style-name="a918">
            <text:list-item>
              <text:list text:style-name="a918">
                <text:list-item>
                  <text:p text:style-name="a917" text:class-names="" text:cond-style-name=""><text:span text:style-name="a916" text:class-names="">Segundo nivel</text:span></text:p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p text:style-name="a920" text:class-names="" text:cond-style-name=""><text:span text:style-name="a9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p text:style-name="a923" text:class-names="" text:cond-style-name=""><text:span text:style-name="a9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31" draw:name="Marcador de fecha 3" svg:x="0.55118in" svg:y="8.00945in" svg:width="2.56811in" svg:height="0.25827in" presentation:class="date-time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34" presentation:style-name="a934" draw:name="Marcador de pie de página 4" svg:x="3.77008in" svg:y="7.93976in" svg:width="3.49409in" svg:height="0.32795in" presentation:class="footer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35" presentation:style-name="a937" draw:name="Marcador de número de diapositiva 5" svg:x="7.90394in" svg:y="7.93976in" svg:width="2.56811in" svg:height="0.32795in" presentation:class="page-number" presentation:placeholder="false">
        <draw:text-box>
          <text:p text:style-name="a936" text:class-names="" text:cond-style-name=""><text:span text:style-name="a93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3" presentation:style-name="a938" draw:name="Marcador de imagen de diapositiva 1">
          <svg:title/>
          <svg:desc/>
        </draw:page-thumbnail>
        <draw:frame draw:id="id4" presentation:style-name="a941" draw:name="Marcador de notas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5" presentation:style-name="a944" draw:name="Marcador de encabezado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" presentation:style-name="a947" draw:name="Marcador de fecha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7" presentation:style-name="a950" draw:name="Marcador de pie de página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8" presentation:style-name="a953" draw:name="Marcador de número de diapositiva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955">
      <draw:custom-shape svg:x="0in" svg:y="-0.01299in" svg:width="11.02362in" svg:height="1.32244in" draw:id="id136" draw:layer="Master2-bg" draw:style-name="a958" draw:name="Forma libre: forma 1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draw:layer="Master2-bg" draw:style-name="a959" draw:name="Imagen 7" svg:x="9.53976in" svg:y="0.08189in" svg:width="1.13307in" svg:height="1.1248in" style:rel-width="scale" style:rel-height="scale">
        <draw:image xlink:href="media/image11.png" xlink:type="simple" xlink:show="embed" xlink:actuate="onLoad"/>
        <svg:title/>
        <svg:desc/>
      </draw:frame>
      <draw:frame draw:id="id138" draw:layer="Master2-bg" draw:style-name="a960" draw:name="Imagen 8" svg:x="0.14843in" svg:y="7.60276in" svg:width="10.75039in" svg:height="0.33701in" style:rel-width="scale" style:rel-height="scale">
        <draw:image xlink:href="media/image12.png" xlink:type="simple" xlink:show="embed" xlink:actuate="onLoad"/>
        <svg:title/>
        <svg:desc/>
      </draw:frame>
      <draw:frame draw:id="id139" presentation:style-name="a963" draw:name="Título vertical 1" svg:x="7.99306in" svg:y="0.32986in" svg:width="2.47917in" svg:height="7.1441in" presentation:class="title" presentation:placeholder="false">
        <draw:text-box>
          <text:p text:style-name="a962" text:class-names="" text:cond-style-name=""><text:span text:style-name="a961" text:class-names="">Haga clic para modificar el estilo de título del patrón</text:span></text:p>
        </draw:text-box>
        <svg:title/>
        <svg:desc/>
      </draw:frame>
      <draw:frame draw:id="id140" presentation:style-name="a979" draw:name="Marcador de texto vertical 2" svg:x="0.55035in" svg:y="0.32986in" svg:width="7.27604in" svg:height="7.1441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Haga clic para modificar los estilos de texto del patrón</text:span></text:p>
            </text:list-item>
          </text:list>
          <text:list text:style-name="a969">
            <text:list-item>
              <text:list text:style-name="a969">
                <text:list-item>
                  <text:p text:style-name="a968" text:class-names="" text:cond-style-name=""><text:span text:style-name="a967" text:class-names="">Segundo nivel</text:span></text:p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p text:style-name="a971" text:class-names="" text:cond-style-name=""><text:span text:style-name="a9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p text:style-name="a974" text:class-names="" text:cond-style-name=""><text:span text:style-name="a9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82" draw:name="Marcador de fecha 3" svg:x="0.55118in" svg:y="8.00945in" svg:width="2.56811in" svg:height="0.25827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42" presentation:style-name="a985" draw:name="Marcador de pie de página 4" svg:x="3.77008in" svg:y="7.93976in" svg:width="3.49409in" svg:height="0.32795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43" presentation:style-name="a988" draw:name="Marcador de número de diapositiva 5" svg:x="7.90394in" svg:y="7.93976in" svg:width="2.56811in" svg:height="0.32795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05">
        <draw:page-thumbnail svg:x="1.21063in" svg:y="0.88858in" svg:width="5.84567in" svg:height="4.38425in" presentation:class="page" draw:id="id3" presentation:style-name="a989" draw:name="Marcador de imagen de diapositiva 1">
          <svg:title/>
          <svg:desc/>
        </draw:page-thumbnail>
        <draw:frame draw:id="id4" presentation:style-name="a992" draw:name="Marcador de notas 2" svg:x="0.82677in" svg:y="5.55394in" svg:width="6.61378in" svg:height="5.26142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5" presentation:style-name="a995" draw:name="Marcador de encabezado 3" svg:x="0in" svg:y="0in" svg:width="3.5878in" svg:height="0.58425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6" presentation:style-name="a998" draw:name="Marcador de fecha 4" svg:x="4.67953in" svg:y="0in" svg:width="3.5878in" svg:height="0.58425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Marcador de pie de página 5" svg:x="0in" svg:y="11.10827in" svg:width="3.5878in" svg:height="0.58425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Marcador de número de diapositiva 6" svg:x="4.67953in" svg:y="11.10827in" svg:width="3.5878in" svg:height="0.58425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1006">
      <draw:frame draw:id="id144" presentation:style-name="a1009" draw:name="Marcador de encabezado 1" svg:x="0in" svg:y="0in" svg:width="3.5878in" svg:height="0.58425in" presentation:class="head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5" presentation:style-name="a1012" draw:name="Marcador de fecha 2" svg:x="4.67953in" svg:y="0in" svg:width="3.5878in" svg:height="0.58425in" presentation:class="date-time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6" presentation:style-name="a1015" draw:name="Marcador de pie de página 3" svg:x="0in" svg:y="11.10827in" svg:width="3.5878in" svg:height="0.58425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147" presentation:style-name="a1019" draw:name="Marcador de número de diapositiva 4" svg:x="4.67953in" svg:y="11.10827in" svg:width="3.5878in" svg:height="0.58425in" presentation:class="page-number" presentation:placeholder="false">
        <draw:text-box>
          <text:p text:style-name="a1018" text:class-names="" text:cond-style-name=""><text:span text:style-name="a1016" text:class-names=""><text:page-number style:num-format="1" text:fixed="false">‹Nº›</text:page-number></text:span><text:span text:style-name="a1017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ncil</dc:title>
    <meta:initial-creator>profe</meta:initial-creator>
    <dc:creator>profe</dc:creator>
    <meta:creation-date>2020-11-13T18:53:09Z</meta:creation-date>
    <dc:date>2021-03-11T08:19:48Z</dc:date>
    <meta:editing-cycles>131</meta:editing-cycles>
    <meta:editing-duration>PT152969S</meta:editing-duration>
    <meta:document-statistic meta:paragraph-count="199" meta:word-count="573"/>
  </office:meta>
</office:document-meta>
</file>